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application/xml" manifest:full-path="Formula-7/settings.xml"/>
  <manifest:file-entry manifest:media-type="application/xml" manifest:full-path="Formula-7/content.xml"/>
  <manifest:file-entry manifest:media-type="application/xml" manifest:full-path="Formula-5/settings.xml"/>
  <manifest:file-entry manifest:media-type="application/xml" manifest:full-path="Formula-5/content.xml"/>
  <manifest:file-entry manifest:media-type="application/xml" manifest:full-path="Formula-3/settings.xml"/>
  <manifest:file-entry manifest:media-type="application/xml" manifest:full-path="Formula-3/content.xml"/>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7/"/>
  <manifest:file-entry manifest:media-type="application/vnd.oasis.opendocument.formula" manifest:full-path="Formula-7/"/>
  <manifest:file-entry manifest:media-type="application/vnd.oasis.opendocument.formula" manifest:full-path="Formula-5/"/>
  <manifest:file-entry manifest:media-type="application/vnd.oasis.opendocument.formula" manifest:full-path="Formula-5/"/>
  <manifest:file-entry manifest:media-type="application/vnd.oasis.opendocument.formula" manifest:full-path="Formula-3/"/>
  <manifest:file-entry manifest:media-type="application/vnd.oasis.opendocument.formula" manifest:full-path="Formula-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5">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6">
      <style:paragraph-properties fo:margin-top="0in" fo:margin-bottom="0in"/>
    </style:style>
    <style:style style:name="P36" style:family="paragraph" style:parent-style-name="Text_20_body" style:list-style-name="L7">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8">
      <style:paragraph-properties fo:margin-top="0in" fo:margin-bottom="0in"/>
    </style:style>
    <style:style style:name="P78" style:family="paragraph" style:parent-style-name="Text_20_body" style:list-style-name="L9">
      <style:paragraph-properties fo:margin-top="0in" fo:margin-bottom="0in"/>
    </style:style>
    <style:style style:name="P79" style:family="paragraph" style:parent-style-name="Text_20_body" style:list-style-name="L10">
      <style:paragraph-properties fo:margin-top="0in" fo:margin-bottom="0in"/>
    </style:style>
    <style:style style:name="P80" style:family="paragraph" style:parent-style-name="Text_20_body" style:list-style-name="L11">
      <style:paragraph-properties fo:margin-top="0in" fo:margin-bottom="0in"/>
    </style:style>
    <style:style style:name="P81" style:family="paragraph" style:parent-style-name="Text_20_body" style:list-style-name="L12">
      <style:paragraph-properties fo:margin-top="0in" fo:margin-bottom="0in"/>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398*"/>
    </style:style>
    <style:style style:name="Table1.B" style:family="table-column">
      <style:table-column-properties style:rel-column-width="10627*"/>
    </style:style>
    <style:style style:name="Table1.C" style:family="table-column">
      <style:table-column-properties style:rel-column-width="23025*"/>
    </style:style>
    <style:style style:name="Table1.D" style:family="table-column">
      <style:table-column-properties style:rel-column-width="19483*"/>
    </style:style>
    <style:style style:name="Table2" style:family="table">
      <style:table-properties table:align="center" style:rel-width="100%"/>
    </style:style>
    <style:style style:name="Table2.A" style:family="table-column">
      <style:table-column-properties style:rel-column-width="12398*"/>
    </style:style>
    <style:style style:name="Table2.B" style:family="table-column">
      <style:table-column-properties style:rel-column-width="10627*"/>
    </style:style>
    <style:style style:name="Table2.C" style:family="table-column">
      <style:table-column-properties style:rel-column-width="23025*"/>
    </style:style>
    <style:style style:name="Table2.D" style:family="table-column">
      <style:table-column-properties style:rel-column-width="19483*"/>
    </style:style>
    <style:style style:name="Table3" style:family="table">
      <style:table-properties table:align="center" style:rel-width="100%"/>
    </style:style>
    <style:style style:name="Table3.A" style:family="table-column">
      <style:table-column-properties style:rel-column-width="12398*"/>
    </style:style>
    <style:style style:name="Table3.B" style:family="table-column">
      <style:table-column-properties style:rel-column-width="10627*"/>
    </style:style>
    <style:style style:name="Table3.C" style:family="table-column">
      <style:table-column-properties style:rel-column-width="23025*"/>
    </style:style>
    <style:style style:name="Table3.D" style:family="table-column">
      <style:table-column-properties style:rel-column-width="19483*"/>
    </style:style>
    <style:style style:name="Table4" style:family="table">
      <style:table-properties table:align="center" style:rel-width="100%"/>
    </style:style>
    <style:style style:name="Table4.A" style:family="table-column">
      <style:table-column-properties style:rel-column-width="22598*"/>
    </style:style>
    <style:style style:name="Table4.B" style:family="table-column">
      <style:table-column-properties style:rel-column-width="24858*"/>
    </style:style>
    <style:style style:name="Table4.C" style:family="table-column">
      <style:table-column-properties style:rel-column-width="18078*"/>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11497*"/>
    </style:style>
    <style:style style:name="Table5.C" style:family="table-column">
      <style:table-column-properties style:rel-column-width="19545*"/>
    </style:style>
    <style:style style:name="Table5.D" style:family="table-column">
      <style:table-column-properties style:rel-column-width="24144*"/>
    </style:style>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Polyglot Import CSV: Uma solução para importação de documentos CSV para múltiplos bancos de dados</text:p>
<text:p text:style-name="Author">Lucas Bueno Cesario</text:p>
<text:p text:style-name="Date">2026/1</text:p>
A persistência poliglota é essencial na arquitetura contemporânea de bancos de dados, integrando diversas tecnologias de armazenamento em aplicativos. A ferramenta “Polyglot Import CSV” destaca-se como solução para otimizar a importação de dados CSV em diversos bancos de dados, superando desafios da persistência poliglota. Por meio de configurações simples em arquivos JSON, a ferramenta oferece suporte para PostgreSQL, Redis, Cassandra, MongoDB e Neo4j, acelerando o processo e aumentando a flexibilidade para os desenvolvedores. A publicação do código aberto da ferramenta impulsiona avanços colaborativos na dinâmica arquitetura moderna de bancos de dados, consolidando-se como uma solução versátil e eficiente.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ção"/>1 INTRODUÇÃO<text:bookmark-end text:name="introdução"/></text:h>
<text:h text:style-name="Heading_20_2" text:outline-level="2"><text:bookmark-start text:name="visão-geral"/>1.1 Visão Geral<text:bookmark-end text:name="visão-geral"/></text:h>
<text:p text:style-name="First_20_paragraph">Nas esferas industrial e acadêmica de bancos de dados, a concepção de que um único modelo de dados não atende a todas as necessidades tem conquistado aceitação, apontando para a perspectiva de persistência poliglota no futuro. Embora os sistemas de banco de dados relacionais devam manter sua predominância, espera-se uma convivência com diversas formas de sistemas, como os NoSQL (Sadalage; Fowler, 2013).</text:p>
<text:p text:style-name="Text_20_body">Algumas pesquisas têm sido feitas na área de persistência poliglota, como sugestões de modelos de dados unificados (Chillón et al., 2023), comparação de desempenho de bancos de dados multi-modelos contra abordagens de persistência poliglota (Ye et al., 2023), revisões sistemáticas sobre modelagem poliglota de dados (Silva; Bornia; Mello, 2024), tutoriais sobre o estado da arte e desafios abertos (Kiehn et al., 2022), e a adoção da persistência poliglota em Big Data (Khine; Wang, 2019).</text:p>
<text:p text:style-name="Text_20_body">Percebe-se a falta de uma ferramenta única de importação de dados que possa realizar a persistência poliglota para diversos SGBDs que tratem modelos de dados diferentes. A proposta deste trabalho é apresentar a ferramenta <text:span text:style-name="T1">Polyglot Import CSV</text:span>, que importa dados armazenados em CSV para diferentes sistemas, baseada em uma configuração em JSON que aponta quais colunas do CSV formam cada entidade e relacionamento de cada SGBD.</text:p>
<text:p text:style-name="Text_20_body">CSV (Comma-Separated Values) é um arquivo de valores separados por vírgulas, frequentemente visualizado no Excel ou em alguma outra ferramenta de planilha. Pode haver outros tipos de valores como delimitadores, mas o mais comum é a vírgula. Muitos sistemas e processos hoje convertem seus dados para o formato CSV para saídas de arquivo para outros sistemas, relatórios amigáveis para humanos e outras necessidades. É um formato de arquivo padrão com o qual humanos e sistemas já estão familiarizados ao usar e manipular.</text:p>
<text:h text:style-name="Heading_20_2" text:outline-level="2"><text:bookmark-start text:name="objetivos"/>1.2 Objetivos<text:bookmark-end text:name="objetivos"/></text:h>
<text:h text:style-name="Heading_20_3" text:outline-level="3"><text:bookmark-start text:name="objetivo-geral"/>1.2.1 Objetivo Geral<text:bookmark-end text:name="objetivo-geral"/></text:h>
<text:p text:style-name="First_20_paragraph">Desenvolver a ferramenta <text:span text:style-name="T1">Polyglot Import CSV</text:span> que possibilitará a importação de dados em arquivos CSV para múltiplos SGBDs: PostgreSQL, Redis, MongoDB, Cassandra ou Neo4j.</text:p>
<text:h text:style-name="Heading_20_3" text:outline-level="3"><text:bookmark-start text:name="objetivos-específicos"/>1.2.2 Objetivos Específicos<text:bookmark-end text:name="objetivos-específicos"/></text:h>
<text:list text:style-name="L1">
  <text:list-item>
    <text:p text:style-name="P1">Fazer com que o arquivo de configuração JSON seja bem personalizável, seguindo uma sintaxe específica, porém flexível, além de adicionar opções como filtros e escolha de chave primária;</text:p>
  </text:list-item>
  <text:list-item>
    <text:p text:style-name="P1">Não permitir sintaxes de configuração incorretas; se a sintaxe estiver errada em algum lugar do arquivo de configuração, a importação não deve começar até que o arquivo de configuração esteja corrigido;</text:p>
  </text:list-item>
  <text:list-item>
    <text:p text:style-name="P1">Testar a ferramenta com um conjunto de dados armazenados num arquivo CSV que representa dados de um site de e-commerce.</text:p>
  </text:list-item>
</text:list>
<text:h text:style-name="Heading_20_2" text:outline-level="2"><text:bookmark-start text:name="metodologia"/>1.3 Metodologia<text:bookmark-end text:name="metodologia"/></text:h>
<text:p text:style-name="First_20_paragraph">Buscando obter conhecimento para realização do trabalho, primeiramente foi feito um estudo básico sobre o assunto, seguindo da implementação da solução, como descrito abaixo:</text:p>
<text:list text:style-name="L2">
  <text:list-item>
    <text:p text:style-name="P2">Estudo sobre persistência poliglota e seu estado da arte;</text:p>
  </text:list-item>
  <text:list-item>
    <text:p text:style-name="P2">Estudo sobre os paradigmas relacional e não-relacionais que serão abrangidos pela solução, tais como: chave-valor, documento, grafo e colunar;</text:p>
  </text:list-item>
  <text:list-item>
    <text:p text:style-name="P2">Estudo de decisão de linguagem de implementação que demonstra melhor produtividade para codificar a solução;</text:p>
  </text:list-item>
  <text:list-item>
    <text:p text:style-name="P2">Implementação da solução “Polyglot Import CSV”;</text:p>
  </text:list-item>
  <text:list-item>
    <text:p text:style-name="P2">Testes da solução “Polyglot Import CSV” implementada.</text:p>
  </text:list-item>
</text:list>
<text:p text:style-name="First_20_paragraph">Na primeira etapa, foi estudado o que é a persistência poliglota, e a sua relevância no cenário atual.</text:p>
<text:p text:style-name="Text_20_body">Na segunda etapa, foram estudados os diversos modelos de dados: como cada modelo representa suas entidades; se há relacionamentos entre entidades no modelo; se é possível a existência de entidades aninhadas e multivaloradas; as limitações de cada modelo.</text:p>
<text:p text:style-name="Text_20_body">Na terceira etapa, foram estudadas as formas de implementar a solução usando as linguagens Java e Python e, pela simplicidade e produtividade, a linguagem Python foi escolhida.</text:p>
<text:p text:style-name="Text_20_body">As etapas de implementação e testes foram concluídas durante a elaboração deste TCC I, resultando no protótipo funcional descrito no Capítulo 4, validado com o conjunto de dados <text:span text:style-name="Source_20_Text">ecommerce_join.csv</text:span> e o arquivo <text:span text:style-name="Source_20_Text">import_config.json</text:span> do cenário e-commerce.</text:p>
<text:h text:style-name="Heading_20_2" text:outline-level="2"><text:bookmark-start text:name="estrutura-do-trabalho"/>1.4 Estrutura do Trabalho<text:bookmark-end text:name="estrutura-do-trabalho"/></text:h>
<text:p text:style-name="First_20_paragraph">Este trabalho está estruturado em cinco capítulos principais. O primeiro aborda os objetivos, a metodologia e o contexto que levaram à elaboração deste TCC. O capítulo 2 revisa fundamentos teóricos. O capítulo 3 apresenta trabalhos relacionados. O capítulo 4 descreve a proposta da ferramenta <text:span text:style-name="T1">Polyglot Import CSV</text:span> e o capítulo 5 as atividades futuras (TCC II).</text:p>
<text:h text:style-name="Heading_20_1" text:outline-level="1"><text:bookmark-start text:name="fundamentação-teórica"/>2 FUNDAMENTAÇÃO TEÓRICA<text:bookmark-end text:name="fundamentação-teórica"/></text:h>
<text:h text:style-name="Heading_20_2" text:outline-level="2"><text:bookmark-start text:name="persistência-poliglota"/>2.1 Persistência Poliglota<text:bookmark-end text:name="persistência-poliglota"/></text:h>
<text:p text:style-name="First_20_paragraph">Em 2008, Neal Ford, em seu livro <text:span text:style-name="T1">The Productive Programmer</text:span> (Ford, 2008), introduziu o conceito de “programação poliglota” para expressar a ideia de que aplicativos devem ser desenvolvidos utilizando uma combinação de linguagens, aproveitando o fato de que diferentes linguagens são mais adequadas para lidar com diferentes problemas.</text:p>
<text:p text:style-name="Text_20_body">Uma das consequências notáveis da programação poliglota é a transição para a “persistência poliglota”, usando a mesma analogia: pode-se dizer que múltiplas tecnologias de bancos de dados podem ser utilizados como armazenamento persistente para diferentes tipos de casos de uso. Embora ainda exista uma quantidade considerável de dados gerenciados em sistemas relacionais, a abordagem predominante passa a ser a reflexão sobre como se deseja manipular os dados antes de determinar qual tecnologia é a mais adequada para essa manipulação (Fowler, 2011).</text:p>
<text:p text:style-name="Text_20_body">A persistência poliglota abrange uma variedade de formatos de dados, incluindo estruturados, semi-estruturados e não estruturados. Especificamente, dados estruturados geralmente englobam formatos como relacional, chave-valor e em grafo. Dados semi-estruturados incluem principalmente documentos JSON e XML. Por fim, dados não estruturados são representados por arquivos de texto, bem como dados de bancos colunares (Ye et al., 2023).</text:p>
<text:p text:style-name="Text_20_body">A seguir, há um exemplo de aplicação prática da persistência poliglota em um e-commerce:</text:p>
<text:list text:style-name="L3">
  <text:list-item>
    <text:p text:style-name="P3"><text:span text:style-name="T2">Dados Financeiros/Transacionais de Pagamento e Inventário de Produtos:</text:span> Esses dados podem ser armazenados em um banco de dados relacional, como o PostgreSQL.</text:p>
  </text:list-item>
  <text:list-item>
    <text:p text:style-name="P3"><text:span text:style-name="T2">Dados do Catálogo de Produtos:</text:span> Esses dados podem ser armazenados em um banco de dados NoSQL baseado em documentos, como o MongoDB.</text:p>
  </text:list-item>
  <text:list-item>
    <text:p text:style-name="P3"><text:span text:style-name="T2">Dados da Sessão do Carrinho de Compras e do Usuário:</text:span> Esses dados podem ser armazenados em um banco de dados NoSQL baseado em chave/valor, como o Redis.</text:p>
  </text:list-item>
  <text:list-item>
    <text:p text:style-name="P3"><text:span text:style-name="T2">Dados de Atividade do Usuário:</text:span> Estes dados podem ser armazenados em bancos de dados NoSQL colunares como o Apache Cassandra.</text:p>
  </text:list-item>
  <text:list-item>
    <text:p text:style-name="P3"><text:span text:style-name="T2">Dados de Recomendação:</text:span> Esses dados de recomendação podem ser armazenados em um banco de dados NoSQL baseado em grafos, como o Neo4j.</text:p>
  </text:list-item>
</text:list>
<text:p text:style-name="FigureWithCaption"><draw:frame draw:name="img1" svg:width="16.00cm" svg:height="4.80cm"><draw:image xlink:href="Pictures/0.png" xlink:type="simple" xlink:show="embed" xlink:actuate="onLoad"/></draw:frame></text:p>
<text:p text:style-name="FigureCaption">Exemplo de aplicação da Persistência Poliglota em um e-commerce.</text:p>
<text:p text:style-name="First_20_paragraph"><text:span text:style-name="T2">Fonte:</text:span> Elaborado pelo autor (2026).</text:p>
<text:p text:style-name="Text_20_body">A Figura 2 apresenta um exemplo arquitetural de persistência poliglota em ambiente de nuvem (Microsoft Azure), no qual diferentes categorias de armazenamento atendem a casos de uso distintos (catálogo, carrinho, transações, logs etc.).</text:p>
<text:p text:style-name="FigureWithCaption"><draw:frame draw:name="img2" svg:width="16.00cm" svg:height="8.88cm"><draw:image xlink:href="Pictures/1.png" xlink:type="simple" xlink:show="embed" xlink:actuate="onLoad"/></draw:frame></text:p>
<text:p text:style-name="FigureCaption">Persistência poliglota em ambiente de nuvem (Microsoft Azure).</text:p>
<text:p text:style-name="Text_20_body"><text:span text:style-name="T2">Fonte:</text:span> Microsoft (s.d.). Adaptado pelo autor (2026).</text:p>
<text:h text:style-name="Heading_20_2" text:outline-level="2"><text:bookmark-start text:name="bancos-de-dados-nosql"/>2.2 Bancos de Dados NoSQL<text:bookmark-end text:name="bancos-de-dados-nosql"/></text:h>
<text:p text:style-name="First_20_paragraph">Os bancos de dados NoSQL podem ser divididos em subcategorias com base em seus modelos de dados. Este trabalho utiliza a classificação de Hecht e Jablonski (Hecht; Jablonski, 2011), que categoriza os bancos de dados NoSQL em quatro tipos principais: chave-valor, colunas, documentos e grafos.</text:p>
<text:p text:style-name="Text_20_body">A Figura 3 ilustra esses modelos, de forma respectiva:</text:p>
<text:p text:style-name="FigureWithCaption"><draw:frame draw:name="img3" svg:width="16.00cm" svg:height="1.32cm"><draw:image xlink:href="Pictures/2.png" xlink:type="simple" xlink:show="embed" xlink:actuate="onLoad"/></draw:frame></text:p>
<text:p text:style-name="FigureCaption">Diferentes tipos de modelos de dados NoSQL.</text:p>
<text:p text:style-name="Text_20_body"><text:span text:style-name="T2">Fonte:</text:span> Elaborado pelo autor (2026).</text:p>
<text:h text:style-name="Heading_20_3" text:outline-level="3"><text:bookmark-start text:name="chave-valor"/>2.2.1 Chave-valor<text:bookmark-end text:name="chave-valor"/></text:h>
<text:p text:style-name="First_20_paragraph">Os bancos de dados de chave-valor têm um modelo de dados simples baseado em pares de chave-valor, semelhante a um mapa associativo ou dicionário. A chave identifica exclusivamente o valor e é usada para armazenar e recuperar o valor no banco de dados, funcionando como uma chave primária. O valor pode ser usado para armazenar qualquer dado arbitrário, incluindo um número inteiro, uma string, um array ou um objeto, proporcionando um modelo de dados sem esquema.</text:p>
<text:p text:style-name="Text_20_body">Além disso, os bancos de dados de chave-valor são muito eficientes no armazenamento de dados distribuídos, mas não são adequados para cenários que requerem relações ou estruturas. Qualquer funcionalidade que requeira relações, estruturas ou ambas deve ser implementada na aplicação cliente que interage com o banco de dados de chave-valor.</text:p>
<text:p text:style-name="Text_20_body">Ora, como os valores são opacos para os bancos de dados, esses não podem lidar com consultas e indexações a nível de dados, podendo realizar consultas apenas por meio de chaves.</text:p>
<text:p text:style-name="Text_20_body">Um exemplo de banco de dados chave-valor é o Redis, que mantém os dados tanto na memória como no disco.</text:p>
<text:h text:style-name="Heading_20_3" text:outline-level="3"><text:bookmark-start text:name="colunar"/>2.2.2 Colunar<text:bookmark-end text:name="colunar"/></text:h>
<text:p text:style-name="First_20_paragraph">Em bancos de dados colunares, o conjunto de dados consiste em várias linhas, cada uma identificada por uma chave de linha única, também conhecida como chave primária. Cada linha é composta por um conjunto de famílias de colunas, e diferentes linhas podem ter diferentes famílias de colunas. Semelhante aos bancos de dados de chave-valor, a chave de linha funciona como a chave, e o conjunto de famílias de colunas atua como o valor representado pela chave de linha. No entanto, cada família de colunas serve ainda como uma chave para uma ou mais colunas que contém, onde cada coluna consiste em um par nome-valor. O Cassandra oferece a funcionalidade adicional de supercolunas, que são criadas agrupando várias colunas.</text:p>
<text:p text:style-name="Text_20_body">Normalmente, os dados pertencentes a uma linha são armazenados juntos no mesmo nó do servidor. No entanto, o Cassandra pode distribuir uma única linha por vários nós de servidor usando chaves de partição compostas.</text:p>
<text:p text:style-name="Text_20_body">Nos bancos de dados de famílias de colunas, a configuração das famílias de colunas é tipicamente feita durante a inicialização. No entanto, a definição prévia de colunas não é necessária, oferecendo grande flexibilidade no armazenamento de qualquer tipo de dado.</text:p>
<text:p text:style-name="Text_20_body">Em geral, os bancos de dados de famílias de colunas fornecem capacidades de indexação e consulta mais poderosas do que os bancos de dados de chave-valor porque utilizam famílias de colunas e colunas além das chaves de linha.</text:p>
<text:p text:style-name="Text_20_body">Semelhante aos bancos de dados de chave-valor, qualquer lógica que exija relações deve ser implementada na aplicação cliente.</text:p>
<text:h text:style-name="Heading_20_3" text:outline-level="3"><text:bookmark-start text:name="documento"/>2.2.3 Documento<text:bookmark-end text:name="documento"/></text:h>
<text:p text:style-name="First_20_paragraph">Bancos de dados orientados a documento armazenam registros como documentos autocontidos, em geral em JSON ou BSON. Cada documento possui um identificador e um conjunto de campos que podem variar entre documentos da mesma coleção, o que favorece esquemas flexíveis e agregados de leitura (<text:span text:style-name="T1">read-optimized</text:span>). O MongoDB é um exemplo popular: coleções de documentos, índices secundários e pipelines de agregação permitem consultas ricas sem exigir junções (<text:span text:style-name="T1">joins</text:span>) no servidor como no modelo relacional clássico.</text:p>
<text:p text:style-name="Text_20_body">Para o <text:span text:style-name="T1">Polyglot Import CSV</text:span>, o modelo documental é adequado a entidades com subestruturas aninhadas (por exemplo, um pedido com subdocumentos <text:span text:style-name="Source_20_Text">buyer</text:span> e <text:span text:style-name="Source_20_Text">product</text:span>), desde que o CSV de origem exponha colunas planas que o mapeamento JSON agrupe em subdocumentos.</text:p>
<text:h text:style-name="Heading_20_3" text:outline-level="3"><text:bookmark-start text:name="grafo"/>2.2.4 Grafo<text:bookmark-end text:name="grafo"/></text:h>
<text:p text:style-name="First_20_paragraph">Bancos de dados em grafo representam dados como <text:span text:style-name="T2">nós</text:span> (entidades) e <text:span text:style-name="T2">arestas</text:span> (relacionamentos tipados), com propriedades em ambos. Consultas exploram caminhos e vizinhanças de forma natural, o que é útil para recomendação, detecção de fraude e redes sociais. O Neo4j utiliza a linguagem Cypher para <text:span text:style-name="Source_20_Text">MERGE</text:span>/<text:span text:style-name="Source_20_Text">CREATE</text:span> de nós e relacionamentos.</text:p>
<text:p text:style-name="Text_20_body">Na ferramenta proposta, o destino grafo exige que o usuário declare explicitamente quais colunas do CSV identificam cada rótulo de nó e quais colunas alimentam propriedades do relacionamento (por exemplo, comprador <draw:frame draw:style-name="fr1" text:anchor-type="as-char"><draw:object xlink:href="Formula-3/" xlink:type="simple" xlink:show="embed" xlink:actuate="onLoad"/></draw:frame> vendedor com atributos do pedido).</text:p>
<text:h text:style-name="Heading_20_2" text:outline-level="2"><text:bookmark-start text:name="bancos-de-dados-multimodelo-e-arquiteturas-de-persistência-poliglota"/>2.3 Bancos de Dados Multimodelo e Arquiteturas de Persistência Poliglota<text:bookmark-end text:name="bancos-de-dados-multimodelo-e-arquiteturas-de-persistência-poliglota"/></text:h>
<text:p text:style-name="First_20_paragraph">SGBDs <text:span text:style-name="T2">multimodelo</text:span> integram mais de um paradigma de dados no mesmo motor (por exemplo, documento + chave-valor + grafo), oferecendo em geral uma interface de acesso unificada — como a linguagem AQL do ArangoDB, que combina filtros sobre JSON e travessias em grafos. Essa abordagem reduz o número de produtos operados, mas concentra riscos de <text:span text:style-name="T1">lock-in</text:span> e de <text:span text:style-name="T1">tuning</text:span> em um único fornecedor (Ye et al., 2023).</text:p>
<text:p text:style-name="Text_20_body">A <text:span text:style-name="T2">persistência poliglota</text:span>, por outro lado, combina <text:span text:style-name="T2">vários SGBDs heterogêneos</text:span>, cada um escolhido pela adequação a um caso de uso (Sadalage; Fowler, 2013). Na literatura recente, essa ideia materializa-se como um <text:span text:style-name="T2">SGPD</text:span> (<text:span text:style-name="T1">Sistema de Gerenciamento Poliglota de Dados</text:span>): coordenação transparente entre tecnologias distintas, com requisitos de modelagem, expressividade de acesso (DDL/DML, consultas <text:span text:style-name="T1">key-based</text:span>, <text:span text:style-name="T1">set-based</text:span> e por caminhos em grafos) e capacidade de adaptação quando o <text:span text:style-name="T1">workload</text:span> evolui (Glake et al., 2022; Kiehn et al., 2022).</text:p>
<text:p text:style-name="Text_20_body">Tan et al. (2017) apresentam uma taxonomia útil para distinguir arquiteturas relacionadas: <text:span text:style-name="T2">BD federado</text:span> (fontes homogêneas, interface única), <text:span text:style-name="T2">BD multistore</text:span> (fontes heterogêneas, modelo canônico de consulta), <text:span text:style-name="T2">BD polystore</text:span> (fontes heterogêneas, múltiplas interfaces de acesso — exemplificadas por sistemas como o BigDAWG) e abordagens <text:span text:style-name="T2">multimodelo</text:span> (vários modelos no mesmo motor). A escolha entre essas arquiteturas não é trivial: Roy-Hubara; Shoval; Sturm (2022) propõem critérios para selecionar quais bancos usar em aplicações de persistência poliglota, destacando o trade-off entre especialização por SGBD e simplicidade operacional de um motor multimodelo.</text:p>
<text:p text:style-name="Text_20_body">Silva; Bornia; Mello (2024) conduzem revisão sistemática sobre <text:span text:style-name="T2">modelagem poliglota de dados</text:span> — como particionar um esquema conceitual em fragmentos lógicos/físicos adequados a tecnologias distintas. Esse trabalho trata da fase de <text:span text:style-name="T2">projeto</text:span>; o presente TCC complementa-o na fase <text:span text:style-name="T2">operacional</text:span>, abordando a carga inicial de dados a partir de CSV.</text:p>
<text:p text:style-name="Text_20_body">O <text:span text:style-name="T1">Polyglot Import CSV</text:span> adota explicitamente a linha da persistência poliglota (não a multimodelo): o usuário direciona entidades e filtros para PostgreSQL, Redis, MongoDB, Cassandra e Neo4j conforme o padrão de acesso desejado, alinhado ao cenário e-commerce descrito na seção 2.1 e aos casos de uso discutidos por Kiehn et al. (2022).</text:p>
<text:h text:style-name="Heading_20_1" text:outline-level="1"><text:bookmark-start text:name="trabalhos-relacionados"/>3 TRABALHOS RELACIONADOS<text:bookmark-end text:name="trabalhos-relacionados"/></text:h>
<text:h text:style-name="Heading_20_2" text:outline-level="2"><text:bookmark-start text:name="importação-de-arquivo-csv-para-um-único-sgbd"/>3.1 Importação de arquivo CSV para um único SGBD<text:bookmark-end text:name="importação-de-arquivo-csv-para-um-único-sgbd"/></text:h>
<text:h text:style-name="Heading_20_3" text:outline-level="3"><text:bookmark-start text:name="postgresql"/>3.1.1 PostgreSQL<text:bookmark-end text:name="postgresql"/></text:h>
<text:p text:style-name="First_20_paragraph">Primeiramente, você especifica a tabela com os nomes das colunas após a palavra-chave <text:span text:style-name="Source_20_Text">COPY</text:span>. A ordem das colunas deve ser a mesma que aquelas no arquivo CSV.</text:p>
<text:p text:style-name="P4">COPY nome_da_tabela(col1, col2, col3)</text:p>
<text:p text:style-name="P5">FROM 'C:/caminho_do_arquivo/dados_de_amostra.csv'</text:p>
<text:p text:style-name="P6">DELIMITER ','</text:p>
<text:p text:style-name="P7">CSV HEADER;</text:p>
<text:p text:style-name="First_20_paragraph">Caso o arquivo CSV contenha todas as colunas da tabela, você não precisa especificá-las explicitamente.</text:p>
<text:p text:style-name="Text_20_body">Segundo, você insere o caminho do arquivo CSV após a palavra-chave <text:span text:style-name="Source_20_Text">FROM</text:span>. Como o formato do arquivo é CSV, você precisa especificar <text:span text:style-name="Source_20_Text">DELIMITER</text:span>, bem como as cláusulas <text:span text:style-name="Source_20_Text">CSV</text:span>.</text:p>
<text:p text:style-name="Text_20_body">Terceiro, especifique a palavra-chave <text:span text:style-name="Source_20_Text">HEADER</text:span> para indicar que o arquivo CSV contém um cabeçalho. Quando o comando <text:span text:style-name="Source_20_Text">COPY</text:span> importa dados, ele ignora o cabeçalho do arquivo.</text:p>
<text:p text:style-name="P8">COPY nome_da_tabela</text:p>
<text:p text:style-name="P9">FROM 'C:/caminho_do_arquivo/dados_de_amostra.csv'</text:p>
<text:p text:style-name="P10">DELIMITER ','</text:p>
<text:p text:style-name="P11">CSV HEADER;</text:p>
<text:p text:style-name="First_20_paragraph">Observe que o arquivo deve ser lido diretamente pelo servidor PostgreSQL, não pela aplicação cliente. Portanto, ele deve ser acessível pela máquina do servidor PostgreSQL. Além disso, é necessário ter acesso de superusuário para executar com sucesso a instrução <text:span text:style-name="Source_20_Text">COPY</text:span>.</text:p>
<text:h text:style-name="Heading_20_3" text:outline-level="3"><text:bookmark-start text:name="redis"/>3.1.2 Redis<text:bookmark-end text:name="redis"/></text:h>
<text:p text:style-name="First_20_paragraph">A maneira preferida de importar dados em massa no Redis é gerar um arquivo de texto contendo o protocolo Redis, em formato bruto, para chamar os comandos necessários para inserir os dados requeridos.</text:p>
<text:p text:style-name="Text_20_body">Por exemplo, se precisar gerar um grande conjunto de dados com bilhões de chaves no formato “chaveN -&gt; ValorN”, deve ser um arquivo contendo os seguintes comandos no formato de protocolo Redis:</text:p>
<text:p text:style-name="P12">SET Chave0 Valor0</text:p>
<text:p text:style-name="P13">SET Chave1 Valor1</text:p>
<text:p text:style-name="P14">...</text:p>
<text:p text:style-name="P15">SET ChaveN ValorN</text:p>
<text:p text:style-name="First_20_paragraph">Uma vez criado esse arquivo, a ação restante é alimentá-lo no Redis o mais rápido possível. No passado, a maneira de fazer isso era usar o netcat com o seguinte comando.</text:p>
<text:p text:style-name="Text_20_body">Nas versões 2.6 ou posteriores do Redis, a utilidade <text:span text:style-name="Source_20_Text">redis-cli</text:span> suporta um novo modo chamado modo pipe que foi projetado para realizar o carregamento em massa.</text:p>
<text:p text:style-name="Text_20_body">Usando o modo pipe, o comando a ser executado parece o seguinte:</text:p>
<text:p text:style-name="P16">cat dados.txt | redis-cli --pipe</text:p>
<text:p text:style-name="First_20_paragraph">Isso produzirá uma saída semelhante a esta:</text:p>
<text:p text:style-name="P17">All data transferred. Waiting for the last reply...</text:p>
<text:p text:style-name="P18">Last reply received from server.</text:p>
<text:p text:style-name="P19">errors: 0, replies: 1000000</text:p>
<text:p text:style-name="First_20_paragraph">A utilidade <text:span text:style-name="Source_20_Text">redis-cli</text:span> também garantirá redirecionar apenas os erros recebidos da instância Redis para a saída padrão.</text:p>
<text:h text:style-name="Heading_20_3" text:outline-level="3"><text:bookmark-start text:name="mongodb"/>3.1.3 MongoDB<text:bookmark-end text:name="mongodb"/></text:h>
<text:p text:style-name="First_20_paragraph">Como a ferramenta <text:span text:style-name="Source_20_Text">mongoimport</text:span> é fornecida oficialmente, o processo de importar dados em formato CSV é muito simples. É uma ferramenta poderosa e fácil de usar. Segue abaixo a sua sintaxe:</text:p>
<text:p text:style-name="P20">mongoimport --db nome_do_db --collection nome_da_colecao \</text:p>
<text:p text:style-name="P21"><text:s text:c="2"/>--type csv --headerline --ignoreBlanks \</text:p>
<text:p text:style-name="P22"><text:s text:c="2"/>--file caminho/do/arquivo.csv</text:p>
<text:list text:style-name="L4">
  <text:list-item>
    <text:p text:style-name="P23"><text:span text:style-name="Source_20_Text">--db nome_do_db</text:span>: define em qual banco de dados importar os dados.</text:p>
  </text:list-item>
  <text:list-item>
    <text:p text:style-name="P23"><text:span text:style-name="Source_20_Text">--collection nome_da_colecao</text:span>: define o nome da nova coleção. Se esse parâmetro for omitido, o nome da coleção será o mesmo que o nome do arquivo CSV.</text:p>
  </text:list-item>
  <text:list-item>
    <text:p text:style-name="P23"><text:span text:style-name="Source_20_Text">--type csv</text:span>: o tipo de arquivo é CSV.</text:p>
  </text:list-item>
  <text:list-item>
    <text:p text:style-name="P23"><text:span text:style-name="Source_20_Text">--headerline</text:span>: o conteúdo da primeira linha do CSV será o nome de cada campo.</text:p>
  </text:list-item>
  <text:list-item>
    <text:p text:style-name="P23"><text:span text:style-name="Source_20_Text">--ignoreBlanks</text:span>: esse parâmetro pode ignorar valores em branco no arquivo.</text:p>
  </text:list-item>
  <text:list-item>
    <text:p text:style-name="P23"><text:span text:style-name="Source_20_Text">--file</text:span>: arquivo CSV a ser importado.</text:p>
  </text:list-item>
</text:list>
<text:h text:style-name="Heading_20_3" text:outline-level="3"><text:bookmark-start text:name="cassandra"/>3.1.4 Cassandra<text:bookmark-end text:name="cassandra"/></text:h>
<text:p text:style-name="First_20_paragraph">Importar dados CSV para o Cassandra usando <text:span text:style-name="Source_20_Text">sstableloader</text:span> envolve vários passos. O <text:span text:style-name="Source_20_Text">sstableloader</text:span> é uma ferramenta de linha de comando fornecida com o Apache Cassandra para carregar grandes volumes de dados eficientemente.</text:p>
<text:p text:style-name="Text_20_body">Certifique-se de que o arquivo CSV está no formato adequado para o Cassandra. Isso geralmente envolve garantir que os tipos de dados e as colunas correspondam ao esquema da tabela no Cassandra.</text:p>
<text:p text:style-name="Text_20_body">O <text:span text:style-name="Source_20_Text">sstableloader</text:span> requer que os dados estejam em um formato específico chamado SSTable. Para converter o CSV em SSTables, você pode usar a ferramenta <text:span text:style-name="Source_20_Text">cqlsh</text:span> fornecida com o Cassandra. Execute algo como:</text:p>
<text:p text:style-name="P24">cqlsh -e "COPY keyspace_name.table_name TO 'output_directory';"</text:p>
<text:p text:style-name="First_20_paragraph">Agora você pode usar o <text:span text:style-name="Source_20_Text">sstableloader</text:span> para carregar os dados. O comando geralmente se parece com isso:</text:p>
<text:p text:style-name="P25">sstableloader -d &lt;hostname&gt; -u &lt;username&gt; -pw &lt;password&gt; \</text:p>
<text:p text:style-name="P26"><text:s text:c="2"/>output_directory/keyspace_name/table_name</text:p>
<text:list text:style-name="L5">
  <text:list-item>
    <text:p text:style-name="P27"><text:span text:style-name="Source_20_Text">&lt;hostname&gt;</text:span>: O endereço do nó Cassandra.</text:p>
  </text:list-item>
  <text:list-item>
    <text:p text:style-name="P27"><text:span text:style-name="Source_20_Text">&lt;username&gt;</text:span>: O nome de usuário, se a autenticação estiver habilitada.</text:p>
  </text:list-item>
  <text:list-item>
    <text:p text:style-name="P27"><text:span text:style-name="Source_20_Text">&lt;password&gt;</text:span>: A senha correspondente.</text:p>
  </text:list-item>
</text:list>
<text:p text:style-name="First_20_paragraph">Este comando moverá os dados do diretório de saída para o Cassandra usando o <text:span text:style-name="Source_20_Text">sstableloader</text:span>.</text:p>
<text:h text:style-name="Heading_20_3" text:outline-level="3"><text:bookmark-start text:name="neo4j"/>3.1.5 Neo4j<text:bookmark-end text:name="neo4j"/></text:h>
<text:p text:style-name="First_20_paragraph">Usar <text:span text:style-name="Source_20_Text">neo4j-admin</text:span> para importar grandes conjuntos de dados no Neo4j envolve alguns passos. Esta ferramenta de linha de comando é projetada para importações em massa eficientes.</text:p>
<text:p text:style-name="Text_20_body">Certifique-se de que seus arquivos CSV estejam estruturados corretamente e sigam o formato necessário para nós e relacionamentos.</text:p>
<text:p text:style-name="Text_20_body">Crie um banco de dados não povoado:</text:p>
<text:p text:style-name="P28">neo4j-admin create-db --database=nome_do_seu_banco_de_dados \</text:p>
<text:p text:style-name="P29"><text:s text:c="2"/>--from=diretorio_com_arquivos_csv</text:p>
<text:p text:style-name="First_20_paragraph">Substitua <text:span text:style-name="Source_20_Text">nome_do_seu_banco_de_dados</text:span> pelo nome desejado para o novo banco de dados. A opção <text:span text:style-name="Source_20_Text">--from</text:span> especifica o diretório onde estão localizados seus arquivos CSV.</text:p>
<text:p text:style-name="Text_20_body">Execute o comando de importação com <text:span text:style-name="Source_20_Text">neo4j-admin</text:span>. O comando exato depende do seu modelo de dados, mas pode se parecer com isto:</text:p>
<text:p text:style-name="P30">neo4j-admin import --database=nome_do_seu_banco_de_dados \</text:p>
<text:p text:style-name="P31"><text:s text:c="2"/>--mode=csv \</text:p>
<text:p text:style-name="P32"><text:s text:c="2"/>--nodes:Rotulo1 nos.csv \</text:p>
<text:p text:style-name="P33"><text:s text:c="2"/>--nodes:Rotulo2 nos2.csv \</text:p>
<text:p text:style-name="P34"><text:s text:c="2"/>--relationships:TIPO_RELACIONAMENTO relacionamentos.csv</text:p>
<text:p text:style-name="First_20_paragraph">Substitua <text:span text:style-name="T1">Rotulo1</text:span>, <text:span text:style-name="T1">Rotulo2</text:span>, <text:span text:style-name="T1">nos.csv</text:span>, <text:span text:style-name="T1">nos2.csv</text:span>, <text:span text:style-name="T1">TIPO_RELACIONAMENTO</text:span> e <text:span text:style-name="T1">relacionamentos.csv</text:span> pelos seus rótulos específicos e nomes de arquivo.</text:p>
<text:h text:style-name="Heading_20_2" text:outline-level="2"><text:bookmark-start text:name="importação-de-arquivo-csv-para-sgbd-multimodelo"/>3.2 Importação de arquivo CSV para SGBD multimodelo<text:bookmark-end text:name="importação-de-arquivo-csv-para-sgbd-multimodelo"/></text:h>
<text:p text:style-name="First_20_paragraph">Ferramentas comerciais e de código aberto tratam de <text:span text:style-name="T2">migração</text:span> ou <text:span text:style-name="T2">modelagem</text:span> entre tecnologias heterogêneas, embora raramente com o foco deste TCC (um único CSV largo + regras declarativas + cinco paradigmas).</text:p>
<text:list text:style-name="L6">
  <text:list-item>
    <text:p text:style-name="P35"><text:span text:style-name="T2">ArangoDB</text:span> é um SGBD multimodelo nativo (documento/chave-valor/grafo) com <text:span text:style-name="Source_20_Text">arangoimport</text:span> para CSV; a importação é para <text:span text:style-name="T2">um</text:span> motor multimodelo, não para cinco backends independentes.</text:p>
  </text:list-item>
  <text:list-item>
    <text:p text:style-name="P35"><text:span text:style-name="Source_20_Text">mongoimport</text:span><text:span text:style-name="T2"> / </text:span><text:span text:style-name="Source_20_Text">COPY</text:span><text:span text:style-name="T2"> / </text:span><text:span text:style-name="Source_20_Text">redis-cli --pipe</text:span><text:span text:style-name="T2"> / </text:span><text:span text:style-name="Source_20_Text">cqlsh</text:span><text:span text:style-name="T2"> / </text:span><text:span text:style-name="Source_20_Text">neo4j-admin</text:span> (seção 3.1) cobrem importação <text:span text:style-name="T2">para um único</text:span> produto por vez.</text:p>
  </text:list-item>
  <text:list-item>
    <text:p text:style-name="P35"><text:span text:style-name="T2">dbcrossbar</text:span> (“dbcrossbar”, 2024) copia dados tabulares entre PostgreSQL, BigQuery, armazenamento em nuvem e CSV, incluindo conversão de esquemas; a ênfase é <text:span text:style-name="T1">pipeline</text:span> de migração, não mapeamento semântico de entidades aninhadas com filtros por valor.</text:p>
  </text:list-item>
  <text:list-item>
    <text:p text:style-name="P35"><text:span text:style-name="T2">Hackolade</text:span> (Hackolade, 2024) oferece <text:span text:style-name="T1">polyglot data modeling</text:span> com engenharia de esquema para dezenas de alvos; trata-se de <text:span text:style-name="T2">modelagem visual</text:span> e geração de artefatos, e não de um utilitário CLI único para importar um CSV operacional com validação prévia de filtros.</text:p>
  </text:list-item>
</text:list>
<text:h text:style-name="Heading_20_2" text:outline-level="2"><text:bookmark-start text:name="considerações-sobre-os-trabalhos-relacionados"/>3.3 Considerações sobre os trabalhos relacionados<text:bookmark-end text:name="considerações-sobre-os-trabalhos-relacionados"/></text:h>
<text:p text:style-name="First_20_paragraph">A literatura sobre <text:span text:style-name="T2">metamodelos unificados</text:span> para SQL e NoSQL (por exemplo, U-Schema (Berlanga et al., 2021)) e sobre <text:span text:style-name="T2">evolução de esquema</text:span> em ambientes heterogêneos (Chillón et al., 2023) informa decisões de validação e de representação de entidades no JSON de configuração, mas não substitui uma ferramenta de <text:span text:style-name="T1">bulk import</text:span> orientada a CSV.</text:p>
<text:p text:style-name="Text_20_body">Surveys recentes convergem em desafios abertos da gestão poliglota de dados: migração automatizada entre stores quando o <text:span text:style-name="T1">workload</text:span> muda, planejamento de consultas entre sistemas, gestão de esquemas multi-modelo e preservação das propriedades não funcionais de cada SGBD (Glake et al., 2022; Kiehn et al., 2022). Roy-Hubara; Shoval; Sturm (2022) tratam da <text:span text:style-name="T2">seleção de SGBDs</text:span> por fragmento de aplicação; Silva; Bornia; Mello (2024) mapeiam o estado da arte em <text:span text:style-name="T2">modelagem poliglota</text:span>. Nenhum desses trabalhos implementa, contudo, um utilitário declarativo que receba um CSV operacional único e o materialize simultaneamente em cinco paradigmas distintos com validação estática prévia.</text:p>
<text:p text:style-name="Text_20_body">Sistemas <text:span text:style-name="T2">polystore</text:span> como o BigDAWG (Duggan et al., 2017) e middlewares de portabilidade em nuvem (Wang et al., 2020) tratam de <text:span text:style-name="T2">consultas federadas</text:span> e movimentação de dados em ecossistemas complexos. Tan et al. (2017) classificam essas soluções (federado, multistore, polystore, poliglota) e avaliam transparência, autonomia e heterogeneidade — eixos nos quais importadores nativos (seção 3.1) e ferramentas de migração (seção 3.2) também divergem, mas sem convergir para um pipeline único de ingestão.</text:p>
<text:p text:style-name="Text_20_body">Ferramentas como <text:span text:style-name="T2">dbcrossbar</text:span> (“dbcrossbar”, 2024) e <text:span text:style-name="T2">Hackolade</text:span> (Hackolade, 2024) aproximam-se do domínio de integração de dados, porém com foco em <text:span text:style-name="T1">pipelines</text:span> de migração ou modelagem visual, respectivamente — não em regras declarativas sobre entidades aninhadas, filtros por valor (<text:span text:style-name="Source_20_Text">each</text:span>) e validação por JSON Schema antes de qualquer conexão com SGBDs.</text:p>
<text:p text:style-name="Text_20_body"><text:span text:style-name="T2">Lacuna identificada:</text:span> a combinação de (i) um CSV largo como fonte operacional, (ii) configuração JSON validada estaticamente, (iii) materialização distinta por paradigma (relacional, chave-valor, documento, colunar, grafo) e (iv) modo <text:span text:style-name="T1">dry-run</text:span> para revisão prévia. O <text:span text:style-name="T1">Polyglot Import CSV</text:span> ocupa essa lacuna como ferramenta de <text:span text:style-name="T2">bootstrap de persistência poliglota</text:span> — carga inicial e reprodutível de dados — enquanto middlewares e polystores assumem dados já residentes ou consultas em tempo de execução. Trabalhos futuros podem integrar a ferramenta a mecanismos de migração adaptativa descritos por Kiehn et al. (2022) e Glake et al. (2022).</text:p>
<text:h text:style-name="Heading_20_1" text:outline-level="1"><text:bookmark-start text:name="a-proposta-da-ferramenta-polyglotimportcsv"/>4 A PROPOSTA DA FERRAMENTA PolyglotImportCSV<text:bookmark-end text:name="a-proposta-da-ferramenta-polyglotimportcsv"/></text:h>
<text:h text:style-name="Heading_20_2" text:outline-level="2"><text:bookmark-start text:name="visão-geral-1"/>4.1 Visão geral<text:bookmark-end text:name="visão-geral-1"/></text:h>
<text:p text:style-name="First_20_paragraph">A ferramenta <text:span text:style-name="T2">PolyglotImportCSV</text:span> (pacote Python <text:span text:style-name="Source_20_Text">polyglot-import-csv</text:span>) lê um arquivo CSV e um arquivo de configuração JSON validado por um <text:span text:style-name="T2">JSON Schema</text:span> embutido. A CLI executa, em sequência:</text:p>
<text:list text:style-name="L7">
  <text:list-item>
    <text:p text:style-name="P36">Carregamento do CSV (como texto, para evitar erros de <text:span text:style-name="T1">parse</text:span> em campos com <text:span text:style-name="Source_20_Text">+</text:span> em timestamps).</text:p>
  </text:list-item>
  <text:list-item>
    <text:p text:style-name="P36">Inferência de <text:span text:style-name="T1">kinds</text:span> de coluna (inteiro, <text:span text:style-name="T1">float</text:span>, data/hora, texto) para validar operadores de filtro.</text:p>
  </text:list-item>
  <text:list-item>
    <text:p text:style-name="P36">Validação cruzada: colunas referenciadas existem no CSV; relacionamentos PostgreSQL e Neo4j referenciam entidades conhecidas; chaves de partição Cassandra estão declaradas quando necessário.</text:p>
  </text:list-item>
  <text:list-item>
    <text:p text:style-name="P36">Para cada backend configurado: aplicação de filtros (incluindo o operador <text:span text:style-name="Source_20_Text">each</text:span> para particionar por valor distinto), materialização de entidades e importação (ou apenas resumo em <text:span text:style-name="Source_20_Text">--dry-run</text:span>).</text:p>
  </text:list-item>
</text:list>
<text:p text:style-name="First_20_paragraph">Comando principal:</text:p>
<text:p text:style-name="P37">python -m polyglotimportcsv caminho/dados.csv \</text:p>
<text:p text:style-name="P38"><text:s text:c="2"/>--config caminho/import_config.json \</text:p>
<text:p text:style-name="P39"><text:s text:c="2"/>[--dry-run] \</text:p>
<text:p text:style-name="P40"><text:s text:c="2"/>[--create-schema / --no-create-schema] \</text:p>
<text:p text:style-name="P41"><text:s text:c="2"/>[--only postgres,redis]</text:p>
<text:h text:style-name="Heading_20_2" text:outline-level="2"><text:bookmark-start text:name="formato-de-configuração-json-schema"/>4.2 Formato de configuração (JSON Schema)<text:bookmark-end text:name="formato-de-configuração-json-schema"/></text:h>
<text:p text:style-name="First_20_paragraph">O arquivo de configuração é um JSON validado estaticamente pelo <text:span text:style-name="T2">JSON Schema</text:span> embutido em <text:span text:style-name="Source_20_Text">src/polyglotimportcsv/schemas/polyglot_import_config.schema.json</text:span> (rascunho 2020-12). A validação ocorre em <text:span text:style-name="Source_20_Text">config_parser.load_config</text:span> antes de qualquer leitura do CSV ou conexão com SGBDs. O exemplo de referência do cenário e-commerce está em <text:span text:style-name="Source_20_Text">data/ecommerce/import_config.json</text:span>, alinhado ao CSV <text:span text:style-name="Source_20_Text">data/ecommerce/ecommerce_join.csv</text:span>.</text:p>
<text:h text:style-name="Heading_20_3" text:outline-level="3"><text:bookmark-start text:name="estrutura-raiz"/>4.2.1 Estrutura raiz<text:bookmark-end text:name="estrutura-raiz"/></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Campo</text:p>
      </table:table-cell>
      <table:table-cell table:style-name="TableHeaderRowCell" office:value-type="string">
        <text:p text:style-name="Table_20_Heading">Tipo</text:p>
      </table:table-cell>
      <table:table-cell table:style-name="TableHeaderRowCell" office:value-type="string">
        <text:p text:style-name="Table_20_Heading">Obrigatóri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span text:style-name="Source_20_Text">version</text:span></text:p>
    </table:table-cell>
    <table:table-cell table:style-name="TableRowCell" office:value-type="string">
      <text:p text:style-name="Table_20_Contents">inteiro (<draw:frame draw:style-name="fr1" text:anchor-type="as-char"><draw:object xlink:href="Formula-5/" xlink:type="simple" xlink:show="embed" xlink:actuate="onLoad"/></draw:frame>)</text:p>
    </table:table-cell>
    <table:table-cell table:style-name="TableRowCell" office:value-type="string">
      <text:p text:style-name="Table_20_Contents">sim</text:p>
    </table:table-cell>
    <table:table-cell table:style-name="TableRowCell" office:value-type="string">
      <text:p text:style-name="Table_20_Contents">Versão do formato de configuração (atualmente <text:span text:style-name="Source_20_Text">1</text:span>).</text:p>
    </table:table-cell>
  </table:table-row>
  <table:table-row>
    <table:table-cell table:style-name="TableRowCell" office:value-type="string">
      <text:p text:style-name="Table_20_Contents"><text:span text:style-name="Source_20_Text">postgres</text:span></text:p>
    </table:table-cell>
    <table:table-cell table:style-name="TableRowCell" office:value-type="string">
      <text:p text:style-name="Table_20_Contents">objeto</text:p>
    </table:table-cell>
    <table:table-cell table:style-name="TableRowCell" office:value-type="string">
      <text:p text:style-name="Table_20_Contents">não</text:p>
    </table:table-cell>
    <table:table-cell table:style-name="TableRowCell" office:value-type="string">
      <text:p text:style-name="Table_20_Contents">Bloco de importação relacional.</text:p>
    </table:table-cell>
  </table:table-row>
  <table:table-row>
    <table:table-cell table:style-name="TableRowCell" office:value-type="string">
      <text:p text:style-name="Table_20_Contents"><text:span text:style-name="Source_20_Text">mongodb</text:span></text:p>
    </table:table-cell>
    <table:table-cell table:style-name="TableRowCell" office:value-type="string">
      <text:p text:style-name="Table_20_Contents">objeto</text:p>
    </table:table-cell>
    <table:table-cell table:style-name="TableRowCell" office:value-type="string">
      <text:p text:style-name="Table_20_Contents">não</text:p>
    </table:table-cell>
    <table:table-cell table:style-name="TableRowCell" office:value-type="string">
      <text:p text:style-name="Table_20_Contents">Bloco de importação documental.</text:p>
    </table:table-cell>
  </table:table-row>
  <table:table-row>
    <table:table-cell table:style-name="TableRowCell" office:value-type="string">
      <text:p text:style-name="Table_20_Contents"><text:span text:style-name="Source_20_Text">cassandra</text:span></text:p>
    </table:table-cell>
    <table:table-cell table:style-name="TableRowCell" office:value-type="string">
      <text:p text:style-name="Table_20_Contents">objeto</text:p>
    </table:table-cell>
    <table:table-cell table:style-name="TableRowCell" office:value-type="string">
      <text:p text:style-name="Table_20_Contents">não</text:p>
    </table:table-cell>
    <table:table-cell table:style-name="TableRowCell" office:value-type="string">
      <text:p text:style-name="Table_20_Contents">Bloco de importação colunar.</text:p>
    </table:table-cell>
  </table:table-row>
  <table:table-row>
    <table:table-cell table:style-name="TableRowCell" office:value-type="string">
      <text:p text:style-name="Table_20_Contents"><text:span text:style-name="Source_20_Text">redis</text:span></text:p>
    </table:table-cell>
    <table:table-cell table:style-name="TableRowCell" office:value-type="string">
      <text:p text:style-name="Table_20_Contents">objeto</text:p>
    </table:table-cell>
    <table:table-cell table:style-name="TableRowCell" office:value-type="string">
      <text:p text:style-name="Table_20_Contents">não</text:p>
    </table:table-cell>
    <table:table-cell table:style-name="TableRowCell" office:value-type="string">
      <text:p text:style-name="Table_20_Contents">Bloco de importação chave-valor.</text:p>
    </table:table-cell>
  </table:table-row>
  <table:table-row>
    <table:table-cell table:style-name="TableRowCell" office:value-type="string">
      <text:p text:style-name="Table_20_Contents"><text:span text:style-name="Source_20_Text">neo4j</text:span></text:p>
    </table:table-cell>
    <table:table-cell table:style-name="TableRowCell" office:value-type="string">
      <text:p text:style-name="Table_20_Contents">objeto</text:p>
    </table:table-cell>
    <table:table-cell table:style-name="TableRowCell" office:value-type="string">
      <text:p text:style-name="Table_20_Contents">não</text:p>
    </table:table-cell>
    <table:table-cell table:style-name="TableRowCell" office:value-type="string">
      <text:p text:style-name="Table_20_Contents">Bloco de importação em grafo.</text:p>
    </table:table-cell>
  </table:table-row>
</table:table>
<text:p text:style-name="First_20_paragraph">Propriedades adicionais na raiz são <text:span text:style-name="T2">rejeitadas</text:span> (<text:span text:style-name="Source_20_Text">additionalProperties: false</text:span>), o que impede erros de digitação como <text:span text:style-name="Source_20_Text">postgress</text:span> passarem despercebidos.</text:p>
<text:h text:style-name="Heading_20_3" text:outline-level="3"><text:bookmark-start text:name="mapeamento-de-colunas-columnspec"/>4.2.2 Mapeamento de colunas (<text:span text:style-name="Source_20_Text">columnSpec</text:span>)<text:bookmark-end text:name="mapeamento-de-colunas-columnspec"/></text:h>
<text:p text:style-name="First_20_paragraph">Cada <text:span text:style-name="T2">folha</text:span> do mapa <text:span text:style-name="Source_20_Text">columns</text:span> descreve como um valor do CSV alimenta um atributo no destino. A chave JSON no mapa <text:span text:style-name="Source_20_Text">columns</text:span> identifica o campo por omissão; quando o cabeçalho CSV ou o nome no schema diferem dessa chave, usam-se os campos explícitos abaixo.</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ampo</text:p>
      </table:table-cell>
      <table:table-cell table:style-name="TableHeaderRowCell" office:value-type="string">
        <text:p text:style-name="Table_20_Heading">Tipo</text:p>
      </table:table-cell>
      <table:table-cell table:style-name="TableHeaderRowCell" office:value-type="string">
        <text:p text:style-name="Table_20_Heading">Obrigatóri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span text:style-name="Source_20_Text">csv_column</text:span></text:p>
    </table:table-cell>
    <table:table-cell table:style-name="TableRowCell" office:value-type="string">
      <text:p text:style-name="Table_20_Contents"><text:span text:style-name="T1">string</text:span> ou inteiro (<draw:frame draw:style-name="fr1" text:anchor-type="as-char"><draw:object xlink:href="Formula-7/" xlink:type="simple" xlink:show="embed" xlink:actuate="onLoad"/></draw:frame>)</text:p>
    </table:table-cell>
    <table:table-cell table:style-name="TableRowCell" office:value-type="string">
      <text:p text:style-name="Table_20_Contents">não</text:p>
    </table:table-cell>
    <table:table-cell table:style-name="TableRowCell" office:value-type="string">
      <text:p text:style-name="Table_20_Contents">Nome do cabeçalho CSV <text:span text:style-name="T2">ou</text:span> índice da coluna (base 0). Se omitido, a chave JSON é o cabeçalho CSV.</text:p>
    </table:table-cell>
  </table:table-row>
  <table:table-row>
    <table:table-cell table:style-name="TableRowCell" office:value-type="string">
      <text:p text:style-name="Table_20_Contents"><text:span text:style-name="Source_20_Text">schema_column</text:span></text:p>
    </table:table-cell>
    <table:table-cell table:style-name="TableRowCell" office:value-type="string">
      <text:p text:style-name="Table_20_Contents"><text:span text:style-name="T1">string</text:span></text:p>
    </table:table-cell>
    <table:table-cell table:style-name="TableRowCell" office:value-type="string">
      <text:p text:style-name="Table_20_Contents">não</text:p>
    </table:table-cell>
    <table:table-cell table:style-name="TableRowCell" office:value-type="string">
      <text:p text:style-name="Table_20_Contents">Nome do atributo no SGBD destino. Se omitido, usa-se a chave JSON.</text:p>
    </table:table-cell>
  </table:table-row>
  <table:table-row>
    <table:table-cell table:style-name="TableRowCell" office:value-type="string">
      <text:p text:style-name="Table_20_Contents"><text:span text:style-name="Source_20_Text">is_key</text:span></text:p>
    </table:table-cell>
    <table:table-cell table:style-name="TableRowCell" office:value-type="string">
      <text:p text:style-name="Table_20_Contents">booleano</text:p>
    </table:table-cell>
    <table:table-cell table:style-name="TableRowCell" office:value-type="string">
      <text:p text:style-name="Table_20_Contents">não</text:p>
    </table:table-cell>
    <table:table-cell table:style-name="TableRowCell" office:value-type="string">
      <text:p text:style-name="Table_20_Contents">Marca chave primária, chave de <text:span text:style-name="Source_20_Text">MERGE</text:span> (Neo4j) ou chave Redis.</text:p>
    </table:table-cell>
  </table:table-row>
  <table:table-row>
    <table:table-cell table:style-name="TableRowCell" office:value-type="string">
      <text:p text:style-name="Table_20_Contents"><text:span text:style-name="Source_20_Text">db_type</text:span></text:p>
    </table:table-cell>
    <table:table-cell table:style-name="TableRowCell" office:value-type="string">
      <text:p text:style-name="Table_20_Contents"><text:span text:style-name="T1">string</text:span></text:p>
    </table:table-cell>
    <table:table-cell table:style-name="TableRowCell" office:value-type="string">
      <text:p text:style-name="Table_20_Contents">não</text:p>
    </table:table-cell>
    <table:table-cell table:style-name="TableRowCell" office:value-type="string">
      <text:p text:style-name="Table_20_Contents">Tipo SQL/CQL para geração de DDL (PostgreSQL, Cassandra).</text:p>
    </table:table-cell>
  </table:table-row>
  <table:table-row>
    <table:table-cell table:style-name="TableRowCell" office:value-type="string">
      <text:p text:style-name="Table_20_Contents"><text:span text:style-name="Source_20_Text">db_column</text:span> / <text:span text:style-name="Source_20_Text">alias_db</text:span></text:p>
    </table:table-cell>
    <table:table-cell table:style-name="TableRowCell" office:value-type="string">
      <text:p text:style-name="Table_20_Contents"><text:span text:style-name="T1">string</text:span></text:p>
    </table:table-cell>
    <table:table-cell table:style-name="TableRowCell" office:value-type="string">
      <text:p text:style-name="Table_20_Contents">não</text:p>
    </table:table-cell>
    <table:table-cell table:style-name="TableRowCell" office:value-type="string">
      <text:p text:style-name="Table_20_Contents">Sinónimos <text:span text:style-name="T2">depreciados</text:span> de <text:span text:style-name="Source_20_Text">schema_column</text:span> (mantidos por retrocompatibilidade).</text:p>
    </table:table-cell>
  </table:table-row>
</table:table>
<text:p text:style-name="First_20_paragraph"><text:span text:style-name="T2">Forma mínima</text:span> — coluna CSV e destino com o mesmo nome:</text:p>
<text:p text:style-name="P42">"product_id": {}</text:p>
<text:p text:style-name="First_20_paragraph"><text:span text:style-name="T2">Renomeação explícita</text:span> — cabeçalho CSV distinto do atributo no schema:</text:p>
<text:p text:style-name="P43">"timestamp": { "schema_column": "event_time" }</text:p>
<text:p text:style-name="First_20_paragraph"><text:span text:style-name="T2">Índice numérico</text:span> — útil quando o CSV não possui cabeçalho ou o nome é ambíguo:</text:p>
<text:p text:style-name="P44">"logical_key": { "csv_column": 0, "is_key": true }</text:p>
<text:p text:style-name="First_20_paragraph"><text:span text:style-name="T2">Chave lógica distinta do CSV e do schema:</text:span></text:p>
<text:p text:style-name="P45">"redis_key": { "csv_column": "user_id", "schema_column": "session_id", "is_key": true }</text:p>
<text:h text:style-name="Heading_20_3" text:outline-level="3"><text:bookmark-start text:name="entidade-entity"/>4.2.3 Entidade (<text:span text:style-name="Source_20_Text">entity</text:span>)<text:bookmark-end text:name="entidade-entity"/></text:h>
<text:p text:style-name="First_20_paragraph">Uma <text:span text:style-name="T2">entidade</text:span> representa um alvo lógico: tabela (PostgreSQL/Cassandra), coleção (MongoDB), rótulo de nó (Neo4j) ou entidade Redi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ampo</text:p>
      </table:table-cell>
      <table:table-cell table:style-name="TableHeaderRowCell" office:value-type="string">
        <text:p text:style-name="Table_20_Heading">Tipo</text:p>
      </table:table-cell>
      <table:table-cell table:style-name="TableHeaderRowCell" office:value-type="string">
        <text:p text:style-name="Table_20_Heading">Obrigatóri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span text:style-name="Source_20_Text">columns</text:span></text:p>
    </table:table-cell>
    <table:table-cell table:style-name="TableRowCell" office:value-type="string">
      <text:p text:style-name="Table_20_Contents">objeto recursivo</text:p>
    </table:table-cell>
    <table:table-cell table:style-name="TableRowCell" office:value-type="string">
      <text:p text:style-name="Table_20_Contents">sim</text:p>
    </table:table-cell>
    <table:table-cell table:style-name="TableRowCell" office:value-type="string">
      <text:p text:style-name="Table_20_Contents">Mapa de mapeamentos; ver abaixo.</text:p>
    </table:table-cell>
  </table:table-row>
  <table:table-row>
    <table:table-cell table:style-name="TableRowCell" office:value-type="string">
      <text:p text:style-name="Table_20_Contents"><text:span text:style-name="Source_20_Text">filters</text:span></text:p>
    </table:table-cell>
    <table:table-cell table:style-name="TableRowCell" office:value-type="string">
      <text:p text:style-name="Table_20_Contents">lista</text:p>
    </table:table-cell>
    <table:table-cell table:style-name="TableRowCell" office:value-type="string">
      <text:p text:style-name="Table_20_Contents">não</text:p>
    </table:table-cell>
    <table:table-cell table:style-name="TableRowCell" office:value-type="string">
      <text:p text:style-name="Table_20_Contents">Predicados sobre o CSV completo antes da materialização.</text:p>
    </table:table-cell>
  </table:table-row>
  <table:table-row>
    <table:table-cell table:style-name="TableRowCell" office:value-type="string">
      <text:p text:style-name="Table_20_Contents"><text:span text:style-name="Source_20_Text">cassandra_partition</text:span></text:p>
    </table:table-cell>
    <table:table-cell table:style-name="TableRowCell" office:value-type="string">
      <text:p text:style-name="Table_20_Contents">lista de <text:span text:style-name="T1">strings</text:span></text:p>
    </table:table-cell>
    <table:table-cell table:style-name="TableRowCell" office:value-type="string">
      <text:p text:style-name="Table_20_Contents">não</text:p>
    </table:table-cell>
    <table:table-cell table:style-name="TableRowCell" office:value-type="string">
      <text:p text:style-name="Table_20_Contents">Colunas CSV que formam a chave de partição.</text:p>
    </table:table-cell>
  </table:table-row>
  <table:table-row>
    <table:table-cell table:style-name="TableRowCell" office:value-type="string">
      <text:p text:style-name="Table_20_Contents"><text:span text:style-name="Source_20_Text">cassandra_cluster</text:span></text:p>
    </table:table-cell>
    <table:table-cell table:style-name="TableRowCell" office:value-type="string">
      <text:p text:style-name="Table_20_Contents">lista de <text:span text:style-name="T1">strings</text:span></text:p>
    </table:table-cell>
    <table:table-cell table:style-name="TableRowCell" office:value-type="string">
      <text:p text:style-name="Table_20_Contents">não</text:p>
    </table:table-cell>
    <table:table-cell table:style-name="TableRowCell" office:value-type="string">
      <text:p text:style-name="Table_20_Contents">Colunas de agrupamento (<text:span text:style-name="T1">clustering</text:span>).</text:p>
    </table:table-cell>
  </table:table-row>
  <table:table-row>
    <table:table-cell table:style-name="TableRowCell" office:value-type="string">
      <text:p text:style-name="Table_20_Contents"><text:span text:style-name="Source_20_Text">nested</text:span></text:p>
    </table:table-cell>
    <table:table-cell table:style-name="TableRowCell" office:value-type="string">
      <text:p text:style-name="Table_20_Contents">objeto</text:p>
    </table:table-cell>
    <table:table-cell table:style-name="TableRowCell" office:value-type="string">
      <text:p text:style-name="Table_20_Contents">não</text:p>
    </table:table-cell>
    <table:table-cell table:style-name="TableRowCell" office:value-type="string">
      <text:p text:style-name="Table_20_Contents"><text:span text:style-name="T2">Depreciado</text:span> — preferir chaves aninhadas dentro de <text:span text:style-name="Source_20_Text">columns</text:span>.</text:p>
    </table:table-cell>
  </table:table-row>
</table:table>
<text:p text:style-name="First_20_paragraph"><text:span text:style-name="T2">Aninhamento MongoDB via chaves JSON:</text:span> objetos aninhados em <text:span text:style-name="Source_20_Text">columns</text:span> produzem subdocumentos BSON, espelhando a estrutura de um documento JSON:</text:p>
<text:p text:style-name="P46">"columns": {</text:p>
<text:p text:style-name="P47"><text:s text:c="2"/>"product_id": {},</text:p>
<text:p text:style-name="P48"><text:s text:c="2"/>"category": {</text:p>
<text:p text:style-name="P49"><text:s text:c="4"/>"category_id": {},</text:p>
<text:p text:style-name="P50"><text:s text:c="4"/>"category_name": {}</text:p>
<text:p text:style-name="P51"><text:s text:c="2"/>},</text:p>
<text:p text:style-name="P52"><text:s text:c="2"/>"stock": {</text:p>
<text:p text:style-name="P53"><text:s text:c="4"/>"quantity_available": {},</text:p>
<text:p text:style-name="P54"><text:s text:c="4"/>"last_restock_date": {}</text:p>
<text:p text:style-name="P55"><text:s text:c="2"/>}</text:p>
<text:p text:style-name="P56">}</text:p>
<text:p text:style-name="First_20_paragraph">Backends <text:span text:style-name="T2">planos</text:span> (PostgreSQL, Redis, Cassandra, Neo4j) aceitam apenas folhas em <text:span text:style-name="Source_20_Text">columns</text:span>; aninhamento é rejeitado na validação cruzada.</text:p>
<text:p text:style-name="Text_20_body"><text:span text:style-name="T2">Filtros</text:span> — cada item exige <text:span text:style-name="Source_20_Text">column</text:span> e <text:span text:style-name="Source_20_Text">operator</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Operador</text:p>
      </table:table-cell>
      <table:table-cell table:style-name="TableHeaderRowCell" office:value-type="string">
        <text:p text:style-name="Table_20_Heading"><text:span text:style-name="Source_20_Text">value</text:span></text:p>
      </table:table-cell>
      <table:table-cell table:style-name="TableHeaderRowCell" office:value-type="string">
        <text:p text:style-name="Table_20_Heading">Efeito</text:p>
      </table:table-cell>
    </table:table-row>
  </table:table-header-rows>
  <table:table-row>
    <table:table-cell table:style-name="TableRowCell" office:value-type="string">
      <text:p text:style-name="Table_20_Contents"><text:span text:style-name="Source_20_Text">==</text:span>, <text:span text:style-name="Source_20_Text">!=</text:span>, <text:span text:style-name="Source_20_Text">&gt;</text:span>, <text:span text:style-name="Source_20_Text">&lt;</text:span>, <text:span text:style-name="Source_20_Text">&gt;=</text:span>, <text:span text:style-name="Source_20_Text">&lt;=</text:span></text:p>
    </table:table-cell>
    <table:table-cell table:style-name="TableRowCell" office:value-type="string">
      <text:p text:style-name="Table_20_Contents">escalar</text:p>
    </table:table-cell>
    <table:table-cell table:style-name="TableRowCell" office:value-type="string">
      <text:p text:style-name="Table_20_Contents">Comparação sobre a coluna CSV.</text:p>
    </table:table-cell>
  </table:table-row>
  <table:table-row>
    <table:table-cell table:style-name="TableRowCell" office:value-type="string">
      <text:p text:style-name="Table_20_Contents"><text:span text:style-name="Source_20_Text">in</text:span>, <text:span text:style-name="Source_20_Text">not_in</text:span></text:p>
    </table:table-cell>
    <table:table-cell table:style-name="TableRowCell" office:value-type="string">
      <text:p text:style-name="Table_20_Contents">lista</text:p>
    </table:table-cell>
    <table:table-cell table:style-name="TableRowCell" office:value-type="string">
      <text:p text:style-name="Table_20_Contents">Pertinência ao conjunto.</text:p>
    </table:table-cell>
  </table:table-row>
  <table:table-row>
    <table:table-cell table:style-name="TableRowCell" office:value-type="string">
      <text:p text:style-name="Table_20_Contents"><text:span text:style-name="Source_20_Text">each</text:span></text:p>
    </table:table-cell>
    <table:table-cell table:style-name="TableRowCell" office:value-type="string">
      <text:p text:style-name="Table_20_Contents">escalar (opcional)</text:p>
    </table:table-cell>
    <table:table-cell table:style-name="TableRowCell" office:value-type="string">
      <text:p text:style-name="Table_20_Contents">Particiona a entidade por valores distintos da coluna; sufixo opcional em <text:span text:style-name="Source_20_Text">target_suffix</text:span>.</text:p>
    </table:table-cell>
  </table:table-row>
</table:table>
<text:p text:style-name="First_20_paragraph">Exemplo do e-commerce — apenas linhas de estoque alimentam o inventário:</text:p>
<text:p text:style-name="P57">"filters": [{ "column": "action", "operator": "==", "value": "stock" }]</text:p>
<text:h text:style-name="Heading_20_3" text:outline-level="3"><text:bookmark-start text:name="blocos-por-backend"/>4.2.4 Blocos por backend<text:bookmark-end text:name="blocos-por-backend"/></text:h>
<text:p text:style-name="First_20_paragraph">Cada backend opcional contém <text:span text:style-name="Source_20_Text">connection</text:span> (credenciais) e <text:span text:style-name="Source_20_Text">entities</text:span>. PostgreSQL e Neo4j admitem ainda <text:span text:style-name="Source_20_Text">relationships</text:span>.</text:p>
<text:p text:style-name="Text_20_body"><text:span text:style-name="T2">PostgreSQL</text:span> — <text:span text:style-name="Source_20_Text">connection</text:span> (host, port, database, user, password), <text:span text:style-name="Source_20_Text">schema</text:span> (padrão <text:span text:style-name="Source_20_Text">public</text:span>), entidades planas com <text:span text:style-name="Source_20_Text">db_type</text:span>, e <text:span text:style-name="Source_20_Text">relationships</text:span> para chaves estrangeiras:</text:p>
<text:p text:style-name="P58">"relationships": {</text:p>
<text:p text:style-name="P59"><text:s text:c="2"/>"product_category": {</text:p>
<text:p text:style-name="P60"><text:s text:c="4"/>"from": "products",</text:p>
<text:p text:style-name="P61"><text:s text:c="4"/>"to": "categories",</text:p>
<text:p text:style-name="P62"><text:s text:c="4"/>"foreign_key": "category_id",</text:p>
<text:p text:style-name="P63"><text:s text:c="4"/>"references_key": "category_id"</text:p>
<text:p text:style-name="P64"><text:s text:c="2"/>}</text:p>
<text:p text:style-name="P65">}</text:p>
<text:p text:style-name="First_20_paragraph"><text:span text:style-name="T2">MongoDB</text:span> — <text:span text:style-name="Source_20_Text">connection.uri</text:span>, <text:span text:style-name="Source_20_Text">connection.database</text:span>; entidades com <text:span text:style-name="Source_20_Text">columns</text:span> recursivos para subdocumentos.</text:p>
<text:p text:style-name="Text_20_body"><text:span text:style-name="T2">Cassandra</text:span> — <text:span text:style-name="Source_20_Text">connection.hosts</text:span>, <text:span text:style-name="Source_20_Text">keyspace</text:span>; entidades com <text:span text:style-name="Source_20_Text">cassandra_partition</text:span> / <text:span text:style-name="Source_20_Text">cassandra_cluster</text:span> e renomeação via <text:span text:style-name="Source_20_Text">schema_column</text:span>:</text:p>
<text:p text:style-name="P66">"timestamp": { "schema_column": "event_time" },</text:p>
<text:p text:style-name="P67">"cassandra_partition": ["user_id"],</text:p>
<text:p text:style-name="P68">"cassandra_cluster": ["timestamp"]</text:p>
<text:p text:style-name="First_20_paragraph"><text:span text:style-name="T2">Redis</text:span> — exatamente uma coluna <text:span text:style-name="Source_20_Text">is_key</text:span> por entidade; demais campos compõem o valor JSON.</text:p>
<text:p text:style-name="Text_20_body"><text:span text:style-name="T2">Neo4j</text:span> — nós em <text:span text:style-name="Source_20_Text">entities</text:span> (um <text:span text:style-name="Source_20_Text">is_key</text:span> cada); <text:span text:style-name="Source_20_Text">relationships</text:span> declaram arestas tipadas com propriedades opcionais:</text:p>
<text:p text:style-name="P69">"relationships": {</text:p>
<text:p text:style-name="P70"><text:s text:c="2"/>"PURCHASED": {</text:p>
<text:p text:style-name="P71"><text:s text:c="4"/>"from": "User",</text:p>
<text:p text:style-name="P72"><text:s text:c="4"/>"to": "Product",</text:p>
<text:p text:style-name="P73"><text:s text:c="4"/>"type": "PURCHASED",</text:p>
<text:p text:style-name="P74"><text:s text:c="4"/>"columns": { "order_number": { "is_key": true }, "quantity": {} }</text:p>
<text:p text:style-name="P75"><text:s text:c="2"/>}</text:p>
<text:p text:style-name="P76">}</text:p>
<text:h text:style-name="Heading_20_3" text:outline-level="3"><text:bookmark-start text:name="validação-estática-e-cruzada"/>4.2.5 Validação estática e cruzada<text:bookmark-end text:name="validação-estática-e-cruzada"/></text:h>
<text:p text:style-name="First_20_paragraph">A validação ocorre em <text:span text:style-name="T2">duas camadas</text:span>:</text:p>
<text:list text:style-name="L8">
  <text:list-item>
    <text:p text:style-name="P77"><text:span text:style-name="T2">JSON Schema</text:span> (<text:span text:style-name="Source_20_Text">config_parser.validate_config</text:span>) — sintaxe, tipos e propriedades permitidas.</text:p>
  </text:list-item>
  <text:list-item>
    <text:p text:style-name="P77"><text:span text:style-name="T2">Validação cruzada CSV</text:span> (<text:span text:style-name="Source_20_Text">validation.validate_import_config</text:span>) — colunas referenciadas existem no CSV; filtros coerentes; FKs PostgreSQL e arestas Neo4j referenciam entidades válidas; backends planos não usam <text:span text:style-name="Source_20_Text">columns</text:span> aninhados; índices <text:span text:style-name="Source_20_Text">csv_column</text:span> dentro do intervalo.</text:p>
  </text:list-item>
</text:list>
<text:p text:style-name="First_20_paragraph">Qualquer falha levanta <text:span text:style-name="Source_20_Text">BusinessException</text:span> e <text:span text:style-name="T2">impede</text:span> o início da importação, conforme o objetivo específico do TCC.</text:p>
<text:h text:style-name="Heading_20_2" text:outline-level="2"><text:bookmark-start text:name="algoritmo-de-execução-da-importação"/>4.3 Algoritmo de execução da importação<text:bookmark-end text:name="algoritmo-de-execução-da-importação"/></text:h>
<text:p text:style-name="First_20_paragraph">O núcleo da ferramenta está em <text:span text:style-name="Source_20_Text">runner.run_import</text:span>. A seguir descreve-se o fluxo de alto nível desde a linha de comando até a persistência em cada SGBD.</text:p>
<text:h text:style-name="Heading_20_3" text:outline-level="3"><text:bookmark-start text:name="fases-do-algoritmo"/>4.3.1 Fases do algoritmo<text:bookmark-end text:name="fases-do-algoritmo"/></text:h>
<text:list text:style-name="L9">
  <text:list-item>
    <text:p text:style-name="P78"><text:span text:style-name="T2">Entrada</text:span> — caminho do CSV, caminho do JSON de configuração e flags: <text:span text:style-name="Source_20_Text">--dry-run</text:span>, <text:span text:style-name="Source_20_Text">--create-schema</text:span> / <text:span text:style-name="Source_20_Text">--no-create-schema</text:span>, <text:span text:style-name="Source_20_Text">--only</text:span> (lista de backends).</text:p>
  </text:list-item>
  <text:list-item>
    <text:p text:style-name="P78"><text:span text:style-name="T2">Carregar configuração</text:span> — <text:span text:style-name="Source_20_Text">load_config</text:span>: parse JSON + <text:span text:style-name="Source_20_Text">jsonschema.validate</text:span> contra o schema embutido.</text:p>
  </text:list-item>
  <text:list-item>
    <text:p text:style-name="P78"><text:span text:style-name="T2">Carregar CSV</text:span> — <text:span text:style-name="Source_20_Text">load_csv_with_inference</text:span>: leitura com <text:span text:style-name="Source_20_Text">dtype=str</text:span> (evita erros de <text:span text:style-name="T1">parse</text:span> em timestamps com <text:span text:style-name="Source_20_Text">+</text:span>) e inferência de <text:span text:style-name="T1">kind</text:span> por coluna (<text:span text:style-name="Source_20_Text">integer</text:span>, <text:span text:style-name="Source_20_Text">float</text:span>, <text:span text:style-name="Source_20_Text">datetime</text:span>, <text:span text:style-name="Source_20_Text">string</text:span>, <text:span text:style-name="Source_20_Text">empty</text:span>).</text:p>
  </text:list-item>
  <text:list-item>
    <text:p text:style-name="P78"><text:span text:style-name="T2">Validar config × CSV</text:span> — <text:span text:style-name="Source_20_Text">validate_import_config</text:span>: checagens semânticas descritas na seção 4.2.5.</text:p>
  </text:list-item>
  <text:list-item>
    <text:p text:style-name="P78"><text:span text:style-name="T2">Para cada backend</text:span> presente na configuração e não filtrado por <text:span text:style-name="Source_20_Text">--only</text:span>:</text:p>
    <text:list text:style-name="L10">
      <text:list-item>
        <text:p text:style-name="P79"><text:span text:style-name="T2">Para cada entidade</text:span> declarada em <text:span text:style-name="Source_20_Text">entities</text:span>:</text:p><text:list text:style-name="L11">
          <text:list-item>
            <text:p text:style-name="P80">Aplicar filtros (exceto operador <text:span text:style-name="Source_20_Text">each</text:span>) sobre o DataFrame completo.</text:p>
          </text:list-item>
          <text:list-item>
            <text:p text:style-name="P80">Expandir partições <text:span text:style-name="Source_20_Text">each</text:span> (opcional) — uma entidade lógica pode gerar várias tabelas/coleções com sufixo.</text:p>
          </text:list-item>
          <text:list-item>
            <text:p text:style-name="P80"><text:span text:style-name="T2">Materializar</text:span> registros conforme o paradigma do backend:</text:p><text:list text:style-name="L12">
              <text:list-item>
                <text:p text:style-name="P81">PostgreSQL / Cassandra: <text:span text:style-name="Source_20_Text">flatten_entity_dataframe</text:span> — seleção, renomeação, deduplicação por <text:span text:style-name="Source_20_Text">is_key</text:span>.</text:p>
              </text:list-item>
              <text:list-item>
                <text:p text:style-name="P81">MongoDB: <text:span text:style-name="Source_20_Text">mongo_document_from_row</text:span> — documento recursivo a partir de <text:span text:style-name="Source_20_Text">columns</text:span> aninhados.</text:p>
              </text:list-item>
              <text:list-item>
                <text:p text:style-name="P81">Redis: <text:span text:style-name="Source_20_Text">redis_payload_from_row</text:span> — par (chave, valor JSON).</text:p>
              </text:list-item>
              <text:list-item>
                <text:p text:style-name="P81">Neo4j: propriedades de nós; depois <text:span text:style-name="Source_20_Text">MERGE</text:span> de arestas a partir de <text:span text:style-name="Source_20_Text">relationships</text:span>.</text:p>
              </text:list-item>
            </text:list>
          </text:list-item>
          <text:list-item>
            <text:p text:style-name="P80">Conectar ao SGBD (omitido em <text:span text:style-name="Source_20_Text">--dry-run</text:span>).</text:p>
          </text:list-item>
          <text:list-item>
            <text:p text:style-name="P80">Criar schema se <text:span text:style-name="Source_20_Text">--create-schema</text:span> (DDL PostgreSQL/Cassandra).</text:p>
          </text:list-item>
          <text:list-item>
            <text:p text:style-name="P80">Persistir (<text:span text:style-name="Source_20_Text">INSERT</text:span>, <text:span text:style-name="Source_20_Text">insert_many</text:span>, <text:span text:style-name="Source_20_Text">SET</text:span>, <text:span text:style-name="Source_20_Text">MERGE</text:span> Cypher, etc.).</text:p>
          </text:list-item>
        </text:list>
      </text:list-item>
    </text:list>
  </text:list-item>
  <text:list-item>
    <text:p text:style-name="P78"><text:span text:style-name="T2">Saída</text:span> — linhas de log com contagens por entidade/backend.</text:p>
  </text:list-item>
</text:list>
<text:h text:style-name="Heading_20_3" text:outline-level="3"><text:bookmark-start text:name="pseudocódigo"/>4.3.2 Pseudocódigo<text:bookmark-end text:name="pseudocódigo"/></text:h>
<text:p text:style-name="P82">função run_import(csv_path, config_path, dry_run, create_schema, only):</text:p>
<text:p text:style-name="P83"><text:s text:c="4"/>config ← load_config(config_path)</text:p>
<text:p text:style-name="P84"><text:s text:c="4"/>df, kinds ← load_csv_with_inference(csv_path)</text:p>
<text:p text:style-name="P85"><text:s text:c="4"/>validate_import_config(config, df, kinds)</text:p>
<text:p text:style-name="P86"/>
<text:p text:style-name="P87"><text:s text:c="4"/>para cada backend em (postgres, mongodb, cassandra, redis, neo4j):</text:p>
<text:p text:style-name="P88"><text:s text:c="8"/>se backend nao esta em config ou nao esta em only: continuar</text:p>
<text:p text:style-name="P89"><text:s text:c="8"/>linhas ← run_{backend}_import(config[backend], df, kinds,</text:p>
<text:p text:style-name="P90"><text:s text:c="39"/>dry_run, create_schema)</text:p>
<text:p text:style-name="P91"><text:s text:c="8"/>registrar linhas no log</text:p>
<text:p text:style-name="First_20_paragraph">Dentro de cada <text:span text:style-name="Source_20_Text">run_*_import</text:span>, para cada entidade:</text:p>
<text:p text:style-name="P92"><text:s text:c="4"/>df_filtrado ← apply_filters(df, filtros_sem_each)</text:p>
<text:p text:style-name="P93"><text:s text:c="4"/>para cada (nome_partição, df_parte) em expand_each(...):</text:p>
<text:p text:style-name="P94"><text:s text:c="8"/>registros ← materializar(df_parte, entidade, backend)</text:p>
<text:p text:style-name="P95"><text:s text:c="8"/>se não dry_run: conectar, DDL se necessário, gravar registros</text:p>
<text:h text:style-name="Heading_20_3" text:outline-level="3"><text:bookmark-start text:name="diagrama-do-fluxo"/>4.3.3 Diagrama do fluxo<text:bookmark-end text:name="diagrama-do-fluxo"/></text:h>
<text:p text:style-name="First_20_paragraph">A Figura 4 resume o pipeline de execução descrito acima. O diagrama-fonte Mermaid encontra-se em <text:span text:style-name="Source_20_Text">docs-tcc/images/figure4-import-algorithm.mmd</text:span> para futuras revisões.</text:p>
<text:p text:style-name="FigureWithCaption"><draw:frame draw:name="img4" svg:width="13.79cm" svg:height="20.00cm"><draw:image xlink:href="Pictures/9.png" xlink:type="simple" xlink:show="embed" xlink:actuate="onLoad"/></draw:frame></text:p>
<text:p text:style-name="FigureCaption">Algoritmo de execução da importação Polyglot Import CSV.</text:p>
<text:p text:style-name="Text_20_body"><text:span text:style-name="T2">Fonte:</text:span> Elaborado pelo autor (2026).</text:p>
<text:h text:style-name="Heading_20_3" text:outline-level="3"><text:bookmark-start text:name="exemplo-uma-linha-actionstock-no-e-commerce"/>4.3.4 Exemplo: uma linha <text:span text:style-name="Source_20_Text">action=stock</text:span> no e-commerce<text:bookmark-end text:name="exemplo-uma-linha-actionstock-no-e-commerce"/></text:h>
<text:p text:style-name="First_20_paragraph">Considere uma linha do <text:span text:style-name="Source_20_Text">ecommerce_join.csv</text:span> com <text:span text:style-name="Source_20_Text">action = stock</text:span>, contendo <text:span text:style-name="Source_20_Text">product_id</text:span>, <text:span text:style-name="Source_20_Text">category_id</text:span>, <text:span text:style-name="Source_20_Text">quantity_available</text:span>, <text:span text:style-name="Source_20_Text">timestamp</text:span>, etc.</text:p>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Backend</text:p>
      </table:table-cell>
      <table:table-cell table:style-name="TableHeaderRowCell" office:value-type="string">
        <text:p text:style-name="Table_20_Heading">Entidade</text:p>
      </table:table-cell>
      <table:table-cell table:style-name="TableHeaderRowCell" office:value-type="string">
        <text:p text:style-name="Table_20_Heading">Filtro aplicado</text:p>
      </table:table-cell>
      <table:table-cell table:style-name="TableHeaderRowCell" office:value-type="string">
        <text:p text:style-name="Table_20_Heading">Saída materializada</text:p>
      </table:table-cell>
    </table:table-row>
  </table:table-header-rows>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inventory</text:span></text:p>
    </table:table-cell>
    <table:table-cell table:style-name="TableRowCell" office:value-type="string">
      <text:p text:style-name="Table_20_Contents"><text:span text:style-name="Source_20_Text">action == stock</text:span></text:p>
    </table:table-cell>
    <table:table-cell table:style-name="TableRowCell" office:value-type="string">
      <text:p text:style-name="Table_20_Contents">Linha plana: <text:span text:style-name="Source_20_Text">product_id</text:span>, <text:span text:style-name="Source_20_Text">quantity_available</text:span>, <text:span text:style-name="Source_20_Text">last_restock_date</text:span>, <text:span text:style-name="Source_20_Text">price</text:span>.</text:p>
    </table:table-cell>
  </table:table-row>
  <table:table-row>
    <table:table-cell table:style-name="TableRowCell" office:value-type="string">
      <text:p text:style-name="Table_20_Contents">MongoDB</text:p>
    </table:table-cell>
    <table:table-cell table:style-name="TableRowCell" office:value-type="string">
      <text:p text:style-name="Table_20_Contents"><text:span text:style-name="Source_20_Text">product_catalog</text:span></text:p>
    </table:table-cell>
    <table:table-cell table:style-name="TableRowCell" office:value-type="string">
      <text:p text:style-name="Table_20_Contents"><text:span text:style-name="Source_20_Text">action == stock</text:span></text:p>
    </table:table-cell>
    <table:table-cell table:style-name="TableRowCell" office:value-type="string">
      <text:p text:style-name="Table_20_Contents">Documento com campos de produto e subobjetos <text:span text:style-name="Source_20_Text">category</text:span> e <text:span text:style-name="Source_20_Text">stock</text:span> aninhados.</text:p>
    </table:table-cell>
  </table:table-row>
  <table:table-row>
    <table:table-cell table:style-name="TableRowCell" office:value-type="string">
      <text:p text:style-name="Table_20_Contents">Cassandra</text:p>
    </table:table-cell>
    <table:table-cell table:style-name="TableRowCell" office:value-type="string">
      <text:p text:style-name="Table_20_Contents"><text:span text:style-name="Source_20_Text">user_activity_log</text:span></text:p>
    </table:table-cell>
    <table:table-cell table:style-name="TableRowCell" office:value-type="string">
      <text:p text:style-name="Table_20_Contents">nenhum (todas as linhas)</text:p>
    </table:table-cell>
    <table:table-cell table:style-name="TableRowCell" office:value-type="string">
      <text:p text:style-name="Table_20_Contents">Registro com <text:span text:style-name="Source_20_Text">timestamp</text:span> renomeado para <text:span text:style-name="Source_20_Text">event_time</text:span>, <text:span text:style-name="Source_20_Text">action</text:span> para <text:span text:style-name="Source_20_Text">event_type</text:span>; PK composta <text:span text:style-name="Source_20_Text">(user_id, timestamp)</text:span>.</text:p>
    </table:table-cell>
  </table:table-row>
  <table:table-row>
    <table:table-cell table:style-name="TableRowCell" office:value-type="string">
      <text:p text:style-name="Table_20_Contents">Redi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Entidades Redis usam outros filtros (<text:span text:style-name="Source_20_Text">add_to_cart</text:span>, <text:span text:style-name="Source_20_Text">select_product</text:span>); esta linha não alimenta Redis.</text:p>
    </table:table-cell>
  </table:table-row>
  <table:table-row>
    <table:table-cell table:style-name="TableRowCell" office:value-type="string">
      <text:p text:style-name="Table_20_Contents">Neo4j</text:p>
    </table:table-cell>
    <table:table-cell table:style-name="TableRowCell" office:value-type="string">
      <text:p text:style-name="Table_20_Contents"><text:span text:style-name="Source_20_Text">Product</text:span></text:p>
    </table:table-cell>
    <table:table-cell table:style-name="TableRowCell" office:value-type="string">
      <text:p text:style-name="Table_20_Contents"><text:span text:style-name="Source_20_Text">action == stock</text:span></text:p>
    </table:table-cell>
    <table:table-cell table:style-name="TableRowCell" office:value-type="string">
      <text:p text:style-name="Table_20_Contents">Nó <text:span text:style-name="Source_20_Text">:Product</text:span> com <text:span text:style-name="Source_20_Text">product_id</text:span> como chave de <text:span text:style-name="Source_20_Text">MERGE</text:span>.</text:p>
    </table:table-cell>
  </table:table-row>
</table:table>
<text:p text:style-name="First_20_paragraph">Assim, um <text:span text:style-name="T2">único CSV largo</text:span> alimenta destinos heterogéneos: tabelas relacionais filtradas por tipo de evento, documentos aninhados, log colunar com renomeação de colunas e nós de grafo — materializando a persistência poliglota descrita no capítulo 2.</text:p>
<text:h text:style-name="Heading_20_2" text:outline-level="2"><text:bookmark-start text:name="validação-e-execução"/>4.4 Validação e execução<text:bookmark-end text:name="validação-e-execução"/></text:h>
<text:p text:style-name="First_20_paragraph">Erros de configuração levantam <text:span text:style-name="Source_20_Text">BusinessException</text:span> antes de qualquer conexão. O modo <text:span text:style-name="Source_20_Text">--dry-run</text:span> lista contagens por entidade sem contatar os SGBDs. O <text:span text:style-name="T1">driver</text:span> Apache Cassandra é importado de forma tardia para permitir <text:span text:style-name="Source_20_Text">--dry-run</text:span> em ambientes onde a extensão C do <text:span text:style-name="T1">driver</text:span> não está disponível (por exemplo, versões recentes do Python).</text:p>
<text:p text:style-name="Text_20_body">Testes automatizados (<text:span text:style-name="Source_20_Text">pytest</text:span>) cobrem validação de schema, mapeamento de colunas (<text:span text:style-name="Source_20_Text">csv_column</text:span>, <text:span text:style-name="Source_20_Text">schema_column</text:span>, aninhamento), filtros e <text:span text:style-name="T1">smoke tests</text:span> de validação + <text:span text:style-name="T1">dry-run</text:span>. O arquivo <text:span text:style-name="Source_20_Text">docker-compose.yml</text:span> na raiz sobe PostgreSQL, Redis, MongoDB, Cassandra e Neo4j para testes de integração manuais; o script <text:span text:style-name="Source_20_Text">run_example.ps1</text:span> orquestra a subida dos contêineres, um <text:span text:style-name="T1">dry-run</text:span> e a importação real com <text:span text:style-name="Source_20_Text">--create-schema</text:span>.</text:p>
<text:h text:style-name="Heading_20_3" text:outline-level="3"><text:bookmark-start text:name="evidência-de-execução-cenário-e-commerce"/>4.4.1 Evidência de execução (cenário e-commerce)<text:bookmark-end text:name="evidência-de-execução-cenário-e-commerce"/></text:h>
<text:p text:style-name="First_20_paragraph">O arquivo <text:span text:style-name="Source_20_Text">data/ecommerce/ecommerce_join.csv</text:span> contém 32 linhas de eventos (<text:span text:style-name="Source_20_Text">stock</text:span>, <text:span text:style-name="Source_20_Text">purchase</text:span>, <text:span text:style-name="Source_20_Text">add_to_cart</text:span>, <text:span text:style-name="Source_20_Text">select_product</text:span>). Com <text:span text:style-name="Source_20_Text">import_config.json</text:span> e a flag <text:span text:style-name="Source_20_Text">--dry-run</text:span>, a ferramenta reporta as contagens abaixo sem abrir conexões com os SGBDs — útil para revisar o mapeamento antes da carga:</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Backend</text:p>
      </table:table-cell>
      <table:table-cell table:style-name="TableHeaderRowCell" office:value-type="string">
        <text:p text:style-name="Table_20_Heading">Destino</text:p>
      </table:table-cell>
      <table:table-cell table:style-name="TableHeaderRowCell" office:value-type="string">
        <text:p text:style-name="Table_20_Heading">Registros (após filtros / deduplicação)</text:p>
      </table:table-cell>
    </table:table-row>
  </table:table-header-rows>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categories</text:span></text:p>
    </table:table-cell>
    <table:table-cell table:style-name="TableRowCell" office:value-type="string">
      <text:p text:style-name="Table_20_Contents">8</text:p>
    </table:table-cell>
  </table:table-row>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products</text:span></text:p>
    </table:table-cell>
    <table:table-cell table:style-name="TableRowCell" office:value-type="string">
      <text:p text:style-name="Table_20_Contents">8</text:p>
    </table:table-cell>
  </table:table-row>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inventory</text:span></text:p>
    </table:table-cell>
    <table:table-cell table:style-name="TableRowCell" office:value-type="string">
      <text:p text:style-name="Table_20_Contents">8</text:p>
    </table:table-cell>
  </table:table-row>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orders</text:span></text:p>
    </table:table-cell>
    <table:table-cell table:style-name="TableRowCell" office:value-type="string">
      <text:p text:style-name="Table_20_Contents">8</text:p>
    </table:table-cell>
  </table:table-row>
  <table:table-row>
    <table:table-cell table:style-name="TableRowCell" office:value-type="string">
      <text:p text:style-name="Table_20_Contents">MongoDB</text:p>
    </table:table-cell>
    <table:table-cell table:style-name="TableRowCell" office:value-type="string">
      <text:p text:style-name="Table_20_Contents"><text:span text:style-name="Source_20_Text">product_catalog</text:span></text:p>
    </table:table-cell>
    <table:table-cell table:style-name="TableRowCell" office:value-type="string">
      <text:p text:style-name="Table_20_Contents">8 documentos</text:p>
    </table:table-cell>
  </table:table-row>
  <table:table-row>
    <table:table-cell table:style-name="TableRowCell" office:value-type="string">
      <text:p text:style-name="Table_20_Contents">Cassandra</text:p>
    </table:table-cell>
    <table:table-cell table:style-name="TableRowCell" office:value-type="string">
      <text:p text:style-name="Table_20_Contents"><text:span text:style-name="Source_20_Text">user_activity_log</text:span></text:p>
    </table:table-cell>
    <table:table-cell table:style-name="TableRowCell" office:value-type="string">
      <text:p text:style-name="Table_20_Contents">32 linhas (todas as ações)</text:p>
    </table:table-cell>
  </table:table-row>
  <table:table-row>
    <table:table-cell table:style-name="TableRowCell" office:value-type="string">
      <text:p text:style-name="Table_20_Contents">Redis</text:p>
    </table:table-cell>
    <table:table-cell table:style-name="TableRowCell" office:value-type="string">
      <text:p text:style-name="Table_20_Contents"><text:span text:style-name="Source_20_Text">shopping_cart</text:span></text:p>
    </table:table-cell>
    <table:table-cell table:style-name="TableRowCell" office:value-type="string">
      <text:p text:style-name="Table_20_Contents">8</text:p>
    </table:table-cell>
  </table:table-row>
  <table:table-row>
    <table:table-cell table:style-name="TableRowCell" office:value-type="string">
      <text:p text:style-name="Table_20_Contents">Redis</text:p>
    </table:table-cell>
    <table:table-cell table:style-name="TableRowCell" office:value-type="string">
      <text:p text:style-name="Table_20_Contents"><text:span text:style-name="Source_20_Text">user_session</text:span></text:p>
    </table:table-cell>
    <table:table-cell table:style-name="TableRowCell" office:value-type="string">
      <text:p text:style-name="Table_20_Contents">8</text:p>
    </table:table-cell>
  </table:table-row>
  <table:table-row>
    <table:table-cell table:style-name="TableRowCell" office:value-type="string">
      <text:p text:style-name="Table_20_Contents">Neo4j</text:p>
    </table:table-cell>
    <table:table-cell table:style-name="TableRowCell" office:value-type="string">
      <text:p text:style-name="Table_20_Contents">nó <text:span text:style-name="Source_20_Text">User</text:span></text:p>
    </table:table-cell>
    <table:table-cell table:style-name="TableRowCell" office:value-type="string">
      <text:p text:style-name="Table_20_Contents">8</text:p>
    </table:table-cell>
  </table:table-row>
  <table:table-row>
    <table:table-cell table:style-name="TableRowCell" office:value-type="string">
      <text:p text:style-name="Table_20_Contents">Neo4j</text:p>
    </table:table-cell>
    <table:table-cell table:style-name="TableRowCell" office:value-type="string">
      <text:p text:style-name="Table_20_Contents">nó <text:span text:style-name="Source_20_Text">Product</text:span></text:p>
    </table:table-cell>
    <table:table-cell table:style-name="TableRowCell" office:value-type="string">
      <text:p text:style-name="Table_20_Contents">8</text:p>
    </table:table-cell>
  </table:table-row>
  <table:table-row>
    <table:table-cell table:style-name="TableRowCell" office:value-type="string">
      <text:p text:style-name="Table_20_Contents">Neo4j</text:p>
    </table:table-cell>
    <table:table-cell table:style-name="TableRowCell" office:value-type="string">
      <text:p text:style-name="Table_20_Contents">aresta <text:span text:style-name="Source_20_Text">PURCHASED</text:span></text:p>
    </table:table-cell>
    <table:table-cell table:style-name="TableRowCell" office:value-type="string">
      <text:p text:style-name="Table_20_Contents">conforme linhas <text:span text:style-name="Source_20_Text">purchase</text:span></text:p>
    </table:table-cell>
  </table:table-row>
</table:table>
<text:p text:style-name="First_20_paragraph">Com <text:span text:style-name="Source_20_Text">docker compose up -d</text:span> e <text:span text:style-name="Source_20_Text">run_example.ps1</text:span> (ou importação sem <text:span text:style-name="Source_20_Text">--dry-run</text:span>), os mesmos volumes são persistidos nos cinco backends configurados, materializando o cenário poliglota da seção 2.1.</text:p>
<text:h text:style-name="Heading_20_1" text:outline-level="1"><text:bookmark-start text:name="atividades-futuras"/>5 ATIVIDADES FUTURAS<text:bookmark-end text:name="atividades-futuras"/></text:h>
<text:list text:style-name="L13">
  <text:list-item>
    <text:p text:style-name="P96"><text:span text:style-name="T2">Interface gráfica desktop</text:span> (semestre seguinte) que monte o comando CLI e visualize o JSON de configuração.</text:p>
  </text:list-item>
  <text:list-item>
    <text:p text:style-name="P96"><text:span text:style-name="T2">Suporte a TSV/Excel</text:span> e a <text:span text:style-name="T1">chunked</text:span> processing para CSV maiores que a RAM.</text:p>
  </text:list-item>
  <text:list-item>
    <text:p text:style-name="P96"><text:span text:style-name="T2">Operadores de filtro adicionais</text:span> e políticas de coerção de tipos configuráveis.</text:p>
  </text:list-item>
  <text:list-item>
    <text:p text:style-name="P96"><text:span text:style-name="T2">Testes de integração</text:span> contra <text:span text:style-name="Source_20_Text">docker compose</text:span> em CI.</text:p>
  </text:list-item>
  <text:list-item>
    <text:p text:style-name="P96"><text:span text:style-name="T2">Generalização</text:span> do núcleo de importação para novos conectores (mensageria, <text:span text:style-name="T1">data lakes</text:span>, outros SGBDs).</text:p>
  </text:list-item>
</text:list>
<text:h text:style-name="Heading_20_1" text:outline-level="1"><text:bookmark-start text:name="considerações-finais"/>CONSIDERAÇÕES FINAIS<text:bookmark-end text:name="considerações-finais"/></text:h>
<text:p text:style-name="First_20_paragraph">Este TCC I apresentou a fundamentação teórica da persistência poliglota, o estado da arte em importação e modelagem de dados heterogêneos, e a proposta da ferramenta <text:span text:style-name="T1">Polyglot Import CSV</text:span> como utilitário de <text:span text:style-name="T1">bootstrap</text:span> declarativo a partir de CSV.</text:p>
<text:p text:style-name="Text_20_body">As principais contribuições desta etapa são: (i) um formato de configuração JSON validado estaticamente por JSON Schema, com mapeamento recursivo de colunas e filtros por valor; (ii) um protótipo em Python que materializa o mesmo CSV operacional em PostgreSQL, MongoDB, Cassandra, Redis e Neo4j; (iii) o modo <text:span text:style-name="Source_20_Text">--dry-run</text:span> para revisão prévia de contagens; e (iv) o cenário e-commerce reprodutível com <text:span text:style-name="Source_20_Text">ecommerce_join.csv</text:span>, <text:span text:style-name="Source_20_Text">import_config.json</text:span> e <text:span text:style-name="Source_20_Text">docker-compose.yml</text:span>.</text:p>
<text:p text:style-name="Text_20_body">As limitações reconhecidas incluem: testes automatizados predominantemente unitários (sem suíte de integração contínua contra Docker); processamento em memória do CSV inteiro; e dependência do <text:span text:style-name="T1">driver</text:span> Cassandra em ambientes Python recentes. Itens como interface gráfica, suporte a TSV/Excel, <text:span text:style-name="T1">chunked</text:span> processing e novos conectores permanecem no escopo do TCC II (Capítulo 5).</text:p>
<text:p text:style-name="Text_20_body">O trabalho de conclusão de curso em dezembro de 2026 poderá aprofundar a avaliação experimental (desempenho, consistência entre stores) e a interface de uso, consolidando a ferramenta como artefato de pesquisa e de código aberto alinhado à literatura sobre SGPD e modelagem poliglota de dados.</text:p>
<text:section text:name="refs"><text:section text:name="ref-berlanga2021unified"><text:p text:style-name="Text_20_body">BERLANGA, Adrián <text:span text:style-name="T1">et al.</text:span> A Unified Metamodel for NoSQL and Relational Databases. <text:span text:style-name="T2">arXiv preprint arXiv:2105.06494</text:span>, 2021.</text:p></text:section>
<text:section text:name="ref-chillon2023propagating"><text:p text:style-name="Text_20_body">CHILLÓN, Alberto Hernández <text:span text:style-name="T1">et al.</text:span> Propagating Schema Changes to Code: An Approach Based on a Unified Data Model. <text:span text:style-name="T1">In</text:span>: 2023.</text:p></text:section>
<text:section text:name="ref-dbcrossbar2024"><text:p text:style-name="Text_20_body"><text:span text:style-name="T2">dbcrossbar: copy tabular data between databases, CSV files, and cloud storage</text:span>. <text:a xlink:type="simple" xlink:href="https://www.dbcrossbar.org" office:name=""><text:span text:style-name="Definition">https://www.dbcrossbar.org</text:span></text:a>, 2024. Acesso em: 27 maio. 2026</text:p></text:section>
<text:section text:name="ref-duggan2017bigdawg"><text:p text:style-name="Text_20_body">DUGGAN, Jennie <text:span text:style-name="T1">et al.</text:span> BigDAWG: A Polystore System for Big Data Analytics. <text:span text:style-name="T1">In</text:span>: 2017.</text:p></text:section>
<text:section text:name="ref-ford2008productive"><text:p text:style-name="Text_20_body">FORD, Neal. <text:span text:style-name="T2">The Productive Programmer</text:span>. <text:span text:style-name="T1">[S.l.]</text:span>: O’Reilly Media, 2008.</text:p></text:section>
<text:section text:name="ref-fowler2011polyglot"><text:p text:style-name="Text_20_body">FOWLER, Martin. <text:span text:style-name="T2">PolyglotPersistence</text:span>. Disponível em: <text:a xlink:type="simple" xlink:href="https://martinfowler.com/bliki/PolyglotPersistence.html" office:name=""><text:span text:style-name="Definition">https://martinfowler.com/bliki/PolyglotPersistence.html</text:span></text:a>, 2011. Acesso em: 27 maio. 2026</text:p></text:section>
<text:section text:name="ref-glake2022towards"><text:p text:style-name="Text_20_body">GLAKE, Daniel <text:span text:style-name="T1">et al.</text:span> <text:span text:style-name="T2">Towards Polyglot Data Stores: Overview and Open Research Questions</text:span>., 2022. Disponível em: &lt;<text:a xlink:type="simple" xlink:href="https://arxiv.org/abs/2204.05779" office:name=""><text:span text:style-name="Definition">https://arxiv.org/abs/2204.05779</text:span></text:a>&gt;</text:p></text:section>
<text:section text:name="ref-hackolade2024polyglot"><text:p text:style-name="Text_20_body">HACKOLADE. <text:span text:style-name="T2">Polyglot Data Modeling</text:span>. <text:a xlink:type="simple" xlink:href="https://hackolade.com/polyglot-data-modeling.html" office:name=""><text:span text:style-name="Definition">https://hackolade.com/polyglot-data-modeling.html</text:span></text:a>, 2024. Acesso em: 27 maio. 2026</text:p></text:section>
<text:section text:name="ref-hecht2011nosql"><text:p text:style-name="Text_20_body">HECHT, R.; JABLONSKI, S. NoSQL Evaluation: A Use Case Oriented Survey. <text:span text:style-name="T1">In</text:span>: 2011.</text:p></text:section>
<text:section text:name="ref-khine2019review"><text:p text:style-name="Text_20_body">KHINE, Pwint Phyu; WANG, Zhaoshun. A Review of Polyglot Persistence in the Big Data World. <text:span text:style-name="T2">Information</text:span>, v. 10, n. 4, p. 141, 2019.</text:p></text:section>
<text:section text:name="ref-kiehn2022polyglot"><text:p text:style-name="Text_20_body">KIEHN, Felix <text:span text:style-name="T1">et al.</text:span> Polyglot Data Management: State of the Art &amp; Open Challenges. <text:span text:style-name="T2">Proceedings of the VLDB Endowment</text:span>, v. 15, n. 12, p. 3750–3753, 2022.</text:p></text:section>
<text:section text:name="ref-royhubara2022selecting"><text:p text:style-name="Text_20_body">ROY-HUBARA, Naama; SHOVAL, Peretz; STURM, Arnon. Selecting Databases for Polyglot Persistence Applications. <text:span text:style-name="T2">Data &amp; Knowledge Engineering</text:span>, v. 137, p. 101950, 2022.</text:p></text:section>
<text:section text:name="ref-sadalage2013nosql"><text:p text:style-name="Text_20_body">SADALAGE, Pramod J.; FOWLER, Martin. <text:span text:style-name="T2">NoSQL Distilled: A Brief Guide to the Emerging World of Polyglot Persistence</text:span>. <text:span text:style-name="T1">[S.l.]</text:span>: Pearson Education, 2013.</text:p></text:section>
<text:section text:name="ref-silva2024modelagem"><text:p text:style-name="Text_20_body">SILVA, Hudson Afonso Batista da; BORNIA, Luís Gustavo; MELLO, Ronaldo dos Santos. Um Estudo sobre Modelagem Poliglota de Dados. <text:span text:style-name="T1">In</text:span>: Sociedade Brasileira de Computação, 2024.</text:p></text:section>
<text:section text:name="ref-tan2017query"><text:p text:style-name="Text_20_body">TAN, Rui <text:span text:style-name="T1">et al.</text:span> Enabling Query Processing Across Heterogeneous Data Models: A Survey. <text:span text:style-name="T1">In</text:span>: 2017.</text:p></text:section>
<text:section text:name="ref-wang2020cmc"><text:p text:style-name="Text_20_body">WANG, L. <text:span text:style-name="T1">et al.</text:span> A Middleware for Polyglot Persistence and Data Portability of Big Data PaaS Cloud Applications. <text:span text:style-name="T2">Computers, Materials &amp; Continua</text:span>, v. 65, n. 2, p. 1399–1416, 2020.</text:p></text:section>
<text:section text:name="ref-ye2023benchmark"><text:p text:style-name="Text_20_body">YE, Feng <text:span text:style-name="T1">et al.</text:span> A Benchmark for Performance Evaluation of a Multi-Model Database vs. Polyglot Persistence. <text:span text:style-name="T2">Journal of Database Management</text:span>, v. 34, n. 3, p. 1–20, 2023.</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BR" fo:font-size="12pt" fo:language="p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BR" fo:font-size="12pt" fo:hyphenate="false" fo:hyphenation-push-char-count="2" fo:hyphenation-remain-char-count="2" fo:language="p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fo:text-indent="1.25cm"/>
      <style:text-properties style:font-name="Times New Roman"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text-properties style:font-name="Times New Roman" fo:font-size="12pt"/>
      <style:paragraph-properties style:auto-text-indent="false" style:contextual-spacing="false" fo:margin-bottom="0.1in" fo:margin-left="0.3937in" fo:margin-right="0.3937in" fo:margin-top="0.1in" fo:text-indent="1.25cm"/>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pt"/>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p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2cm" fo:margin-left="3cm" fo:margin-right="2cm" fo:margin-top="3cm"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Polyglot Import CSV: Uma solução para importação de documentos CSV para múltiplos bancos de dados</dc:title>
    <dc:description/>
    <dc:subject/>
    <meta:keyword/>
    <dc:language>pt-BR</dc:language>
    <meta:initial-creator>Lucas Bueno Cesario</meta:initial-creator>
    <dc:creator>Lucas Bueno Cesario</dc:creator>
    <meta:creation-date>2026-05-27T21:21:17Z</meta:creation-date>
    <dc:date>2026-05-27T21:21:17Z</dc:date>
    <meta:user-defined meta:name="abstract" meta:value-type="string">A persistência poliglota é essencial na arquitetura contemporânea de bancos de dados, integrando diversas tecnologias de armazenamento em aplicativos. A ferramenta “Polyglot Import CSV” destaca-se como solução para otimizar a importação de dados CSV em diversos bancos de dados, superando desafios da persistência poliglota. Por meio de configurações simples em arquivos JSON, a ferramenta oferece suporte para PostgreSQL, Redis, Cassandra, MongoDB e Neo4j, acelerando o processo e aumentando a flexibilidade para os desenvolvedores. A publicação do código aberto da ferramenta impulsiona avanços colaborativos na dinâmica arquitetura moderna de bancos de dados, consolidando-se como uma solução versátil e eficiente.</meta:user-defined>
    <meta:user-defined meta:name="bibliography" meta:value-type="string">C:\Users\DELL\Documents\polyglot-import-csv\docs-tcc\references.bib</meta:user-defined>
    <meta:user-defined meta:name="capa" meta:value-type="string">True</meta:user-defined>
    <meta:user-defined meta:name="course" meta:value-type="string">Curso de Graduação em Ciência da Computação</meta:user-defined>
    <meta:user-defined meta:name="csl" meta:value-type="string">C:\Users\DELL\Documents\polyglot-import-csv\docs-tcc\associacao-brasileira-de-normas-tecnicas.csl</meta:user-defined>
    <meta:user-defined meta:name="date" meta:value-type="string">2026/1</meta:user-defined>
    <meta:user-defined meta:name="department" meta:value-type="string">Departamento de Informática e Estatística</meta:user-defined>
    <meta:user-defined meta:name="folhaderosto" meta:value-type="string">True</meta:user-defined>
    <meta:user-defined meta:name="folhaorientadores" meta:value-type="string">True</meta:user-defined>
    <meta:user-defined meta:name="header-includes" meta:value-type="string"/>
    <meta:user-defined meta:name="institution" meta:value-type="string">Universidade Federal de Santa Catarina</meta:user-defined>
    <meta:user-defined meta:name="listofabbreviations" meta:value-type="string">True</meta:user-defined>
    <meta:user-defined meta:name="listoffigures" meta:value-type="string">True</meta:user-defined>
    <meta:user-defined meta:name="membrosbanca" meta:value-type="string"/>
    <meta:user-defined meta:name="orientador" meta:value-type="string">Profº Ronaldo dos Santos Mello, Dr.</meta:user-defined>
    <meta:user-defined meta:name="place" meta:value-type="string">Florianópolis</meta:user-defined>
    <meta:user-defined meta:name="preamble" meta:value-type="string">Trabalho de conclusão de curso apresentado como parte dos requisitos para obtenção do título de Bacharel, do Curso de Graduação em Ciência da Computação na Universidade Federal de Santa Catarina.</meta:user-defined>
    <meta:user-defined meta:name="tags" meta:value-type="string"/>
    <meta:user-defined meta:name="tagstitle" meta:value-type="string">Palavras-chave</meta:user-defined>
    <meta:user-defined meta:name="tipotrabalho" meta:value-type="string">Trabalho de Conclusão de Curso</meta:user-defined>
    <meta:user-defined meta:name="toc" meta:value-type="string">True</meta:user-defined>
    <meta:user-defined meta:name="toc-depth" meta:value-type="string">3</meta:user-defined>
  </office:meta>
</office:document-meta>
</file>

<file path=Formula-3/content.xml><?xml version="1.0" encoding="utf-8"?>
<math xmlns="http://www.w3.org/1998/Math/MathML" display="inline">
  <mo>→</mo>
</math>
</file>

<file path=Formula-5/content.xml><?xml version="1.0" encoding="utf-8"?>
<math xmlns="http://www.w3.org/1998/Math/MathML" display="inline">
  <mrow>
    <mo>≥</mo>
    <mn>1</mn>
  </mrow>
</math>
</file>

<file path=Formula-7/content.xml><?xml version="1.0" encoding="utf-8"?>
<math xmlns="http://www.w3.org/1998/Math/MathML" display="inline">
  <mrow>
    <mo>≥</mo>
    <mn>0</mn>
  </mrow>
</math>
</file>