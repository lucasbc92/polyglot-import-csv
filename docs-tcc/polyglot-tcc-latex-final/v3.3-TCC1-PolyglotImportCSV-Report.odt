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image/png" manifest:full-path="Pictures/15.png"/>
  <manifest:file-entry manifest:media-type="application/xml" manifest:full-path="Formula-13/settings.xml"/>
  <manifest:file-entry manifest:media-type="application/xml" manifest:full-path="Formula-13/content.xml"/>
  <manifest:file-entry manifest:media-type="application/xml" manifest:full-path="Formula-11/settings.xml"/>
  <manifest:file-entry manifest:media-type="application/xml" manifest:full-path="Formula-11/content.xml"/>
  <manifest:file-entry manifest:media-type="image/png" manifest:full-path="Pictures/10.png"/>
  <manifest:file-entry manifest:media-type="application/xml" manifest:full-path="Formula-8/settings.xml"/>
  <manifest:file-entry manifest:media-type="application/xml" manifest:full-path="Formula-8/content.xml"/>
  <manifest:file-entry manifest:media-type="image/png" manifest:full-path="Pictures/7.png"/>
  <manifest:file-entry manifest:media-type="application/xml" manifest:full-path="Formula-5/settings.xml"/>
  <manifest:file-entry manifest:media-type="application/xml" manifest:full-path="Formula-5/content.xml"/>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3/"/>
  <manifest:file-entry manifest:media-type="application/vnd.oasis.opendocument.formula" manifest:full-path="Formula-13/"/>
  <manifest:file-entry manifest:media-type="application/vnd.oasis.opendocument.formula" manifest:full-path="Formula-11/"/>
  <manifest:file-entry manifest:media-type="application/vnd.oasis.opendocument.formula" manifest:full-path="Formula-11/"/>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5/"/>
  <manifest:file-entry manifest:media-type="application/vnd.oasis.opendocument.formula" manifest:full-path="Formula-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office:automatic-styles>
  <office:body>
    <office:tex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resumo"/>Resumo<text:bookmark-end text:name="resumo"/></text:h>
      <text:p text:style-name="First_20_paragraph">A persistência poliglota é essencial na arquitetura contemporânea de bancos de dados, integrando diversas tecnologias de armazenamento em uma mesma aplicação. A ferramenta <text:span text:style-name="Emphasis">Polyglot Import CSV</text:span> destaca-se como solução para otimizar a importação de dados CSV em diversos bancos de dados simultaneamente, superando desafios da persistência poliglota. Optou-se pelo formato CSV por ser amplamente utilizado na importação de dados pelos diversos SGBDs e por ser um formato simples e familiar tanto a humanos quanto a sistemas. Por meio de configurações declarativas em arquivos JSON, a ferramenta oferece suporte ao principal representante de código aberto dos bancos de dados relacionais — o PostgreSQL — e aos principais representantes dos bancos de dados NoSQL: Redis (chave-valor), MongoDB (documento), Apache Cassandra (colunar) e Neo4j (grafo). Não foram identificadas ferramentas equivalentes que realizem, a partir de um único arquivo CSV e de regras declarativas, a importação simultânea para múltiplos paradigmas de dados, o que evidencia a originalidade da proposta. A publicação do código aberto da ferramenta impulsiona avanços colaborativos na dinâmica arquitetura moderna de bancos de dados.</text:p>
      <text:p text:style-name="Text_20_body"><text:span text:style-name="Strong_20_Emphasis">Palavras-chave</text:span>: Persistência poliglota. Ferramenta <text:span text:style-name="Emphasis">Polyglot Import CSV</text:span>. Importação de dados CSV. JSON. SQL. NoSQL. Software Livre.</text:p>
      <text:h text:style-name="Heading_20_2" text:outline-level="2"><text:bookmark-start text:name="abstract"/>Abstract<text:bookmark-end text:name="abstract"/></text:h>
      <text:p text:style-name="First_20_paragraph"><text:span text:style-name="Emphasis">Polyglot persistence is essential in contemporary database architecture, integrating various storage technologies within the same application. The </text:span><text:span text:style-name="Emphasis">Polyglot Import CSV</text:span><text:span text:style-name="Emphasis"> tool stands out as a solution for optimizing CSV data import into multiple databases simultaneously, overcoming polyglot persistence challenges. The CSV format was chosen because it is widely used for data import by various DBMSs and because it is a simple and familiar format for both humans and systems. Through declarative configurations in JSON files, the tool supports the leading open-source representative of relational databases — PostgreSQL — and the main representatives of NoSQL databases: Redis (key-value), MongoDB (document), Apache Cassandra (columnar), and Neo4j (graph). No equivalent tools were identified that perform, from a single CSV file and declarative rules, the simultaneous import to multiple data paradigms, which highlights the originality of the proposal. The open-source publication of the tool drives collaborative advances in the dynamic modern database architecture.</text:span></text:p>
      <text:p text:style-name="Text_20_body"><text:span text:style-name="Strong_20_Emphasis">Keywords</text:span>: <text:span text:style-name="Emphasis">Polyglot persistence. Polyglot Import CSV tool. CSV data import. JSON. SQL. NoSQL. Free Software.</text:span></text:p>
      <text:h text:style-name="Heading_20_1" text:outline-level="1"><text:bookmark-start text:name="introdução"/>Introdução<text:bookmark-end text:name="introdução"/></text:h>
      <text:h text:style-name="Heading_20_2" text:outline-level="2"><text:bookmark-start text:name="visão-geral"/>Visão Geral<text:bookmark-end text:name="visão-geral"/></text:h>
      <text:p text:style-name="First_20_paragraph">Nas esferas industrial e acadêmica de bancos de dados, a concepção de que um único modelo de dados não atende a todas as necessidades tem conquistado aceitação, apontando para a perspectiva de persistência poliglota no futuro. Embora os sistemas de banco de dados relacionais devam manter sua predominância, espera-se uma convivência com diversas formas de sistemas, como os NoSQL (Sadalage and Fowler 2013).</text:p>
      <text:p text:style-name="Text_20_body">Algumas pesquisas têm sido feitas na área de persistência poliglota, como sugestões de modelos de dados unificados (Chillón et al. 2023), comparação de desempenho de bancos de dados multi-modelos contra abordagens de persistência poliglota (Ye et al. 2023), revisões sistemáticas sobre modelagem poliglota de dados (Silva et al. 2024), tutoriais sobre o estado da arte e desafios abertos (Kiehn et al. 2022), e a adoção da persistência poliglota em Big Data (Khine and Wang 2019).</text:p>
      <text:p text:style-name="Text_20_body">Dada essa necessidade crescente da adoção de persistência poliglota pelas aplicações, percebe-se a falta de uma ferramenta única de importação simultânea de dados para diversos SGBDs que tratem modelos de dados diferentes. Até onde se investigou (Capítulo 3), não foram identificadas ferramentas equivalentes: os importadores nativos atendem a um único SGBD por vez, e as soluções de migração ou de modelagem poliglota não realizam a materialização simultânea de um mesmo CSV em múltiplos paradigmas de dados — o que ressalta a originalidade desta proposta.</text:p>
      <text:p text:style-name="Text_20_body">Assim sendo, a intenção deste trabalho é desenvolver a ferramenta <text:span text:style-name="Emphasis">Polyglot Import CSV</text:span>, que importa dados armazenados em CSV para SGBDs relacionais e NoSQL. A configuração da ferramenta será baseada em dois arquivos JSON: um de importação, mapeando entidades e relacionamentos em cada SGBD, considerado seu modelo de dados; outro de configuração de conexão dos SGBDs envolvidos. A escolha pelo formato JSON deve-se à sua simplicidade e ampla adoção; sua finalidade é detalhar, de forma declarativa, o mapeamento das colunas do CSV para os modelos de dados de cada SGBD, permitindo a validação prévia da importação.</text:p>
      <text:p text:style-name="Text_20_body">CSV (<text:span text:style-name="Emphasis">Comma-Separated Values</text:span>) é um arquivo de valores separados por vírgulas, frequentemente visualizado em Excel e outras planilhas eletrônicas. Pode haver outros tipos de valores como delimitadores, mas o mais comum é a vírgula. Muitos sistemas e processos hoje convertem seus dados para o formato CSV para saídas de arquivo para outros sistemas, relatórios amigáveis para humanos, disponibilização de dados públicos, e outras necessidades. É um formato de arquivo padrão com o qual humanos e sistemas já estão familiarizados ao usar e manipular.</text:p>
      <text:h text:style-name="Heading_20_2" text:outline-level="2"><text:bookmark-start text:name="objetivos"/>Objetivos<text:bookmark-end text:name="objetivos"/></text:h>
      <text:h text:style-name="Heading_20_3" text:outline-level="3"><text:bookmark-start text:name="objetivo-geral"/>Objetivo Geral<text:bookmark-end text:name="objetivo-geral"/></text:h>
      <text:p text:style-name="First_20_paragraph">Desenvolver a ferramenta <text:span text:style-name="Emphasis">Polyglot Import CSV</text:span> que possibilitará a importação de dados em arquivos CSV para múltiplos SGBDs: PostgreSQL, Redis, MongoDB, Cassandra ou Neo4j.</text:p>
      <text:h text:style-name="Heading_20_3" text:outline-level="3"><text:bookmark-start text:name="objetivos-específicos"/>Objetivos Específicos<text:bookmark-end text:name="objetivos-específicos"/></text:h>
      <text:list text:style-name="List_20_1">
        <text:list-item>
          <text:p text:style-name="List_20_Bullet">Projetar os arquivos de configuração JSON para que eles sigam sintaxes específicas, e flexíveis para lidar com vários modelos de dados, além de adicionar opções como filtros, escolha de chave primária e escolha do nome da coluna no banco de dados;</text:p>
        </text:list-item>
        <text:list-item>
          <text:p text:style-name="List_20_Bullet">Não permitir configurações incorretas, ou seja, se houver erro em algum lugar dos arquivos de configuração, a importação não deve começar até que sejam corrigidos (validação prévia da configuração);</text:p>
        </text:list-item>
        <text:list-item>
          <text:p text:style-name="List_20_Bullet">Avaliar o desempenho da ferramenta para diferentes volumes e modelos de dados destino;</text:p>
        </text:list-item>
        <text:list-item>
          <text:p text:style-name="List_20_Bullet">Disponibilizar a ferramenta de forma acessível ao usuário: inicialmente por meio de uma interface de linha de comando (CLI), com possibilidade de evolução para uma interface gráfica em trabalhos futuros.</text:p>
        </text:list-item>
      </text:list>
      <text:h text:style-name="Heading_20_2" text:outline-level="2"><text:bookmark-start text:name="metodologia"/>Metodologia<text:bookmark-end text:name="metodologia"/></text:h>
      <text:p text:style-name="First_20_paragraph">O desenvolvimento deste trabalho segue uma metodologia de pesquisa aplicada, adotando as seguintes etapas:</text:p>
      <text:list text:style-name="Numbering_20_1">
        <text:list-item>
          <text:p text:style-name="List_20_Number">Estudo sobre persistência poliglota e seu estado da arte;</text:p>
        </text:list-item>
        <text:list-item>
          <text:p text:style-name="List_20_Number">Estudo sobre os paradigmas não-relacionais que serão abrangidos pela solução: chave-valor, documento, grafo e colunar;</text:p>
        </text:list-item>
        <text:list-item>
          <text:p text:style-name="List_20_Number">Estudo de decisão de linguagem de implementação que demonstra melhor produtividade para codificar a solução;</text:p>
        </text:list-item>
        <text:list-item>
          <text:p text:style-name="List_20_Number">Projeto dos arquivos de configuração JSON;</text:p>
        </text:list-item>
        <text:list-item>
          <text:p text:style-name="List_20_Number">Projeto da instrução principal de importação que utiliza os arquivos de configuração;</text:p>
        </text:list-item>
        <text:list-item>
          <text:p text:style-name="List_20_Number">Implementação da solução “Polyglot Import CSV”;</text:p>
        </text:list-item>
        <text:list-item>
          <text:p text:style-name="List_20_Number">Testes da solução “Polyglot Import CSV” implementada.</text:p>
        </text:list-item>
      </text:list>
      <text:p text:style-name="First_20_paragraph">Na primeira etapa, foi estudado o que é a persistência poliglota, e a sua relevância no cenário atual.</text:p>
      <text:p text:style-name="Text_20_body">Na segunda etapa, foram estudados os diversos modelos de dados não-relacio- nais: como cada modelo representa suas entidades; se há relacionamentos entre entidades no modelo; se é possível a existência de entidades aninhadas e multivaloradas; as limitações de cada modelo.</text:p>
      <text:p text:style-name="Text_20_body">Na terceira etapa, foram estudadas as formas de implementar a solução usando as linguagens Java e Python e, pela simplicidade e produtividade, a linguagem Python foi escolhida.</text:p>
      <text:p text:style-name="Text_20_body">Na quarta e quinta etapas, foram projetados os dois arquivos de configuração JSON — um para o mapeamento da importação (entidades, relacionamentos e colunas) e outro para a conexão dos SGBDs — bem como a instrução principal de importação que os utiliza.</text:p>
      <text:p text:style-name="Text_20_body">As últimas etapas, que estão em andamento, tratam da implementação da solução proposta, “Polyglot Import CSV”, e dos testes da mesma com diferentes volumes de dados CSV e importações simples e complexas para diferentes modelos de dados destino.</text:p>
      <text:h text:style-name="Heading_20_2" text:outline-level="2"><text:bookmark-start text:name="estrutura-do-trabalho"/>Estrutura do Trabalho<text:bookmark-end text:name="estrutura-do-trabalho"/></text:h>
      <text:p text:style-name="First_20_paragraph">Este trabalho está estruturado em cinco capítulos principais. O primeiro aborda os objetivos, a metodologia e o contexto que levaram à elaboração deste TCC. O capítulo 2 revisa fundamentos teóricos. O capítulo 3 apresenta trabalhos relacionados. O capítulo 4 descreve a proposta da ferramenta <text:span text:style-name="Emphasis">Polyglot Import CSV</text:span> e o capítulo 5 as atividades futuras (TCC II).</text:p>
      <text:h text:style-name="Heading_20_1" text:outline-level="1"><text:bookmark-start text:name="fundamentação-teórica"/>Fundamentação Teórica<text:bookmark-end text:name="fundamentação-teórica"/></text:h>
      <text:h text:style-name="Heading_20_2" text:outline-level="2"><text:bookmark-start text:name="persistência-poliglota"/>Persistência Poliglota<text:bookmark-end text:name="persistência-poliglota"/></text:h>
      <text:p text:style-name="First_20_paragraph">Ford (2008) introduziu o conceito de “programação poliglota” para expressar a ideia de que aplicativos devem ser desenvolvidos utilizando uma combinação de linguagens, aproveitando o fato de que diferentes linguagens são mais adequadas para lidar com diferentes problemas. Uma das consequências notáveis da programação poliglota é a transição para a “persistência poliglota”, usando a mesma analogia: pode-se dizer que múltiplas tecnologias de bancos de dados podem ser utilizadas como armazenamento persistente para diferentes tipos de casos de uso. Embora ainda exista uma quantidade considerável de dados gerenciados por sistemas relacionais, a abordagem predominante passa a ser a reflexão sobre como se deseja manipular os dados antes de determinar qual tecnologia é a mais adequada para essa manipulação (Fowler 2011).</text:p>
      <text:p text:style-name="Text_20_body">A persistência poliglota abrange uma variedade de formatos de dados, incluindo estruturados, semi-estruturados e não estruturados. Dados estruturados geralmente englobam formatos como relacional, objeto-relacional, e grafos de propriedades. Dados semi-estruturados incluem principalmente documentos JSON e XML. Por fim, dados não estruturados são representados por arquivos de texto, imagens e áudios, dentre outros (Ye et al. 2023).</text:p>
      <text:p text:style-name="Text_20_body">Um domínio em que a persistência poliglota pode ser aplicada é o de um e-commerce. Nesse cenário, diferentes categorias de dados possuem características e padrões de acesso distintos — volume de escrita, frequência de leitura, necessidade de consistência, estrutura dos registros — o que torna mais adequado o uso de um SGBD específico para cada uma delas. A Figura <text:a xlink:type="simple" xlink:href="#fig:polyglot-ecommerce" office:name=""><text:span text:style-name="Definition">2.1</text:span></text:a> ilustra esse cenário, mapeando cada categoria de dado do e-commerce ao SGBD mais adequado, conforme sugerido a seguir:</text:p>
      <text:p text:style-name="FigureWithCaption"><draw:frame draw:name="img1" svg:width="5.90551in" svg:height="1.7711761373330637in"><draw:image xlink:href="Pictures/0.png" xlink:type="simple" xlink:show="embed" xlink:actuate="onLoad"/></draw:frame></text:p>
      <text:p text:style-name="FigureWithCaption">Fonte: Elaborado pelo autor (2026).</text:p>
      <text:p text:style-name="FigureCaption">Exemplo de aplicação da Persistência Poliglota em um e-commerce.</text:p>
      <text:list text:style-name="List_20_1">
        <text:list-item>
          <text:p text:style-name="List_20_Bullet"><text:span text:style-name="Strong_20_Emphasis">Dados Financeiros/Transacionais de Pagamento e Inventário de Produtos:</text:span> Pedidos, pagamentos e estoques exigem garantias transacionais fortes (ACID) para evitar inconsistências — por exemplo, debitar um pagamento sem registrar o pedido correspondente. Além disso, consultas analíticas sobre esses dados frequentemente combinam várias entidades por meio de junções. Bancos de dados relacionais como o PostgreSQL são a escolha natural para esse perfil, pois oferecem suporte nativo a transações com consistência forte, integridade referencial e uma linguagem de consulta expressiva (SQL).</text:p>
        </text:list-item>
        <text:list-item>
          <text:p text:style-name="List_20_Bullet"><text:span text:style-name="Strong_20_Emphasis">Dados do Catálogo de Produtos:</text:span> O catálogo de um e-commerce tende a ter esquema variável: diferentes produtos possuem atributos distintos (um livro físico com ISBN e editora; um eletrodoméstico com voltagem e garantia). Além disso, o catálogo é lido com muito maior frequência do que escrito, e cada consulta normalmente recupera o produto completo de uma vez. Bancos de dados orientados a documentos como o MongoDB são otimizados exatamente para esse perfil: armazenam cada produto como um documento autocontido (favorecendo leituras de agregados complexos), suportam esquemas flexíveis e oferecem índices secundários e <text:span text:style-name="Emphasis">pipelines</text:span> de agregação para fins de consulta.</text:p>
        </text:list-item>
        <text:list-item>
          <text:p text:style-name="List_20_Bullet"><text:span text:style-name="Strong_20_Emphasis">Dados da Sessão e do Carrinho de Compras do Usuário:</text:span> Dados de sessão e carrinho são acessados a cada interação do usuário durante a navegação, exigindo latência mínima, e são também inerentemente temporários — um carrinho abandonado não precisa persistir indefinidamente. Bancos de dados chave-valor em memória como o Redis oferecem latência de microssegundos, expiração automática de chaves e são horizontalmente escaláveis para absorver picos de tráfego, tornando-se a escolha ideal para dados de natureza efêmera e de acesso intenso.</text:p>
        </text:list-item>
        <text:list-item>
          <text:p text:style-name="List_20_Bullet"><text:span text:style-name="Strong_20_Emphasis">Dados de Atividade do Usuário:</text:span> Eventos de navegação (<text:span text:style-name="Emphasis">clickstream</text:span>), visualizações de produto e histórico de ações são gerados em alto volume e alta velocidade. Consultas típicas percorrem o histórico de um usuário em um intervalo de tempo, ou agregam eventos por tipo de ação. Bancos de dados colunares como o Apache Cassandra são projetados para ingestão massiva com particionamento por chave primária composta (por exemplo, <text:span text:style-name="Source_20_Text">(user_id, timestamp)</text:span>), garantindo escritas rápidas e leituras eficientes por usuário ou período — padrão ideal para séries temporais de atividade.</text:p>
        </text:list-item>
        <text:list-item>
          <text:p text:style-name="List_20_Bullet"><text:span text:style-name="Strong_20_Emphasis">Dados de Recomendação:</text:span> Sistemas de recomendação dependem de relacionamentos entre entidades: usuários que compraram os mesmos produtos, produtos frequentemente adquiridos em conjunto ou usuários com perfis semelhantes. Esses padrões são naturalmente modelados como grafos, onde nós representam usuários e produtos, e arestas representam interações (comprou, avaliou, visualizou, etc.). Bancos de dados orientados a grafos como o Neo4j permitem percorrer esses relacionamentos com eficiência por meio de consultas Cypher, tarefa que em um banco de dados relacional exigiria múltiplas junções e difícil otimização.</text:p>
        </text:list-item>
      </text:list>
      <text:h text:style-name="Heading_20_2" text:outline-level="2"><text:bookmark-start text:name="bancos-de-dados-nosql"/>Bancos de Dados NoSQL<text:bookmark-end text:name="bancos-de-dados-nosql"/></text:h>
      <text:p text:style-name="First_20_paragraph">Os bancos de dados NoSQL podem ser divididos em subcategorias com base em seus modelos de dados. Este trabalho utiliza a classificação de Hecht and Jablonski (2011), que categoriza os bancos de dados NoSQL em quatro tipos: chave-valor, colunares, documentos e grafos.</text:p>
      <text:p text:style-name="Text_20_body">A Figura <text:a xlink:type="simple" xlink:href="#fig:nosql-models" office:name=""><text:span text:style-name="Definition">2.2</text:span></text:a> ilustra esses modelos de dados, que são detalhados a seguir.</text:p>
      <text:p text:style-name="FigureWithCaption"><draw:frame draw:name="img2" svg:width="5.90551in" svg:height="0.4864366665130057in"><draw:image xlink:href="Pictures/1.png" xlink:type="simple" xlink:show="embed" xlink:actuate="onLoad"/></draw:frame></text:p>
      <text:p text:style-name="FigureWithCaption">Fonte: Elaborado pelo autor (2026).</text:p>
      <text:p text:style-name="FigureCaption">Diferentes tipos de modelos de dados NoSQL.</text:p>
      <text:h text:style-name="Heading_20_3" text:outline-level="3"><text:bookmark-start text:name="chave-valor"/>Chave-valor<text:bookmark-end text:name="chave-valor"/></text:h>
      <text:p text:style-name="First_20_paragraph">Os bancos de dados de chave-valor têm um modelo de dados simples baseado justamente em pares chave-valor, semelhante a um mapa associativo ou dicionário. A chave identifica exclusivamente o valor e é usada para armazenar e recuperar o valor no banco de dados, funcionando como uma chave primária. O valor pode ser usado para armazenar qualquer dado arbitrário, incluindo um número inteiro, uma <text:span text:style-name="Emphasis">string</text:span>, um <text:span text:style-name="Emphasis">array</text:span> ou um objeto, proporcionando uma representação de dados sem esquema conhecido.</text:p>
      <text:p text:style-name="Text_20_body">Além disso, os bancos de dados de chave-valor são muito eficientes no armazenamento de dados distribuídos, mas não são adequados para cenários que requerem a definição de relacionamentos entre dados ou esquemas fortemente estruturados. Qualquer funcionalidade que necessite desses requisitos deve ser implementada na aplicação cliente que interage com o banco de dados chave-valor.</text:p>
      <text:p text:style-name="Text_20_body">Como os valores são opacos para os bancos de dados, esses não podem lidar com consultas e indexações a nível de dados, podendo realizar consultas apenas por meio de chaves. Um exemplo de SGBD chave-valor é o Redis, que mantém os dados tanto na memória como no disco. A Figura <text:a xlink:type="simple" xlink:href="#fig:nosql-keyvalue" office:name=""><text:span text:style-name="Definition">2.3</text:span></text:a> ilustra o modelo com um exemplo de carrinho de compras e sessão de usuário, em que cada chave aponta para um valor opaco ao SGBD.</text:p>
      <text:p text:style-name="FigureWithCaption"><draw:frame draw:name="img3" svg:width="4.72441in" svg:height="3.6279594743344705in"><draw:image xlink:href="Pictures/2.png" xlink:type="simple" xlink:show="embed" xlink:actuate="onLoad"/></draw:frame></text:p>
      <text:p text:style-name="FigureWithCaption">Fonte: Elaborado pelo autor (2026).</text:p>
      <text:p text:style-name="FigureCaption">Modelo chave-valor: chaves apontando para valores arbitrários (Redis).</text:p>
      <text:h text:style-name="Heading_20_3" text:outline-level="3"><text:bookmark-start text:name="colunar"/>Colunar<text:bookmark-end text:name="colunar"/></text:h>
      <text:p text:style-name="First_20_paragraph">Em bancos de dados colunares, o conjunto de dados consiste em várias linhas, cada uma identificada por uma chave de linha única, semelhante a uma chave primária. Cada linha é composta por uma família (ou conjunto) de colunas, e diferentes linhas podem ter diferentes famílias de colunas. Semelhante aos bancos de dados de chave-valor, a chave de linha funciona como a chave, e o conjunto de famílias de colunas atua como o valor representado pela chave de linha. No entanto, colunas em uma família de colunas consistem em pares atributo-valor que podem ser indexadas. O SGBD Cassandra oferece a funcionalidade adicional de supercolunas, que são criadas agrupando várias colunas.</text:p>
      <text:p text:style-name="Text_20_body">Normalmente, os dados pertencentes a uma linha são armazenados juntos no mesmo nó do servidor. No entanto, o Cassandra pode distribuir uma única linha por vários nós de servidor usando chaves de partição compostas. Nos bancos de dados colunares, a configuração das famílias de colunas é tipicamente feita durante a inicialização. No entanto, a definição prévia de colunas não é necessária, oferecendo grande flexibilidade no armazenamento de qualquer tipo de dado.</text:p>
      <text:p text:style-name="Text_20_body">De forma semelhante aos bancos de dados de chave-valor, qualquer lógica que exija relações deve ser implementada na aplicação cliente, ou seja, essa categoria de banco de dados também não têm ciência de relacionamentos entre dados e controle de integridade referencial. A Figura <text:a xlink:type="simple" xlink:href="#fig:nosql-columnar" office:name=""><text:span text:style-name="Definition">2.4</text:span></text:a> apresenta um exemplo de <text:span text:style-name="Emphasis">log</text:span> de atividade, em que cada chave de linha (<text:span text:style-name="Source_20_Text">user_id</text:span>) agrupa uma família de colunas com eventos indexados por <text:span text:style-name="Emphasis">timestamp</text:span>.</text:p>
      <text:p text:style-name="FigureWithCaption"><draw:frame draw:name="img4" svg:width="4.72441in" svg:height="3.2713302141449274in"><draw:image xlink:href="Pictures/3.png" xlink:type="simple" xlink:show="embed" xlink:actuate="onLoad"/></draw:frame></text:p>
      <text:p text:style-name="FigureWithCaption">Fonte: Elaborado pelo autor (2026).</text:p>
      <text:p text:style-name="FigureCaption">Modelo colunar: chaves de linha e famílias de colunas (Cassandra).</text:p>
      <text:h text:style-name="Heading_20_3" text:outline-level="3"><text:bookmark-start text:name="documento"/>Documento<text:bookmark-end text:name="documento"/></text:h>
      <text:p text:style-name="First_20_paragraph">Bancos de dados orientados a documento armazenam dados como documentos autocontidos, em geral em formato JSON ou BSON. Cada documento possui um identificador e um conjunto de campos que podem variar entre documentos de uma mesma coleção, favorecendo esquemas flexíveis e agregados de leitura (<text:span text:style-name="Emphasis">read-optimized</text:span>). O SGBD MongoDB é um exemplo popular nesta categoria. Ele define coleções de documentos, índices secundários e <text:span text:style-name="Emphasis">pipelines</text:span> de agregação, permitindo consultas ricas sem exigir junções (<text:span text:style-name="Emphasis">joins</text:span>) no servidor. A Figura <text:a xlink:type="simple" xlink:href="#fig:nosql-document" office:name=""><text:span text:style-name="Definition">2.5</text:span></text:a> ilustra uma coleção de catálogo de produtos, em que cada documento é autocontido e pode conter subdocumentos aninhados (como <text:span text:style-name="Source_20_Text">category</text:span> e <text:span text:style-name="Source_20_Text">stock</text:span>) e campos distintos entre si.</text:p>
      <text:p text:style-name="FigureWithCaption"><draw:frame draw:name="img5" svg:width="3.93701in" svg:height="4.558640696210526in"><draw:image xlink:href="Pictures/4.png" xlink:type="simple" xlink:show="embed" xlink:actuate="onLoad"/></draw:frame></text:p>
      <text:p text:style-name="FigureWithCaption">Fonte: Elaborado pelo autor (2026).</text:p>
      <text:p text:style-name="FigureCaption">Modelo de documento: documentos autocontidos com campos variáveis (MongoDB).</text:p>
      <text:h text:style-name="Heading_20_3" text:outline-level="3"><text:bookmark-start text:name="grafo"/>Grafo<text:bookmark-end text:name="grafo"/></text:h>
      <text:p text:style-name="First_20_paragraph">Bancos de dados em grafo representam dados como <text:span text:style-name="Strong_20_Emphasis">nós</text:span> (entidades) e <text:span text:style-name="Strong_20_Emphasis">arestas</text:span> (relacionamentos tipados), com propriedades em ambos. Consultas exploram caminhos e vizinhanças de forma natural, o que é útil para recomendação, detecção de fraude e redes sociais. O Neo4j utiliza a linguagem Cypher para <text:span text:style-name="Source_20_Text">MERGE</text:span>/<text:span text:style-name="Source_20_Text">CREATE</text:span> de nós e relacionamentos.</text:p>
      <text:p text:style-name="Text_20_body">Na ferramenta proposta, o destino grafo exige que o usuário declare explicitamente quais colunas do CSV identificam cada rótulo de nó e quais colunas alimentam propriedades do relacionamento (por exemplo, comprador <draw:frame draw:style-name="fr1" text:anchor-type="as-char"><draw:object xlink:href="Formula-5/" xlink:type="simple" xlink:show="embed" xlink:actuate="onLoad"/></draw:frame> vendedor com atributos do pedido). A Figura <text:a xlink:type="simple" xlink:href="#fig:nosql-graph" office:name=""><text:span text:style-name="Definition">2.6</text:span></text:a> exemplifica um cenário de recomendação, em que nós <text:span text:style-name="Source_20_Text">User</text:span> e <text:span text:style-name="Source_20_Text">Product</text:span> são conectados por arestas tipadas (<text:span text:style-name="Source_20_Text">PURCHASED</text:span>, <text:span text:style-name="Source_20_Text">VIEWED</text:span>, <text:span text:style-name="Source_20_Text">SIMILAR_TO</text:span>), algumas portando propriedades próprias.</text:p>
      <text:p text:style-name="FigureWithCaption"><draw:frame draw:name="img6" svg:width="5.11811in" svg:height="2.33513779526625in"><draw:image xlink:href="Pictures/7.png" xlink:type="simple" xlink:show="embed" xlink:actuate="onLoad"/></draw:frame></text:p>
      <text:p text:style-name="FigureWithCaption">Fonte: Elaborado pelo autor (2026).</text:p>
      <text:p text:style-name="FigureCaption">Modelo de grafo: nós e arestas tipadas com propriedades (Neo4j).</text:p>
      <text:h text:style-name="Heading_20_2" text:outline-level="2"><text:bookmark-start text:name="bancos-de-dados-multimodelo-e-arquiteturas-de-persistência-poliglota"/>Bancos de Dados Multimodelo e Arquiteturas de Persistência Poliglota<text:bookmark-end text:name="bancos-de-dados-multimodelo-e-arquiteturas-de-persistência-poliglota"/></text:h>
      <text:p text:style-name="First_20_paragraph">SGBDs multimodelo integram mais de um paradigma de dados no mesmo motor de gerência de dados (por exemplo, documento + chave-valor + grafo), oferecendo em geral uma interface de acesso unificada — como a linguagem AQL do SGBD ArangoDB, que combina filtros sobre estruturas de documento similares ao JSON e travessias em grafos em uma única abstração de modelo de dados que combina ambos os modelos NoSQL.</text:p>
      <text:p text:style-name="Text_20_body">A persistência poliglota, por outro lado, combina vários SGBDs heterogêneos, cada um escolhido pela adequação a um caso de uso da aplicação (Sadalage and Fowler 2013). Na literatura recente, essa ideia materializa-se como um SGPD (Sistema de Gerenciamento Poliglota de Dados): coordenação transparente entre tecnologias distintas, com requisitos de modelagem e expressividade de acesso (diferentes padrões de consulta) e capacidade de adaptação quando o <text:span text:style-name="Emphasis">workload</text:span> evolui (Kiehn et al. 2022; Glake et al. 2022).</text:p>
      <text:p text:style-name="Text_20_body">Tan et al. (2017) apresentam uma taxonomia útil para distinguir arquiteturas relacionadas: BD federado (fontes homogêneas, interface única), BD multistore (fontes heterogêneas, modelo canônico de consulta), BD <text:span text:style-name="Emphasis">polystore</text:span> (fontes heterogêneas, múltiplas interfaces de acesso — exemplificadas por sistemas como o BigDAWG) e abordagens multimodelo (vários modelos no mesmo motor).</text:p>
      <text:p text:style-name="Text_20_body">A escolha entre essas arquiteturas não é trivial. Roy-Hubara et al. (2022) propõem critérios para selecionar quais modelos de dados usar em aplicações de persistência poliglota, destacando o <text:span text:style-name="Emphasis">trade-off</text:span> entre especialização por SGBD e simplicidade operacional de um motor multimodelo.</text:p>
      <text:p text:style-name="Text_20_body">O <text:span text:style-name="Emphasis">Polyglot Import CSV</text:span> adota explicitamente a linha da persistência poliglota ao invés de multimodelo, conforme detalhado no capítulo 4. O usuário direciona entidades e filtros para PostgreSQL, Redis, MongoDB, Cassandra e Neo4j conforme o padrão de representação e acesso desejados.</text:p>
      <text:h text:style-name="Heading_20_1" text:outline-level="1"><text:bookmark-start text:name="trabalhos-relacionados"/>Trabalhos Relacionados<text:bookmark-end text:name="trabalhos-relacionados"/></text:h>
      <text:p text:style-name="First_20_paragraph">Este capítulo apresenta e discute ferramentas oferecidas na indústria por SGBDs e também propostas na literatura acadêmica relacionadas com a importação de dados por SGBDs heterogêneos. A preferência está em dados no formato CSV que devem ser importados por alguma tecnologia de banco de dados, que é o foco deste trabalho.</text:p>
      <text:h text:style-name="Heading_20_2" text:outline-level="2"><text:bookmark-start text:name="importação-de-arquivo-csv-para-um-único-sgbd"/>Importação de Arquivo CSV para um Único SGBD<text:bookmark-end text:name="importação-de-arquivo-csv-para-um-único-sgbd"/></text:h>
      <text:p text:style-name="First_20_paragraph">Esta seção investiga mecanismos de importação de dados presentes em SGBDs populares na indústria que são considerados neste trabalho.</text:p>
      <text:h text:style-name="Heading_20_3" text:outline-level="3"><text:bookmark-start text:name="postgresql"/>PostgreSQL<text:bookmark-end text:name="postgresql"/></text:h>
      <text:p text:style-name="First_20_paragraph">No SGBD PostgreSQL você utiliza o comando <text:span text:style-name="Source_20_Text">COPY</text:span> para realizar importações de dados CSV (The PostgreSQL Global Development Group 2026). É necessário especificar a tabela com os nomes das colunas após a cláusula <text:span text:style-name="Source_20_Text">COPY</text:span>. A ordem das colunas deve ser a mesma que aquelas no arquivo CSV, conforme ilustra o exemplo a seguir:</text:p>
      <text:p text:style-name="Preformatted_20_Text">COPY nome_da_tabela(col1, col2, col3)</text:p>
      <text:p text:style-name="Preformatted_20_Text">FROM 'C:/caminho_do_arquivo/dados_de_amostra.csv'</text:p>
      <text:p text:style-name="Preformatted_20_Text">DELIMITER ','</text:p>
      <text:p text:style-name="Preformatted_20_Text">CSV HEADER;</text:p>
      <text:p text:style-name="First_20_paragraph">Caso o arquivo CSV contenha todas as colunas da tabela, você não precisa especificá-las explicitamente:</text:p>
      <text:p text:style-name="Preformatted_20_Text">COPY nome_da_tabela</text:p>
      <text:p text:style-name="Preformatted_20_Text">FROM 'C:/caminho_do_arquivo/dados_de_amostra.csv'</text:p>
      <text:p text:style-name="Preformatted_20_Text">DELIMITER ','</text:p>
      <text:p text:style-name="Preformatted_20_Text">CSV HEADER;</text:p>
      <text:p text:style-name="First_20_paragraph">Você também deve inserir o caminho do arquivo CSV após a palavra-chave <text:span text:style-name="Source_20_Text">FROM</text:span>. Como o formato do arquivo é CSV, você precisa especificar <text:span text:style-name="Source_20_Text">DELIMITER</text:span>, bem como a cláusula <text:span text:style-name="Source_20_Text">CSV</text:span>. A cláusula <text:span text:style-name="Source_20_Text">HEADER</text:span> deve ser especificada para indicar que o arquivo CSV contém um cabeçalho. Quando o comando <text:span text:style-name="Source_20_Text">COPY</text:span> importa dados, ele ignora o cabeçalho do arquivo.</text:p>
      <text:p text:style-name="Text_20_body">O arquivo CSV deve ser lido diretamente pelo servidor PostgreSQL, não pela aplicação cliente. Portanto, ele deve ser acessível pela máquina do servidor PostgreSQL. Além disso, é necessário ter permissão de superusuário para executar com sucesso o comando <text:span text:style-name="Source_20_Text">COPY</text:span>.</text:p>
      <text:h text:style-name="Heading_20_3" text:outline-level="3"><text:bookmark-start text:name="redis"/>Redis<text:bookmark-end text:name="redis"/></text:h>
      <text:p text:style-name="First_20_paragraph">A maneira preferida de importar uma massa de dados para o Redis é gerar um arquivo de texto contendo o protocolo Redis, em formato bruto, para chamar os comandos necessários para inserir os dados requeridos (Redis Ltd. 2026).</text:p>
      <text:p text:style-name="Text_20_body">Por exemplo, se é necessário gerar um grande conjunto de dados com bilhões de chaves no formato “chaveN <draw:frame draw:style-name="fr1" text:anchor-type="as-char"><draw:object xlink:href="Formula-8/" xlink:type="simple" xlink:show="embed" xlink:actuate="onLoad"/></draw:frame> ValorN”, deve ser criado um arquivo contendo os seguintes comandos:</text:p>
      <text:p text:style-name="Preformatted_20_Text">SET Chave0 Valor0</text:p>
      <text:p text:style-name="Preformatted_20_Text">SET Chave1 Valor1</text:p>
      <text:p text:style-name="Preformatted_20_Text">...</text:p>
      <text:p text:style-name="Preformatted_20_Text">SET ChaveN ValorN</text:p>
      <text:p text:style-name="First_20_paragraph">Uma vez criado esse arquivo, a ação restante é alimentá-lo no Redis. No passado, a maneira de fazer isso era usar o netcat com o seguinte comando:</text:p>
      <text:p text:style-name="Preformatted_20_Text">(cat dados.txt; sleep 10) | nc localhost 6379</text:p>
      <text:p text:style-name="First_20_paragraph">Nas versões 2.6 ou posteriores do Redis, o utilitário <text:span text:style-name="Source_20_Text">redis-cli</text:span> suporta um novo modo chamado modo <text:span text:style-name="Emphasis">pipe</text:span> que foi projetado para realizar o carregamento em massa. O comando a ser executado neste caso é o seguinte:</text:p>
      <text:p text:style-name="Preformatted_20_Text">cat dados.txt | redis-cli --pipe</text:p>
      <text:p text:style-name="First_20_paragraph">O utilitário <text:span text:style-name="Source_20_Text">redis-cli</text:span> imprime um pequeno resumo. A saída típica é semelhante a esta:</text:p>
      <text:p text:style-name="Preformatted_20_Text">All data transferred. Waiting for the last reply...</text:p>
      <text:p text:style-name="Preformatted_20_Text">Last reply received from server.</text:p>
      <text:p text:style-name="Preformatted_20_Text">errors: 0, replies: 1000000</text:p>
      <text:p text:style-name="First_20_paragraph">A linha de contagem ao final é a informação mais importante do resumo: <text:span text:style-name="Source_20_Text">errors</text:span> indica quantos comandos foram rejeitados pelo servidor, e <text:span text:style-name="Source_20_Text">replies</text:span> indica o total de respostas recebidas. Se <text:span text:style-name="Source_20_Text">errors: 0</text:span>, todos os comandos foram processados com sucesso. Um valor maior que zero em <text:span text:style-name="Source_20_Text">errors</text:span> significa que ao menos um comando falhou — seja por sintaxe inválida no arquivo, por tipo de dado incompatível com a chave existente, ou por qualquer outra razão que o Redis tenha rejeitado.</text:p>
      <text:p text:style-name="Text_20_body">Vale notar que o <text:span text:style-name="Source_20_Text">--pipe</text:span> não exibe cada resposta individualmente (como um <text:span text:style-name="Source_20_Text">+OK</text:span> por <text:span text:style-name="Source_20_Text">SET</text:span>), o que é intencional: imprimir bilhões de respostas destruiria o ganho de <text:span text:style-name="Emphasis">performance</text:span> do modo <text:span text:style-name="Emphasis">pipe</text:span> e inundaria o terminal. Em vez disso, o <text:span text:style-name="Source_20_Text">redis-cli</text:span> lê e contabiliza todas as respostas silenciosamente conforme chegam, entregando apenas o agregado final.</text:p>
      <text:p text:style-name="Text_20_body">Por fim, uma verificação útil: o valor de <text:span text:style-name="Source_20_Text">replies</text:span> deve ser igual ao número de comandos enviados. Uma divergência entre os dois pode indicar que o arquivo de entrada estava truncado ou malformado, mesmo que <text:span text:style-name="Source_20_Text">errors</text:span> apareça como zero.</text:p>
      <text:h text:style-name="Heading_20_3" text:outline-level="3"><text:bookmark-start text:name="mongodb"/>MongoDB<text:bookmark-end text:name="mongodb"/></text:h>
      <text:p text:style-name="First_20_paragraph">No SGBD MongoDB, o processo de importação de dados em formato CSV é realizado através do utilitário <text:span text:style-name="Source_20_Text">mongoimport</text:span> (MongoDB, Inc. 2026). Sua sintaxe básica exige que se informe o banco de dados de destino através do parâmetro <text:span text:style-name="Source_20_Text">--db</text:span>, seguido do nome da coleção que receberá os dados, especificado em <text:span text:style-name="Source_20_Text">--collection</text:span>. Caso esse último parâmetro seja omitido, o nome da coleção será automaticamente inferido a partir do nome do arquivo CSV fornecido.</text:p>
      <text:p text:style-name="Preformatted_20_Text">mongoimport --db nome_do_db --collection nome_da_colecao \</text:p>
      <text:p text:style-name="Preformatted_20_Text"><text:s text:c="2"/>--type csv --headerline --ignoreBlanks \</text:p>
      <text:p text:style-name="Preformatted_20_Text"><text:s text:c="2"/>--file caminho/do/arquivo.csv</text:p>
      <text:p text:style-name="First_20_paragraph">O tipo do arquivo de entrada deve ser declarado explicitamente através do parâmetro <text:span text:style-name="Source_20_Text">--type</text:span>, que neste caso recebe o valor <text:span text:style-name="Source_20_Text">csv</text:span>. Para que o <text:span text:style-name="Source_20_Text">mongoimport</text:span> reconheça os nomes dos campos a partir do próprio arquivo, utiliza-se o parâmetro <text:span text:style-name="Source_20_Text">--headerline</text:span>, que instrui o utilitário a tratar o conteúdo da primeira linha do CSV como o cabeçalho dos campos. Opcionalmente, o parâmetro <text:span text:style-name="Source_20_Text">--ignoreBlanks</text:span> pode ser utilizado para que valores em branco presentes no arquivo sejam ignorados durante a importação, evitando que campos vazios sejam persistidos na coleção. Por fim, o caminho do arquivo CSV a ser importado é fornecido através do parâmetro <text:span text:style-name="Source_20_Text">--file</text:span>.</text:p>
      <text:h text:style-name="Heading_20_3" text:outline-level="3"><text:bookmark-start text:name="cassandra"/>Cassandra<text:bookmark-end text:name="cassandra"/></text:h>
      <text:p text:style-name="First_20_paragraph">A importação de dados CSV para o Cassandra utiliza o comando <text:span text:style-name="Source_20_Text">sstableloader</text:span> e envolve vários passos (The Apache Software Foundation 2026). Inicialmente, é necessário se certificar que o arquivo CSV está no formato adequado para o Cassandra. Isso geralmente envolve garantir que os tipos de dados e as colunas correspondem ao esquema da tabela no Cassandra.</text:p>
      <text:p text:style-name="Text_20_body">O <text:span text:style-name="Source_20_Text">sstableloader</text:span> requer que os dados estejam em um formato específico chamado SSTable. Para converter o CSV em SSTables, você pode usar o comando <text:span text:style-name="Source_20_Text">cqlsh</text:span> fornecido pelo Cassandra. Um exemplo de uso é o seguinte:</text:p>
      <text:p text:style-name="Preformatted_20_Text">cqlsh -e "COPY keyspace_name.table_name TO 'output_directory';"</text:p>
      <text:p text:style-name="First_20_paragraph">Na sequência, é possível usar o <text:span text:style-name="Source_20_Text">sstableloader</text:span> para carregar os dados. A sintaxe do comando é a seguinte:</text:p>
      <text:p text:style-name="Preformatted_20_Text">sstableloader -d &lt;hostname&gt; -u &lt;username&gt; -pw &lt;password&gt; \</text:p>
      <text:p text:style-name="Preformatted_20_Text"><text:s text:c="2"/>output_directory/keyspace_name/table_name</text:p>
      <text:list text:style-name="List_20_1">
        <text:list-item>
          <text:p text:style-name="List_20_Bullet"><text:span text:style-name="Source_20_Text">&lt;hostname&gt;</text:span>: O endereço do nó Cassandra.</text:p>
        </text:list-item>
        <text:list-item>
          <text:p text:style-name="List_20_Bullet"><text:span text:style-name="Source_20_Text">&lt;username&gt;</text:span>: O nome de usuário, se a autenticação estiver habilitada.</text:p>
        </text:list-item>
        <text:list-item>
          <text:p text:style-name="List_20_Bullet"><text:span text:style-name="Source_20_Text">&lt;password&gt;</text:span>: A senha correspondente.</text:p>
        </text:list-item>
      </text:list>
      <text:p text:style-name="First_20_paragraph">Este comando move os dados do diretório de saída para o Cassandra.</text:p>
      <text:h text:style-name="Heading_20_3" text:outline-level="3"><text:bookmark-start text:name="neo4j"/>Neo4j<text:bookmark-end text:name="neo4j"/></text:h>
      <text:p text:style-name="First_20_paragraph">Usar <text:span text:style-name="Source_20_Text">neo4j-admin</text:span> para importar grandes conjuntos de dados no Neo4j envolve alguns passos (Neo4j, Inc. 2026). Esta ferramenta de linha de comando é projetada para importações em massa eficientes.</text:p>
      <text:p text:style-name="Text_20_body">Certifique-se de que seus arquivos CSV estejam estruturados corretamente e sigam o formato necessário para nós e relacionamentos. Crie um banco de dados não povoado:</text:p>
      <text:p text:style-name="Preformatted_20_Text">neo4j-admin create-db --database=nome_do_seu_banco_de_dados \</text:p>
      <text:p text:style-name="Preformatted_20_Text"><text:s text:c="2"/>--from=diretorio_com_arquivos_csv</text:p>
      <text:p text:style-name="First_20_paragraph">Substitua <text:span text:style-name="Source_20_Text">nome_do_seu_banco_de_dados</text:span> pelo nome desejado para o novo banco de dados. A opção <text:span text:style-name="Source_20_Text">--from</text:span> especifica o diretório onde estão localizados seus arquivos CSV. Execute o comando de importação com <text:span text:style-name="Source_20_Text">neo4j-admin</text:span>. O comando exato depende do seu modelo de dados, mas pode se parecer com isto:</text:p>
      <text:p text:style-name="Preformatted_20_Text">neo4j-admin import --database=nome_do_seu_banco_de_dados \</text:p>
      <text:p text:style-name="Preformatted_20_Text"><text:s text:c="2"/>--mode=csv \</text:p>
      <text:p text:style-name="Preformatted_20_Text"><text:s text:c="2"/>--nodes:Rotulo1 nos.csv \</text:p>
      <text:p text:style-name="Preformatted_20_Text"><text:s text:c="2"/>--nodes:Rotulo2 nos2.csv \</text:p>
      <text:p text:style-name="Preformatted_20_Text"><text:s text:c="2"/>--relationships:TIPO_RELACIONAMENTO relacionamentos.csv</text:p>
      <text:p text:style-name="First_20_paragraph">Substitua <text:span text:style-name="Emphasis">Rotulo1</text:span>, <text:span text:style-name="Emphasis">Rotulo2</text:span>, <text:span text:style-name="Emphasis">nos.csv</text:span>, <text:span text:style-name="Emphasis">nos2.csv</text:span>, <text:span text:style-name="Emphasis">TIPO_RELACIONAMENTO</text:span> e <text:span text:style-name="Emphasis">relacionamentos.csv</text:span> pelos seus rótulos específicos e nomes de arquivo.</text:p>
      <text:h text:style-name="Heading_20_2" text:outline-level="2"><text:bookmark-start text:name="importação-de-arquivo-csv-para-sgbd-multimodelo"/>Importação de Arquivo CSV para SGBD Multimodelo<text:bookmark-end text:name="importação-de-arquivo-csv-para-sgbd-multimodelo"/></text:h>
      <text:p text:style-name="First_20_paragraph">Ferramentas comerciais e de código aberto tratam de <text:span text:style-name="Strong_20_Emphasis">migração</text:span> ou <text:span text:style-name="Strong_20_Emphasis">modelagem</text:span> entre tecnologias heterogêneas, embora raramente com o foco deste TCC (um único CSV largo + regras declarativas + cinco paradigmas).</text:p>
      <text:list text:style-name="List_20_1">
        <text:list-item>
          <text:p text:style-name="List_20_Bullet"><text:span text:style-name="Strong_20_Emphasis">ArangoDB</text:span> é um SGBD multimodelo nativo (documento/chave-valor/grafo) com <text:span text:style-name="Source_20_Text">arangoimport</text:span> para CSV; a importação é para <text:span text:style-name="Strong_20_Emphasis">um</text:span> motor multimodelo, não para cinco <text:span text:style-name="Emphasis">backends</text:span> independentes.</text:p>
        </text:list-item>
        <text:list-item>
          <text:p text:style-name="List_20_Bullet"><text:span text:style-name="Source_20_Text">mongoimport</text:span><text:span text:style-name="Strong_20_Emphasis"> / </text:span><text:span text:style-name="Source_20_Text">COPY</text:span><text:span text:style-name="Strong_20_Emphasis"> / </text:span><text:span text:style-name="Source_20_Text">redis-cli --pipe</text:span><text:span text:style-name="Strong_20_Emphasis"> / </text:span><text:span text:style-name="Source_20_Text">cqlsh</text:span><text:span text:style-name="Strong_20_Emphasis"> / </text:span><text:span text:style-name="Source_20_Text">neo4j-admin</text:span> (seção 3.1) cobrem importação <text:span text:style-name="Strong_20_Emphasis">para um único</text:span> produto por vez.</text:p>
        </text:list-item>
        <text:list-item>
          <text:p text:style-name="List_20_Bullet"><text:span text:style-name="Strong_20_Emphasis">dbcrossbar</text:span> (<text:span text:style-name="Emphasis">Dbcrossbar</text:span> 2024) copia dados tabulares entre PostgreSQL, BigQuery, armazenamento em nuvem e CSV, incluindo conversão de esquemas; a ênfase é <text:span text:style-name="Emphasis">pipeline</text:span> de migração, não mapeamento semântico de entidades aninhadas com filtros por valor.</text:p>
        </text:list-item>
        <text:list-item>
          <text:p text:style-name="List_20_Bullet"><text:span text:style-name="Strong_20_Emphasis">Hackolade</text:span> (Hackolade 2024) oferece <text:span text:style-name="Emphasis">polyglot data modeling</text:span> com engenharia de esquema para dezenas de alvos; trata-se de <text:span text:style-name="Strong_20_Emphasis">modelagem visual</text:span> e geração de artefatos, e não de um utilitário CLI único para importar um CSV operacional com validação prévia de filtros.</text:p>
        </text:list-item>
      </text:list>
      <text:h text:style-name="Heading_20_2" text:outline-level="2"><text:bookmark-start text:name="considerações-sobre-os-trabalhos-relacionados"/>Considerações sobre os Trabalhos Relacionados<text:bookmark-end text:name="considerações-sobre-os-trabalhos-relacionados"/></text:h>
      <text:p text:style-name="First_20_paragraph">A literatura sobre <text:span text:style-name="Strong_20_Emphasis">metamodelos unificados</text:span> para SQL e NoSQL (por exemplo, U-Schema (Berlanga et al. 2021)) e sobre <text:span text:style-name="Strong_20_Emphasis">evolução de esquema</text:span> em ambientes heterogêneos (Chillón et al. 2023, 2024) informa decisões de validação e de representação de entidades no JSON de configuração, mas não substitui uma ferramenta de <text:span text:style-name="Emphasis">bulk import</text:span> orientada a CSV.</text:p>
      <text:p text:style-name="Text_20_body"><text:span text:style-name="Emphasis">Surveys</text:span> recentes convergem em desafios abertos da gestão poliglota de dados: migração automatizada entre <text:span text:style-name="Emphasis">stores</text:span> quando o <text:span text:style-name="Emphasis">workload</text:span> muda, planejamento de consultas entre sistemas, gestão de esquemas multi-modelo e preservação das propriedades não funcionais de cada SGBD (Kiehn et al. 2022; Glake et al. 2022). Roy-Hubara et al. (2022) tratam da <text:span text:style-name="Strong_20_Emphasis">seleção de SGBDs</text:span> por fragmento de aplicação; Silva et al. (2024) mapeiam o estado da arte em <text:span text:style-name="Strong_20_Emphasis">modelagem poliglota</text:span>. Nenhum desses trabalhos implementa, contudo, um utilitário declarativo que receba um CSV operacional único e o materialize simultaneamente em cinco paradigmas distintos com validação estática prévia.</text:p>
      <text:p text:style-name="Text_20_body">Abordagens recentes reforçam essa tendência. Pereira et al. (2025) propõem um <text:span text:style-name="Emphasis">framework</text:span> de persistência poliglota <text:span text:style-name="Strong_20_Emphasis">transparente</text:span>, com uma API unificada e extensível a diferentes tipos de banco, enquanto Sachdeva and Vasava (2024) exploram a combinação de bancos <text:span text:style-name="Strong_20_Emphasis">multimodelo</text:span> e persistência poliglota para acomodar a variedade dos dados. Ambos os trabalhos atuam, porém, na <text:span text:style-name="Strong_20_Emphasis">camada de acesso da aplicação</text:span> — oferecendo uma interface única para ler e gravar em múltiplos SGBDs em tempo de execução —, e não na <text:span text:style-name="Strong_20_Emphasis">carga inicial declarativa</text:span> a partir de um CSV operacional, que é o foco da <text:span text:style-name="Emphasis">Polyglot Import CSV</text:span>.</text:p>
      <text:p text:style-name="Text_20_body">Sistemas <text:span text:style-name="Emphasis">polystore</text:span> como o BigDAWG (Duggan et al. 2017) e <text:span text:style-name="Emphasis">middlewares</text:span> de portabilidade em nuvem (Wang et al. 2020) tratam de <text:span text:style-name="Strong_20_Emphasis">consultas federadas</text:span> e movimentação de dados em ecossistemas complexos. Tan et al. (2017) classificam essas soluções (federado, multistore, polystore, poliglota) e avaliam transparência, autonomia e heterogeneidade — eixos nos quais importadores nativos (seção 3.1) e ferramentas de migração (seção 3.2) também divergem, mas sem convergir para um <text:span text:style-name="Emphasis">pipeline</text:span> único de ingestão.</text:p>
      <text:p text:style-name="Text_20_body">Ferramentas como <text:span text:style-name="Strong_20_Emphasis">dbcrossbar</text:span> (<text:span text:style-name="Emphasis">Dbcrossbar</text:span> 2024) e <text:span text:style-name="Strong_20_Emphasis">Hackolade</text:span> (Hackolade 2024) aproximam-se do domínio de integração de dados, porém com foco em <text:span text:style-name="Emphasis">pipelines</text:span> de migração ou modelagem visual, respectivamente — não em regras declarativas sobre entidades aninhadas, filtros por valor (<text:span text:style-name="Source_20_Text">each</text:span>) e validação por JSON Schema antes de qualquer conexão com SGBDs.</text:p>
      <text:p text:style-name="Text_20_body"><text:span text:style-name="Strong_20_Emphasis">Lacuna identificada:</text:span> a combinação de (i) um CSV largo como fonte operacional, (ii) configuração JSON validada estaticamente, (iii) materialização distinta por paradigma (relacional, chave-valor, documento, colunar, grafo) e (iv) modo <text:span text:style-name="Emphasis">dry-run</text:span> para revisão prévia. O <text:span text:style-name="Emphasis">Polyglot Import CSV</text:span> ocupa essa lacuna como ferramenta de <text:span text:style-name="Strong_20_Emphasis">bootstrap de persistência poliglota</text:span> — carga inicial e reprodutível de dados — enquanto <text:span text:style-name="Emphasis">middlewares</text:span> e <text:span text:style-name="Emphasis">polystores</text:span> assumem dados já residentes ou consultas em tempo de execução. Trabalhos futuros podem integrar a ferramenta a mecanismos de migração adaptativa descritos por Kiehn et al. (2022) e Glake et al. (2022).</text:p>
      <text:h text:style-name="Heading_20_1" text:outline-level="1"><text:bookmark-start text:name="a-proposta-da-ferramenta-polyglotimportcsv"/>A Proposta da Ferramenta PolyglotImportCSV<text:bookmark-end text:name="a-proposta-da-ferramenta-polyglotimportcsv"/></text:h>
      <text:h text:style-name="Heading_20_2" text:outline-level="2"><text:bookmark-start text:name="visão-geral-1"/>Visão Geral<text:bookmark-end text:name="visão-geral-1"/></text:h>
      <text:p text:style-name="First_20_paragraph">A ferramenta <text:span text:style-name="Strong_20_Emphasis">PolyglotImportCSV</text:span> (pacote Python <text:span text:style-name="Source_20_Text">polyglot-import-csv</text:span>) lê um arquivo CSV e <text:span text:style-name="Strong_20_Emphasis">dois arquivos de configuração JSON</text:span> — um de importação (mapeamento) e um de conexão dos SGBDs — cada um validado por um <text:span text:style-name="Strong_20_Emphasis">JSON Schema</text:span> embutido. A CLI executa, em sequência:</text:p>
      <text:list text:style-name="Numbering_20_1">
        <text:list-item>
          <text:p text:style-name="List_20_Number">Carregamento do CSV (como texto, para evitar erros de <text:span text:style-name="Emphasis">parse</text:span> em campos com <text:span text:style-name="Source_20_Text">+</text:span> em <text:span text:style-name="Emphasis">timestamps</text:span>).</text:p>
        </text:list-item>
        <text:list-item>
          <text:p text:style-name="List_20_Number">Inferência de <text:span text:style-name="Emphasis">kinds</text:span> de coluna (inteiro, <text:span text:style-name="Emphasis">float</text:span>, data/hora, texto) para validar operadores de filtro.</text:p>
        </text:list-item>
        <text:list-item>
          <text:p text:style-name="List_20_Number">Validação cruzada: colunas referenciadas existem no CSV; relacionamentos PostgreSQL e Neo4j referenciam entidades conhecidas; chaves de partição Cassandra estão declaradas quando necessário.</text:p>
        </text:list-item>
        <text:list-item>
          <text:p text:style-name="List_20_Number">Para cada <text:span text:style-name="Emphasis">backend</text:span> configurado: aplicação de filtros (incluindo o operador <text:span text:style-name="Source_20_Text">each</text:span> para particionar por valor distinto), materialização de entidades e importação (ou apenas resumo em <text:span text:style-name="Source_20_Text">--dry-run</text:span>).</text:p>
        </text:list-item>
      </text:list>
      <text:p text:style-name="First_20_paragraph">Comando principal:</text:p>
      <text:p text:style-name="Preformatted_20_Text">python -m polyglotimportcsv caminho/dados.csv \</text:p>
      <text:p text:style-name="Preformatted_20_Text"><text:s text:c="2"/>--config caminho/import_config.json \</text:p>
      <text:p text:style-name="Preformatted_20_Text"><text:s text:c="2"/>--sgbd-config caminho/sgbd_config.json \</text:p>
      <text:p text:style-name="Preformatted_20_Text"><text:s text:c="2"/>[--dry-run] \</text:p>
      <text:p text:style-name="Preformatted_20_Text"><text:s text:c="2"/>[--create-schema / --no-create-schema] \</text:p>
      <text:p text:style-name="Preformatted_20_Text"><text:s text:c="2"/>[--only postgres,redis]</text:p>
      <text:h text:style-name="Heading_20_2" text:outline-level="2"><text:bookmark-start text:name="sec:config-format"/>Formato de Configuração (JSON Schema)<text:bookmark-end text:name="sec:config-format"/></text:h>
      <text:p text:style-name="First_20_paragraph">A configuração é dividida em <text:span text:style-name="Strong_20_Emphasis">dois arquivos JSON</text:span>, cada um validado estaticamente por um <text:span text:style-name="Strong_20_Emphasis">JSON Schema</text:span> próprio embutido em <text:span text:style-name="Source_20_Text">src/polyglotimportcsv/schemas/</text:span> (rascunho 2020-12):</text:p>
      <text:list text:style-name="List_20_1">
        <text:list-item>
          <text:p text:style-name="List_20_Bullet"><text:span text:style-name="Source_20_Text">import_config.json</text:span> — o <text:span text:style-name="Strong_20_Emphasis">mapeamento</text:span> de entidades, relacionamentos e colunas do CSV para cada SGBD;</text:p>
        </text:list-item>
        <text:list-item>
          <text:p text:style-name="List_20_Bullet"><text:span text:style-name="Source_20_Text">sgbd_config.json</text:span> — a <text:span text:style-name="Strong_20_Emphasis">configuração de conexão</text:span> de cada SGBD, isto é, quais bancos estão disponíveis e como alcançá-los.</text:p>
        </text:list-item>
      </text:list>
      <text:p text:style-name="First_20_paragraph">Essa separação atende a duas preocupações distintas: o <text:span text:style-name="Emphasis">mapeamento</text:span> muda conforme o domínio dos dados; a <text:span text:style-name="Emphasis">conexão</text:span> muda conforme o ambiente (desenvolvimento, testes, produção). Um SGBD só pode ser referenciado no arquivo de importação se estiver <text:span text:style-name="Strong_20_Emphasis">declarado</text:span> no arquivo de conexão — esta e as demais regras de validação são detalhadas na seção <text:a xlink:type="simple" xlink:href="#sec:validacao" office:name=""><text:span text:style-name="Definition">4.2.8</text:span></text:a>. A representação completa de ambos os schemas na forma serializada JSON Schema 2020-12 encontra-se no Apêndice <text:a xlink:type="simple" xlink:href="#ap:schemas" office:name=""><text:span text:style-name="Definition">7</text:span></text:a>.</text:p>
      <text:h text:style-name="Heading_20_3" text:outline-level="3"><text:bookmark-start text:name="sec:visao-schema"/>Visão Geral da Estrutura<text:bookmark-end text:name="sec:visao-schema"/></text:h>
      <text:p text:style-name="First_20_paragraph">Antes de detalhar cada <text:span text:style-name="Emphasis">backend</text:span> individualmente, esta subseção apresenta a estrutura dos dois schemas como um todo, fornecendo um mapa mental que orienta a leitura das subseções seguintes. A Figura <text:a xlink:type="simple" xlink:href="#fig:config-schema" office:name=""><text:span text:style-name="Definition">4.1</text:span></text:a> sintetiza graficamente os dois JSON Schemas: o de importação (<text:span text:style-name="Source_20_Text">import_config</text:span>) no topo e o de conexão (<text:span text:style-name="Source_20_Text">sgbd_config</text:span>) na base, ambos à esquerda. O diagrama torna desnecessária a leitura do schema serializado integral — mantido no Apêndice <text:a xlink:type="simple" xlink:href="#ap:schemas" office:name=""><text:span text:style-name="Definition">7</text:span></text:a> — para a compreensão geral da configuração.</text:p>
      <text:p text:style-name="FigureWithCaption"><draw:frame draw:name="img7" svg:width="3568.0pt" svg:height="2648.0pt"><draw:image xlink:href="Pictures/10.png" xlink:type="simple" xlink:show="embed" xlink:actuate="onLoad"/></draw:frame></text:p>
      <text:p text:style-name="FigureWithCaption">Fonte: Elaborado pelo autor (2026).</text:p>
      <text:p text:style-name="FigureCaption">Estrutura dos dois JSON Schemas de configuração (importação e conexão).</text:p>
      <text:p text:style-name="Text_20_body"><text:span text:style-name="Strong_20_Emphasis">Raízes simétricas.</text:span> Ambos os schemas partilham a mesma raiz: um campo <text:span text:style-name="Source_20_Text">version</text:span> obrigatório e um bloco opcional por <text:span text:style-name="Emphasis">backend</text:span> (<text:span text:style-name="Source_20_Text">postgres</text:span>, <text:span text:style-name="Source_20_Text">mongodb</text:span>, <text:span text:style-name="Source_20_Text">cassandra</text:span>, <text:span text:style-name="Source_20_Text">redis</text:span>, <text:span text:style-name="Source_20_Text">neo4j</text:span>), com <text:span text:style-name="Source_20_Text">additionalProperties: false</text:span> rejeitando chaves desconhecidas. A diferença está no conteúdo de cada bloco: no arquivo de importação ele descreve <text:span text:style-name="Emphasis">o que</text:span> mapear; no de conexão, <text:span text:style-name="Emphasis">onde</text:span> gravar.</text:p>
      <text:p text:style-name="Text_20_body"><text:span text:style-name="Strong_20_Emphasis">O arquivo de importação e a definição reutilizável </text:span><text:span text:style-name="Source_20_Text">entity</text:span><text:span text:style-name="Strong_20_Emphasis">.</text:span> Seguindo as setas a partir de <text:span text:style-name="Source_20_Text">import_config</text:span>, cada bloco de <text:span text:style-name="Emphasis">backend</text:span> expande-se em um mapa <text:span text:style-name="Source_20_Text">entities</text:span> (e, para PostgreSQL e Neo4j, também em <text:span text:style-name="Source_20_Text">relationships</text:span>). O ponto central do diagrama — e da economia de vocabulário do schema — é que <text:span text:style-name="Strong_20_Emphasis">todas as entidades, de todos os </text:span><text:span text:style-name="T1">backends</text:span><text:span text:style-name="Strong_20_Emphasis">, convergem para uma única definição reutilizável</text:span>, rotulada <text:span text:style-name="Source_20_Text">entity</text:span>. Em vez de cinco formatos distintos, há apenas um: toda entidade possui um mapa <text:span text:style-name="Source_20_Text">columns</text:span> (o mapeamento de colunas) e, opcionalmente, <text:span text:style-name="Source_20_Text">filters</text:span> (predicados sobre as linhas do CSV) e os campos específicos do Cassandra (<text:span text:style-name="Source_20_Text">cassandra_partition</text:span> e <text:span text:style-name="Source_20_Text">cassandra_cluster</text:span>).</text:p>
      <text:p text:style-name="Text_20_body"><text:span text:style-name="Strong_20_Emphasis">O mapeamento recursivo de colunas.</text:span> À direita do diagrama, <text:span text:style-name="Source_20_Text">columns</text:span> remete a <text:span text:style-name="Source_20_Text">columnEntry</text:span>, definido como uma escolha (<text:span text:style-name="Source_20_Text">oneOf</text:span>) entre duas formas: (i) uma <text:span text:style-name="Strong_20_Emphasis">folha</text:span> — o <text:span text:style-name="Source_20_Text">columnSpec</text:span>, que liga uma coluna do CSV a um atributo do destino por meio dos campos <text:span text:style-name="Source_20_Text">csv_column</text:span>, <text:span text:style-name="Source_20_Text">schema_column</text:span>, <text:span text:style-name="Source_20_Text">is_key</text:span> e <text:span text:style-name="Source_20_Text">db_type</text:span>; ou (ii) um <text:span text:style-name="Strong_20_Emphasis">objeto aninhado</text:span>, que contém novos <text:span text:style-name="Source_20_Text">columnEntry</text:span>. Essa recursão é o que permite, com um único mecanismo, tanto o mapeamento plano (PostgreSQL, Cassandra, Redis) quanto os subdocumentos do MongoDB. As arestas tipadas do Neo4j e as chaves estrangeiras do PostgreSQL aparecem em <text:span text:style-name="Source_20_Text">relationships</text:span>, reutilizando o mesmo <text:span text:style-name="Source_20_Text">columnSpec</text:span> para eventuais propriedades.</text:p>
      <text:p text:style-name="Text_20_body"><text:span text:style-name="Strong_20_Emphasis">O arquivo de conexão.</text:span> Na base do diagrama, cada bloco de <text:span text:style-name="Emphasis">backend</text:span> de <text:span text:style-name="Source_20_Text">sgbd_config</text:span> carrega apenas um descritor <text:span text:style-name="Source_20_Text">connection</text:span> com os parâmetros de acesso pertinentes àquela tecnologia (por exemplo, <text:span text:style-name="Source_20_Text">uri</text:span> para MongoDB e Neo4j; <text:span text:style-name="Source_20_Text">hosts</text:span> e <text:span text:style-name="Source_20_Text">keyspace</text:span> para Cassandra). É uma estrutura deliberadamente rasa: indica <text:span text:style-name="Emphasis">onde</text:span> alcançar cada SGBD, sem nenhuma informação de mapeamento.</text:p>
      <text:p text:style-name="Text_20_body">As subseções seguintes percorrem essa estrutura na ordem em que o diagrama é lido: primeiro a raiz e os elementos comuns a todos os <text:span text:style-name="Emphasis">backends</text:span> (<text:span text:style-name="Source_20_Text">columnSpec</text:span>, <text:span text:style-name="Source_20_Text">entity</text:span> e filtros) e, em seguida, as particularidades de cada SGBD, ilustradas com fragmentos concretos de configuração.</text:p>
      <text:h text:style-name="Heading_20_3" text:outline-level="3"><text:bookmark-start text:name="sec:raiz"/>Raiz, Elementos Comuns e Reforma de Simplificação<text:bookmark-end text:name="sec:raiz"/></text:h>
      <text:p text:style-name="First_20_paragraph">Como antecipado na visão geral, ambos os arquivos compartilham a mesma raiz: um campo <text:span text:style-name="Source_20_Text">version</text:span> obrigatório (inteiro <draw:frame draw:style-name="fr1" text:anchor-type="as-char"><draw:object xlink:href="Formula-11/" xlink:type="simple" xlink:show="embed" xlink:actuate="onLoad"/></draw:frame>) e um bloco opcional por <text:span text:style-name="Emphasis">backend</text:span>. A cláusula <text:span text:style-name="Source_20_Text">additionalProperties: false</text:span> na raiz <text:span text:style-name="Strong_20_Emphasis">rejeita</text:span> qualquer propriedade não prevista, impedindo que erros de digitação como <text:span text:style-name="Source_20_Text">postgress</text:span> passem despercebidos.</text:p>
      <text:p text:style-name="Text_20_body"><text:span text:style-name="Strong_20_Emphasis">columnSpec.</text:span> Cada <text:span text:style-name="Strong_20_Emphasis">folha</text:span> do mapa <text:span text:style-name="Source_20_Text">columns</text:span> descreve como um valor do CSV alimenta um atributo no destino. Quatro campos opcionais compõem esse mapeamento, conforme a Tabela <text:a xlink:type="simple" xlink:href="#tab:columnspec" office:name=""><text:span text:style-name="Definition">4.1</text:span></text:a>.</text:p>
      <text:p text:style-name="TableCaption">Campos de mapeamento de coluna (<text:span text:style-name="Source_20_Text">columnSpec</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Strong_20_Emphasis">Campo</text:span></text:p>
            </table:table-cell>
            <table:table-cell table:style-name="TableHeaderRowCell" office:value-type="string">
              <text:p text:style-name="Table_20_Heading"><text:span text:style-name="Strong_20_Emphasis">Tipo</text:span></text:p>
            </table:table-cell>
            <table:table-cell table:style-name="TableHeaderRowCell" office:value-type="string">
              <text:p text:style-name="Table_20_Heading"><text:span text:style-name="Strong_20_Emphasis">Obrigatório</text:span></text:p>
            </table:table-cell>
            <table:table-cell table:style-name="TableHeaderRowCell" office:value-type="string">
              <text:p text:style-name="Table_20_Heading"><text:span text:style-name="Strong_20_Emphasis">Descrição</text:span></text:p>
            </table:table-cell>
          </table:table-row>
        </table:table-header-rows>
        <table:table-row>
          <table:table-cell table:style-name="TableRowCell" office:value-type="string">
            <text:p text:style-name="Table_20_Contents">csv_column</text:p>
          </table:table-cell>
          <table:table-cell table:style-name="TableRowCell" office:value-type="string">
            <text:p text:style-name="Table_20_Contents"><text:span text:style-name="Emphasis">string</text:span> ou inteiro (<draw:frame draw:style-name="fr1" text:anchor-type="as-char"><draw:object xlink:href="Formula-13/" xlink:type="simple" xlink:show="embed" xlink:actuate="onLoad"/></draw:frame>)</text:p>
          </table:table-cell>
          <table:table-cell table:style-name="TableRowCell" office:value-type="string">
            <text:p text:style-name="Table_20_Contents">não</text:p>
          </table:table-cell>
          <table:table-cell table:style-name="TableRowCell" office:value-type="string">
            <text:p text:style-name="Table_20_Contents">Cabeçalho CSV ou índice da coluna (base 0). Padrão: chave JSON.</text:p>
          </table:table-cell>
        </table:table-row>
        <table:table-row>
          <table:table-cell table:style-name="TableRowCell" office:value-type="string">
            <text:p text:style-name="Table_20_Contents">schema_column</text:p>
          </table:table-cell>
          <table:table-cell table:style-name="TableRowCell" office:value-type="string">
            <text:p text:style-name="Table_20_Contents"><text:span text:style-name="Emphasis">string</text:span></text:p>
          </table:table-cell>
          <table:table-cell table:style-name="TableRowCell" office:value-type="string">
            <text:p text:style-name="Table_20_Contents">não</text:p>
          </table:table-cell>
          <table:table-cell table:style-name="TableRowCell" office:value-type="string">
            <text:p text:style-name="Table_20_Contents">Nome do atributo no SGBD destino. Padrão: chave JSON.</text:p>
          </table:table-cell>
        </table:table-row>
        <table:table-row>
          <table:table-cell table:style-name="TableRowCell" office:value-type="string">
            <text:p text:style-name="Table_20_Contents">is_key</text:p>
          </table:table-cell>
          <table:table-cell table:style-name="TableRowCell" office:value-type="string">
            <text:p text:style-name="Table_20_Contents">booleano</text:p>
          </table:table-cell>
          <table:table-cell table:style-name="TableRowCell" office:value-type="string">
            <text:p text:style-name="Table_20_Contents">não</text:p>
          </table:table-cell>
          <table:table-cell table:style-name="TableRowCell" office:value-type="string">
            <text:p text:style-name="Table_20_Contents">Chave primária, chave de <text:span text:style-name="Source_20_Text">MERGE</text:span> (Neo4j) ou chave Redis.</text:p>
          </table:table-cell>
        </table:table-row>
        <table:table-row>
          <table:table-cell table:style-name="TableRowCell" office:value-type="string">
            <text:p text:style-name="Table_20_Contents">db_type</text:p>
          </table:table-cell>
          <table:table-cell table:style-name="TableRowCell" office:value-type="string">
            <text:p text:style-name="Table_20_Contents"><text:span text:style-name="Emphasis">string</text:span></text:p>
          </table:table-cell>
          <table:table-cell table:style-name="TableRowCell" office:value-type="string">
            <text:p text:style-name="Table_20_Contents">não</text:p>
          </table:table-cell>
          <table:table-cell table:style-name="TableRowCell" office:value-type="string">
            <text:p text:style-name="Table_20_Contents">Tipo SQL/CQL para geração de DDL.</text:p>
          </table:table-cell>
        </table:table-row>
      </table:table>
      <text:p text:style-name="First_20_paragraph"><text:line-break/>Fonte: Elaborado pelo autor (2026).</text:p>
      <text:p text:style-name="Text_20_body">A forma mínima (<text:span text:style-name="Source_20_Text">"campo": {}</text:span>) é usada quando o nome no CSV, no schema e na chave JSON coincidem. <text:span text:style-name="Source_20_Text">csv_column</text:span> e <text:span text:style-name="Source_20_Text">schema_column</text:span> existem porque <text:span text:style-name="Strong_20_Emphasis">nem sempre esses três nomes coincidem</text:span>: o campo <text:span text:style-name="Source_20_Text">csv_column</text:span> indica a origem no CSV; <text:span text:style-name="Source_20_Text">schema_column</text:span>, o destino no SGBD.</text:p>
      <text:p text:style-name="Text_20_body"><text:span text:style-name="Strong_20_Emphasis">entity.</text:span> Uma entidade representa um alvo lógico: tabela (PostgreSQL/Cassandra), coleção (MongoDB), rótulo de nó (Neo4j) ou entidade Redis. Campos obrigatórios: <text:span text:style-name="Source_20_Text">columns</text:span> (mapa recursivo de <text:span text:style-name="Source_20_Text">columnSpec</text:span>). Opcionais: <text:span text:style-name="Source_20_Text">filters</text:span> (predicados sobre o CSV), <text:span text:style-name="Source_20_Text">cassandra_partition</text:span> e <text:span text:style-name="Source_20_Text">cassandra_cluster</text:span> (apenas Cassandra).</text:p>
      <text:p text:style-name="Text_20_body"><text:span text:style-name="Strong_20_Emphasis">Filtros.</text:span> Cada item exige <text:span text:style-name="Source_20_Text">column</text:span> e <text:span text:style-name="Source_20_Text">operator</text:span> (<text:span text:style-name="Source_20_Text">==</text:span>, <text:span text:style-name="Source_20_Text">!=</text:span>, <text:span text:style-name="Source_20_Text">&gt;</text:span>, <text:span text:style-name="Source_20_Text">&lt;</text:span>, <text:span text:style-name="Source_20_Text">&gt;=</text:span>, <text:span text:style-name="Source_20_Text">&lt;=</text:span>, <text:span text:style-name="Source_20_Text">in</text:span>, <text:span text:style-name="Source_20_Text">not_in</text:span>, <text:span text:style-name="Source_20_Text">each</text:span>). O operador <text:span text:style-name="Source_20_Text">each</text:span> particiona a entidade por valores distintos da coluna, gerando múltiplos alvos com sufixo opcional.</text:p>
      <text:p text:style-name="Text_20_body"><text:span text:style-name="Strong_20_Emphasis">Reforma de simplificação.</text:span> Versões anteriores acumulavam campos redundantes, mantidos por retrocompatibilidade. Esses campos foram removidos conforme a Tabela <text:a xlink:type="simple" xlink:href="#tab:reforma" office:name=""><text:span text:style-name="Definition">4.2</text:span></text:a>, reduzindo o vocabulário ao mínimo necessário.</text:p>
      <text:p text:style-name="TableCaption">Campos removidos na reforma de simplificação do schema.</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Strong_20_Emphasis">Campo removido</text:span></text:p>
            </table:table-cell>
            <table:table-cell table:style-name="TableHeaderRowCell" office:value-type="string">
              <text:p text:style-name="Table_20_Heading"><text:span text:style-name="Strong_20_Emphasis">Substituto</text:span></text:p>
            </table:table-cell>
            <table:table-cell table:style-name="TableHeaderRowCell" office:value-type="string">
              <text:p text:style-name="Table_20_Heading"><text:span text:style-name="Strong_20_Emphasis">Justificativa</text:span></text:p>
            </table:table-cell>
          </table:table-row>
        </table:table-header-rows>
        <table:table-row>
          <table:table-cell table:style-name="TableRowCell" office:value-type="string">
            <text:p text:style-name="Table_20_Contents">db_column</text:p>
          </table:table-cell>
          <table:table-cell table:style-name="TableRowCell" office:value-type="string">
            <text:p text:style-name="Table_20_Contents"><text:span text:style-name="Source_20_Text">schema_column</text:span></text:p>
          </table:table-cell>
          <table:table-cell table:style-name="TableRowCell" office:value-type="string">
            <text:p text:style-name="Table_20_Contents">Sinônimo de renomeação no destino; redundante.</text:p>
          </table:table-cell>
        </table:table-row>
        <table:table-row>
          <table:table-cell table:style-name="TableRowCell" office:value-type="string">
            <text:p text:style-name="Table_20_Contents">alias_db</text:p>
          </table:table-cell>
          <table:table-cell table:style-name="TableRowCell" office:value-type="string">
            <text:p text:style-name="Table_20_Contents"><text:span text:style-name="Source_20_Text">schema_column</text:span></text:p>
          </table:table-cell>
          <table:table-cell table:style-name="TableRowCell" office:value-type="string">
            <text:p text:style-name="Table_20_Contents">Segundo sinônimo da mesma operação de renomeação.</text:p>
          </table:table-cell>
        </table:table-row>
        <table:table-row>
          <table:table-cell table:style-name="TableRowCell" office:value-type="string">
            <text:p text:style-name="Table_20_Contents">nested</text:p>
          </table:table-cell>
          <table:table-cell table:style-name="TableRowCell" office:value-type="string">
            <text:p text:style-name="Table_20_Contents">chaves aninhadas em <text:span text:style-name="Source_20_Text">columns</text:span></text:p>
          </table:table-cell>
          <table:table-cell table:style-name="TableRowCell" office:value-type="string">
            <text:p text:style-name="Table_20_Contents">O aninhamento de subdocumentos MongoDB já é expresso recursivamente pelo mapa <text:span text:style-name="Source_20_Text">columns</text:span>.</text:p>
          </table:table-cell>
        </table:table-row>
      </table:table>
      <text:p text:style-name="First_20_paragraph"><text:line-break/>Fonte: Elaborado pelo autor (2026).</text:p>
      <text:h text:style-name="Heading_20_3" text:outline-level="3"><text:bookmark-start text:name="postgresql-1"/>PostgreSQL<text:bookmark-end text:name="postgresql-1"/></text:h>
      <text:p text:style-name="First_20_paragraph"><text:span text:style-name="Strong_20_Emphasis">Arquivo de importação.</text:span> O bloco <text:span text:style-name="Source_20_Text">postgres</text:span> contém <text:span text:style-name="Source_20_Text">entities</text:span> (entidades planas — aninhamento de <text:span text:style-name="Source_20_Text">columns</text:span> é rejeitado) e, opcionalmente, <text:span text:style-name="Source_20_Text">relationships</text:span> para declarar chaves estrangeiras. O campo <text:span text:style-name="Source_20_Text">db_type</text:span> em cada <text:span text:style-name="Source_20_Text">columnSpec</text:span> alimenta a geração de DDL (<text:span text:style-name="Source_20_Text">CREATE TABLE</text:span>) quando <text:span text:style-name="Source_20_Text">--create-schema</text:span> está ativo.</text:p>
      <text:p text:style-name="Preformatted_20_Text">"postgres": {</text:p>
      <text:p text:style-name="Preformatted_20_Text"><text:s text:c="2"/>"entities": {</text:p>
      <text:p text:style-name="Preformatted_20_Text"><text:s text:c="4"/>"products": {</text:p>
      <text:p text:style-name="Preformatted_20_Text"><text:s text:c="6"/>"columns": {</text:p>
      <text:p text:style-name="Preformatted_20_Text"><text:s text:c="8"/>"product_id": { "is_key": true, "db_type": "INTEGER" },</text:p>
      <text:p text:style-name="Preformatted_20_Text"><text:s text:c="8"/>"name": <text:s text:c="6"/>{ "schema_column": "product_name", "db_type": "VARCHAR(200)" },</text:p>
      <text:p text:style-name="Preformatted_20_Text"><text:s text:c="8"/>"price": <text:s text:c="5"/>{ "db_type": "NUMERIC(10,2)" }</text:p>
      <text:p text:style-name="Preformatted_20_Text"><text:s text:c="6"/>},</text:p>
      <text:p text:style-name="Preformatted_20_Text"><text:s text:c="6"/>"filters": [{ "column": "action", "operator": "==", "value": "stock" }]</text:p>
      <text:p text:style-name="Preformatted_20_Text"><text:s text:c="4"/>}</text:p>
      <text:p text:style-name="Preformatted_20_Text"><text:s text:c="2"/>},</text:p>
      <text:p text:style-name="Preformatted_20_Text"><text:s text:c="2"/>"relationships": {</text:p>
      <text:p text:style-name="Preformatted_20_Text"><text:s text:c="4"/>"product_category": {</text:p>
      <text:p text:style-name="Preformatted_20_Text"><text:s text:c="6"/>"from": "products",</text:p>
      <text:p text:style-name="Preformatted_20_Text"><text:s text:c="6"/>"to": <text:s text:c="2"/>"categories",</text:p>
      <text:p text:style-name="Preformatted_20_Text"><text:s text:c="6"/>"foreign_key": <text:s text:c="3"/>"category_id",</text:p>
      <text:p text:style-name="Preformatted_20_Text"><text:s text:c="6"/>"references_key": "category_id"</text:p>
      <text:p text:style-name="Preformatted_20_Text"><text:s text:c="4"/>}</text:p>
      <text:p text:style-name="Preformatted_20_Text"><text:s text:c="2"/>}</text:p>
      <text:p text:style-name="Preformatted_20_Text">}</text:p>
      <text:p text:style-name="First_20_paragraph"><text:span text:style-name="Strong_20_Emphasis">Arquivo de conexão.</text:span> O bloco <text:span text:style-name="Source_20_Text">postgres</text:span> contém <text:span text:style-name="Source_20_Text">connection</text:span> (host, port, database, user, password) e o campo <text:span text:style-name="Source_20_Text">schema</text:span> (padrão <text:span text:style-name="Source_20_Text">public</text:span>), que define o schema PostgreSQL de destino das tabelas.</text:p>
      <text:p text:style-name="Preformatted_20_Text">"postgres": {</text:p>
      <text:p text:style-name="Preformatted_20_Text"><text:s text:c="2"/>"connection": {</text:p>
      <text:p text:style-name="Preformatted_20_Text"><text:s text:c="4"/>"host": "localhost", "port": 5432,</text:p>
      <text:p text:style-name="Preformatted_20_Text"><text:s text:c="4"/>"database": "ecommerce_db",</text:p>
      <text:p text:style-name="Preformatted_20_Text"><text:s text:c="4"/>"user": "pguser", "password": "secret"</text:p>
      <text:p text:style-name="Preformatted_20_Text"><text:s text:c="2"/>},</text:p>
      <text:p text:style-name="Preformatted_20_Text"><text:s text:c="2"/>"schema": "public"</text:p>
      <text:p text:style-name="Preformatted_20_Text">}</text:p>
      <text:h text:style-name="Heading_20_3" text:outline-level="3"><text:bookmark-start text:name="mongodb-1"/>MongoDB<text:bookmark-end text:name="mongodb-1"/></text:h>
      <text:p text:style-name="First_20_paragraph"><text:span text:style-name="Strong_20_Emphasis">Arquivo de importação.</text:span> O bloco <text:span text:style-name="Source_20_Text">mongodb</text:span> contém apenas <text:span text:style-name="Source_20_Text">entities</text:span>. O diferencial do MongoDB é o suporte a <text:span text:style-name="Strong_20_Emphasis">aninhamento de </text:span><text:span text:style-name="Source_20_Text">columns</text:span>: chaves JSON aninhadas produzem subdocumentos BSON, sem necessidade de nenhum campo adicional — o próprio mapa recursivo expressa a hierarquia.</text:p>
      <text:p text:style-name="Preformatted_20_Text">"mongodb": {</text:p>
      <text:p text:style-name="Preformatted_20_Text"><text:s text:c="2"/>"entities": {</text:p>
      <text:p text:style-name="Preformatted_20_Text"><text:s text:c="4"/>"product_catalog": {</text:p>
      <text:p text:style-name="Preformatted_20_Text"><text:s text:c="6"/>"columns": {</text:p>
      <text:p text:style-name="Preformatted_20_Text"><text:s text:c="8"/>"product_id": { "is_key": true },</text:p>
      <text:p text:style-name="Preformatted_20_Text"><text:s text:c="8"/>"category": {</text:p>
      <text:p text:style-name="Preformatted_20_Text"><text:s text:c="10"/>"category_id": {},</text:p>
      <text:p text:style-name="Preformatted_20_Text"><text:s text:c="10"/>"category_name": {}</text:p>
      <text:p text:style-name="Preformatted_20_Text"><text:s text:c="8"/>},</text:p>
      <text:p text:style-name="Preformatted_20_Text"><text:s text:c="8"/>"stock": {</text:p>
      <text:p text:style-name="Preformatted_20_Text"><text:s text:c="10"/>"quantity_available": {},</text:p>
      <text:p text:style-name="Preformatted_20_Text"><text:s text:c="10"/>"last_restock_date": {}</text:p>
      <text:p text:style-name="Preformatted_20_Text"><text:s text:c="8"/>}</text:p>
      <text:p text:style-name="Preformatted_20_Text"><text:s text:c="6"/>},</text:p>
      <text:p text:style-name="Preformatted_20_Text"><text:s text:c="6"/>"filters": [{ "column": "action", "operator": "==", "value": "stock" }]</text:p>
      <text:p text:style-name="Preformatted_20_Text"><text:s text:c="4"/>}</text:p>
      <text:p text:style-name="Preformatted_20_Text"><text:s text:c="2"/>}</text:p>
      <text:p text:style-name="Preformatted_20_Text">}</text:p>
      <text:p text:style-name="First_20_paragraph"><text:span text:style-name="Strong_20_Emphasis">Arquivo de conexão.</text:span> O bloco <text:span text:style-name="Source_20_Text">mongodb</text:span> contém <text:span text:style-name="Source_20_Text">connection</text:span> com <text:span text:style-name="Source_20_Text">uri</text:span> (string de conexão MongoDB, incluindo usuário e senha quando necessário) e <text:span text:style-name="Source_20_Text">database</text:span> (nome do banco de destino).</text:p>
      <text:p text:style-name="Preformatted_20_Text">"mongodb": {</text:p>
      <text:p text:style-name="Preformatted_20_Text"><text:s text:c="2"/>"connection": {</text:p>
      <text:p text:style-name="Preformatted_20_Text"><text:s text:c="4"/>"uri": "mongodb://localhost:27017",</text:p>
      <text:p text:style-name="Preformatted_20_Text"><text:s text:c="4"/>"database": "ecommerce_db"</text:p>
      <text:p text:style-name="Preformatted_20_Text"><text:s text:c="2"/>}</text:p>
      <text:p text:style-name="Preformatted_20_Text">}</text:p>
      <text:h text:style-name="Heading_20_3" text:outline-level="3"><text:bookmark-start text:name="apache-cassandra"/>Apache Cassandra<text:bookmark-end text:name="apache-cassandra"/></text:h>
      <text:p text:style-name="First_20_paragraph"><text:span text:style-name="Strong_20_Emphasis">Arquivo de importação.</text:span> O bloco <text:span text:style-name="Source_20_Text">cassandra</text:span> contém <text:span text:style-name="Source_20_Text">entities</text:span> planas. Dois campos específicos controlam a chave primária composta do Cassandra: <text:span text:style-name="Source_20_Text">cassandra_partition</text:span> (lista de colunas CSV que formam a chave de partição) e <text:span text:style-name="Source_20_Text">cassandra_cluster</text:span> (colunas de agrupamento). A ausência de <text:span text:style-name="Source_20_Text">cassandra_partition</text:span> é detectada na validação cruzada quando não há nenhuma coluna marcada com <text:span text:style-name="Source_20_Text">is_key</text:span>.</text:p>
      <text:p text:style-name="Preformatted_20_Text">"cassandra": {</text:p>
      <text:p text:style-name="Preformatted_20_Text"><text:s text:c="2"/>"entities": {</text:p>
      <text:p text:style-name="Preformatted_20_Text"><text:s text:c="4"/>"user_activity_log": {</text:p>
      <text:p text:style-name="Preformatted_20_Text"><text:s text:c="6"/>"columns": {</text:p>
      <text:p text:style-name="Preformatted_20_Text"><text:s text:c="8"/>"user_id": <text:s text:c="3"/>{},</text:p>
      <text:p text:style-name="Preformatted_20_Text"><text:s text:c="8"/>"timestamp": <text:s text:c="1"/>{ "schema_column": "event_time" },</text:p>
      <text:p text:style-name="Preformatted_20_Text"><text:s text:c="8"/>"action": <text:s text:c="4"/>{},</text:p>
      <text:p text:style-name="Preformatted_20_Text"><text:s text:c="8"/>"product_id": {}</text:p>
      <text:p text:style-name="Preformatted_20_Text"><text:s text:c="6"/>},</text:p>
      <text:p text:style-name="Preformatted_20_Text"><text:s text:c="6"/>"cassandra_partition": ["user_id"],</text:p>
      <text:p text:style-name="Preformatted_20_Text"><text:s text:c="6"/>"cassandra_cluster": <text:s text:c="2"/>["timestamp"]</text:p>
      <text:p text:style-name="Preformatted_20_Text"><text:s text:c="4"/>}</text:p>
      <text:p text:style-name="Preformatted_20_Text"><text:s text:c="2"/>}</text:p>
      <text:p text:style-name="Preformatted_20_Text">}</text:p>
      <text:p text:style-name="First_20_paragraph">O campo <text:span text:style-name="Source_20_Text">schema_column</text:span> em <text:span text:style-name="Source_20_Text">timestamp</text:span> renomeia a coluna CSV para <text:span text:style-name="Source_20_Text">event_time</text:span> na tabela CQL — exemplo concreto de como <text:span text:style-name="Source_20_Text">csv_column</text:span> e <text:span text:style-name="Source_20_Text">schema_column</text:span> atuam independentemente.</text:p>
      <text:p text:style-name="Text_20_body"><text:span text:style-name="Strong_20_Emphasis">Arquivo de conexão.</text:span> O bloco <text:span text:style-name="Source_20_Text">cassandra</text:span> contém <text:span text:style-name="Source_20_Text">connection</text:span> com <text:span text:style-name="Source_20_Text">hosts</text:span> (lista de endereços de nós), <text:span text:style-name="Source_20_Text">port</text:span> (padrão 9042), <text:span text:style-name="Source_20_Text">keyspace</text:span> e <text:span text:style-name="Source_20_Text">protocol_version</text:span> opcional.</text:p>
      <text:p text:style-name="Preformatted_20_Text">"cassandra": {</text:p>
      <text:p text:style-name="Preformatted_20_Text"><text:s text:c="2"/>"connection": {</text:p>
      <text:p text:style-name="Preformatted_20_Text"><text:s text:c="4"/>"hosts": ["localhost"],</text:p>
      <text:p text:style-name="Preformatted_20_Text"><text:s text:c="4"/>"port": 9042,</text:p>
      <text:p text:style-name="Preformatted_20_Text"><text:s text:c="4"/>"keyspace": "ecommerce_ks"</text:p>
      <text:p text:style-name="Preformatted_20_Text"><text:s text:c="2"/>}</text:p>
      <text:p text:style-name="Preformatted_20_Text">}</text:p>
      <text:h text:style-name="Heading_20_3" text:outline-level="3"><text:bookmark-start text:name="redis-1"/>Redis<text:bookmark-end text:name="redis-1"/></text:h>
      <text:p text:style-name="First_20_paragraph"><text:span text:style-name="Strong_20_Emphasis">Arquivo de importação.</text:span> O bloco <text:span text:style-name="Source_20_Text">redis</text:span> contém <text:span text:style-name="Source_20_Text">entities</text:span>. A restrição fundamental é que <text:span text:style-name="Strong_20_Emphasis">cada entidade deve ter exatamente uma coluna marcada com </text:span><text:span text:style-name="Source_20_Text">is_key</text:span>: esse valor se torna a chave Redis (prefixada pelo nome da entidade), e todos os demais campos da linha compõem o valor JSON armazenado.</text:p>
      <text:p text:style-name="Preformatted_20_Text">"redis": {</text:p>
      <text:p text:style-name="Preformatted_20_Text"><text:s text:c="2"/>"entities": {</text:p>
      <text:p text:style-name="Preformatted_20_Text"><text:s text:c="4"/>"shopping_cart": {</text:p>
      <text:p text:style-name="Preformatted_20_Text"><text:s text:c="6"/>"columns": {</text:p>
      <text:p text:style-name="Preformatted_20_Text"><text:s text:c="8"/>"user_id": <text:s text:c="7"/>{ "is_key": true },</text:p>
      <text:p text:style-name="Preformatted_20_Text"><text:s text:c="8"/>"product_id": <text:s text:c="4"/>{},</text:p>
      <text:p text:style-name="Preformatted_20_Text"><text:s text:c="8"/>"quantity": <text:s text:c="6"/>{},</text:p>
      <text:p text:style-name="Preformatted_20_Text"><text:s text:c="8"/>"added_at": <text:s text:c="6"/>{}</text:p>
      <text:p text:style-name="Preformatted_20_Text"><text:s text:c="6"/>},</text:p>
      <text:p text:style-name="Preformatted_20_Text"><text:s text:c="6"/>"filters": [{ "column": "action", "operator": "==", "value": "add_to_cart" }]</text:p>
      <text:p text:style-name="Preformatted_20_Text"><text:s text:c="4"/>}</text:p>
      <text:p text:style-name="Preformatted_20_Text"><text:s text:c="2"/>}</text:p>
      <text:p text:style-name="Preformatted_20_Text">}</text:p>
      <text:p text:style-name="First_20_paragraph"><text:span text:style-name="Strong_20_Emphasis">Arquivo de conexão.</text:span> O bloco <text:span text:style-name="Source_20_Text">redis</text:span> contém <text:span text:style-name="Source_20_Text">connection</text:span> com <text:span text:style-name="Source_20_Text">host</text:span>, <text:span text:style-name="Source_20_Text">port</text:span> (padrão 6379), <text:span text:style-name="Source_20_Text">db</text:span> (índice do banco, padrão 0) e <text:span text:style-name="Source_20_Text">password</text:span> opcional.</text:p>
      <text:p text:style-name="Preformatted_20_Text">"redis": {</text:p>
      <text:p text:style-name="Preformatted_20_Text"><text:s text:c="2"/>"connection": {</text:p>
      <text:p text:style-name="Preformatted_20_Text"><text:s text:c="4"/>"host": "localhost",</text:p>
      <text:p text:style-name="Preformatted_20_Text"><text:s text:c="4"/>"port": 6379,</text:p>
      <text:p text:style-name="Preformatted_20_Text"><text:s text:c="4"/>"db": 0</text:p>
      <text:p text:style-name="Preformatted_20_Text"><text:s text:c="2"/>}</text:p>
      <text:p text:style-name="Preformatted_20_Text">}</text:p>
      <text:h text:style-name="Heading_20_3" text:outline-level="3"><text:bookmark-start text:name="neo4j-1"/>Neo4j<text:bookmark-end text:name="neo4j-1"/></text:h>
      <text:p text:style-name="First_20_paragraph"><text:span text:style-name="Strong_20_Emphasis">Arquivo de importação.</text:span> O bloco <text:span text:style-name="Source_20_Text">neo4j</text:span> contém <text:span text:style-name="Source_20_Text">entities</text:span> (nós) e <text:span text:style-name="Source_20_Text">relationships</text:span> (arestas tipadas). Cada entidade declara um rótulo (<text:span text:style-name="Emphasis">label</text:span>) de nó e deve ter exatamente uma coluna <text:span text:style-name="Source_20_Text">is_key</text:span>, usada como predicado de identificação no <text:span text:style-name="Source_20_Text">MERGE</text:span> Cypher. As arestas em <text:span text:style-name="Source_20_Text">relationships</text:span> declaram <text:span text:style-name="Source_20_Text">from</text:span> (rótulo de origem), <text:span text:style-name="Source_20_Text">to</text:span> (rótulo de destino), <text:span text:style-name="Source_20_Text">type</text:span> (tipo da aresta em maiúsculas) e um mapa <text:span text:style-name="Source_20_Text">columns</text:span> opcional com propriedades da aresta.</text:p>
      <text:p text:style-name="Preformatted_20_Text">"neo4j": {</text:p>
      <text:p text:style-name="Preformatted_20_Text"><text:s text:c="2"/>"entities": {</text:p>
      <text:p text:style-name="Preformatted_20_Text"><text:s text:c="4"/>"User": <text:s text:c="3"/>{ "columns": { "user_id": <text:s text:c="3"/>{ "is_key": true } } },</text:p>
      <text:p text:style-name="Preformatted_20_Text"><text:s text:c="4"/>"Product": { "columns": { "product_id": { "is_key": true } } }</text:p>
      <text:p text:style-name="Preformatted_20_Text"><text:s text:c="2"/>},</text:p>
      <text:p text:style-name="Preformatted_20_Text"><text:s text:c="2"/>"relationships": {</text:p>
      <text:p text:style-name="Preformatted_20_Text"><text:s text:c="4"/>"PURCHASED": {</text:p>
      <text:p text:style-name="Preformatted_20_Text"><text:s text:c="6"/>"from": "User",</text:p>
      <text:p text:style-name="Preformatted_20_Text"><text:s text:c="6"/>"to": <text:s text:c="2"/>"Product",</text:p>
      <text:p text:style-name="Preformatted_20_Text"><text:s text:c="6"/>"type": "PURCHASED",</text:p>
      <text:p text:style-name="Preformatted_20_Text"><text:s text:c="6"/>"columns": {</text:p>
      <text:p text:style-name="Preformatted_20_Text"><text:s text:c="8"/>"order_number": { "is_key": true },</text:p>
      <text:p text:style-name="Preformatted_20_Text"><text:s text:c="8"/>"quantity": <text:s text:c="4"/>{}</text:p>
      <text:p text:style-name="Preformatted_20_Text"><text:s text:c="6"/>},</text:p>
      <text:p text:style-name="Preformatted_20_Text"><text:s text:c="6"/>"filters": [{ "column": "action", "operator": "==", "value": "purchase" }]</text:p>
      <text:p text:style-name="Preformatted_20_Text"><text:s text:c="4"/>}</text:p>
      <text:p text:style-name="Preformatted_20_Text"><text:s text:c="2"/>}</text:p>
      <text:p text:style-name="Preformatted_20_Text">}</text:p>
      <text:p text:style-name="First_20_paragraph"><text:span text:style-name="Strong_20_Emphasis">Arquivo de conexão.</text:span> O bloco <text:span text:style-name="Source_20_Text">neo4j</text:span> contém <text:span text:style-name="Source_20_Text">connection</text:span> com <text:span text:style-name="Source_20_Text">uri</text:span> (bolt://…), <text:span text:style-name="Source_20_Text">user</text:span>, <text:span text:style-name="Source_20_Text">password</text:span> e <text:span text:style-name="Source_20_Text">database</text:span> opcional (padrão <text:span text:style-name="Source_20_Text">neo4j</text:span>).</text:p>
      <text:p text:style-name="Preformatted_20_Text">"neo4j": {</text:p>
      <text:p text:style-name="Preformatted_20_Text"><text:s text:c="2"/>"connection": {</text:p>
      <text:p text:style-name="Preformatted_20_Text"><text:s text:c="4"/>"uri": <text:s text:c="5"/>"bolt://localhost:7687",</text:p>
      <text:p text:style-name="Preformatted_20_Text"><text:s text:c="4"/>"user": <text:s text:c="4"/>"neo4j",</text:p>
      <text:p text:style-name="Preformatted_20_Text"><text:s text:c="4"/>"password": "secret",</text:p>
      <text:p text:style-name="Preformatted_20_Text"><text:s text:c="4"/>"database": "neo4j"</text:p>
      <text:p text:style-name="Preformatted_20_Text"><text:s text:c="2"/>}</text:p>
      <text:p text:style-name="Preformatted_20_Text">}</text:p>
      <text:h text:style-name="Heading_20_3" text:outline-level="3"><text:bookmark-start text:name="sec:validacao"/>Validação, Consistência entre Arquivos e Fluxo de Carregamento<text:bookmark-end text:name="sec:validacao"/></text:h>
      <text:p text:style-name="First_20_paragraph">A validação ocorre em <text:span text:style-name="Strong_20_Emphasis">três camadas</text:span> antes de qualquer conexão com os SGBDs:</text:p>
      <text:list text:style-name="Numbering_20_1">
        <text:list-item>
          <text:p text:style-name="List_20_Number"><text:span text:style-name="Strong_20_Emphasis">JSON Schema</text:span> — cada arquivo é validado contra o seu schema (sintaxe, tipos e propriedades permitidas):</text:p>
          <text:list text:style-name="List_20_1">
            <text:list-item>
              <text:p text:style-name="List_20_Bullet"><text:span text:style-name="Source_20_Text">import_config.schema.json</text:span>;</text:p>
            </text:list-item>
            <text:list-item>
              <text:p text:style-name="List_20_Bullet"><text:span text:style-name="Source_20_Text">sgbd_config.schema.json</text:span>.</text:p>
            </text:list-item>
          </text:list>
        </text:list-item>
        <text:list-item>
          <text:p text:style-name="List_20_Number"><text:span text:style-name="Strong_20_Emphasis">Consistência entre arquivos</text:span> (<text:span text:style-name="Source_20_Text">config_parser.merge_configs</text:span>) — todo <text:span text:style-name="Emphasis">backend</text:span> referenciado no arquivo de importação deve estar declarado no arquivo de conexão.</text:p>
        </text:list-item>
        <text:list-item>
          <text:p text:style-name="List_20_Number"><text:span text:style-name="Strong_20_Emphasis">Validação cruzada CSV</text:span> (<text:span text:style-name="Source_20_Text">validation.validate_import_config</text:span>) — colunas referenciadas existem no CSV; filtros coerentes; FKs PostgreSQL e arestas Neo4j referenciam entidades válidas; <text:span text:style-name="Emphasis">backends</text:span> planos não usam <text:span text:style-name="Source_20_Text">columns</text:span> aninhados; índices <text:span text:style-name="Source_20_Text">csv_column</text:span> dentro do intervalo.</text:p>
        </text:list-item>
      </text:list>
      <text:p text:style-name="First_20_paragraph">Qualquer falha levanta <text:span text:style-name="Source_20_Text">BusinessException</text:span> e <text:span text:style-name="Strong_20_Emphasis">impede</text:span> o início da importação. A Figura <text:a xlink:type="simple" xlink:href="#fig:config-pipeline" office:name=""><text:span text:style-name="Definition">4.2</text:span></text:a> apresenta o fluxo completo de carregamento, com os pontos de falha de cada camada e a convergência dos dois arquivos em um único <text:span text:style-name="Source_20_Text">runtime_config</text:span>, ao qual o CSV se junta apenas na validação semântica (camada 3). O diagrama evidencia por que a separação em dois arquivos isola falhas: um <text:span text:style-name="Source_20_Text">sgbd_config.json</text:span> inválido é detectado independentemente do <text:span text:style-name="Source_20_Text">import_config.json</text:span>, sem necessidade de ler o CSV.</text:p>
      <text:p text:style-name="FigureWithCaption"><draw:frame draw:name="img8" svg:width="5.51181in" svg:height="6.749156355428571in"><draw:image xlink:href="Pictures/15.png" xlink:type="simple" xlink:show="embed" xlink:actuate="onLoad"/></draw:frame></text:p>
      <text:p text:style-name="FigureWithCaption">Fonte: Elaborado pelo autor (2026).</text:p>
      <text:p text:style-name="FigureCaption">Fluxo de carregamento e validação dos dois arquivos de configuração.</text:p>
      <text:h text:style-name="Heading_20_2" text:outline-level="2"><text:bookmark-start text:name="algoritmo-de-execução-da-importação"/>Algoritmo de Execução da Importação<text:bookmark-end text:name="algoritmo-de-execução-da-importação"/></text:h>
      <text:p text:style-name="First_20_paragraph">O núcleo da ferramenta está em <text:span text:style-name="Source_20_Text">runner.run_import</text:span>. A seguir descreve-se o fluxo de alto nível desde a linha de comando até a persistência em cada SGBD.</text:p>
      <text:h text:style-name="Heading_20_3" text:outline-level="3"><text:bookmark-start text:name="fases-do-algoritmo"/>Fases do Algoritmo<text:bookmark-end text:name="fases-do-algoritmo"/></text:h>
      <text:list text:style-name="Numbering_20_1">
        <text:list-item>
          <text:p text:style-name="List_20_Number"><text:span text:style-name="Strong_20_Emphasis">Entrada</text:span> — caminho do CSV, caminhos dos dois JSON de configuração (importação e conexão) e <text:span text:style-name="Emphasis">flags</text:span>: <text:span text:style-name="Source_20_Text">--dry-run</text:span>, <text:span text:style-name="Source_20_Text">--create-schema</text:span> / <text:span text:style-name="Source_20_Text">--no-create-schema</text:span>, <text:span text:style-name="Source_20_Text">--only</text:span> (lista de <text:span text:style-name="Emphasis">backends</text:span>).</text:p>
        </text:list-item>
        <text:list-item>
          <text:p text:style-name="List_20_Number"><text:span text:style-name="Strong_20_Emphasis">Carregar configuração</text:span> — <text:span text:style-name="Source_20_Text">load_config</text:span>: <text:span text:style-name="Emphasis">parse</text:span> dos dois JSON + <text:span text:style-name="Source_20_Text">jsonschema .validate</text:span> de cada um contra o seu schema embutido + verificação de consistência entre arquivos (<text:span text:style-name="Emphasis">backends</text:span> declarados) e mesclagem das conexões.</text:p>
        </text:list-item>
        <text:list-item>
          <text:p text:style-name="List_20_Number"><text:span text:style-name="Strong_20_Emphasis">Carregar CSV</text:span> — <text:span text:style-name="Source_20_Text">load_csv_with_inference</text:span>: leitura com <text:span text:style-name="Source_20_Text">dtype=str</text:span> (evita erros de <text:span text:style-name="Emphasis">parse</text:span> em <text:span text:style-name="Emphasis">timestamps</text:span> com <text:span text:style-name="Source_20_Text">+</text:span>) e inferência de <text:span text:style-name="Emphasis">kind</text:span> por coluna (<text:span text:style-name="Source_20_Text">integer</text:span>, <text:span text:style-name="Source_20_Text">float</text:span>, <text:span text:style-name="Source_20_Text">datetime</text:span>, <text:span text:style-name="Source_20_Text">string</text:span>, <text:span text:style-name="Source_20_Text">empty</text:span>).</text:p>
        </text:list-item>
        <text:list-item>
          <text:p text:style-name="List_20_Number"><text:span text:style-name="Strong_20_Emphasis">Validar config </text:span><draw:frame draw:style-name="fr1" text:anchor-type="as-char"><draw:object xlink:href="Formula-16/" xlink:type="simple" xlink:show="embed" xlink:actuate="onLoad"/></draw:frame><text:span text:style-name="Strong_20_Emphasis"> CSV</text:span> — <text:span text:style-name="Source_20_Text">validate_import_config</text:span>: checagens semânticas descritas na seção 4.2.5.</text:p>
        </text:list-item>
        <text:list-item>
          <text:p text:style-name="List_20_Number"><text:span text:style-name="Strong_20_Emphasis">Para cada </text:span><text:span text:style-name="T1">backend</text:span> presente na configuração e não filtrado por <text:span text:style-name="Source_20_Text">--only</text:span>:</text:p>
          <text:list text:style-name="List_20_1">
            <text:list-item>
              <text:p text:style-name="List_20_Bullet"><text:span text:style-name="Strong_20_Emphasis">Para cada entidade</text:span> declarada em <text:span text:style-name="Source_20_Text">entities</text:span>:</text:p>
              <text:list text:style-name="List_20_1">
                <text:list-item>
                  <text:p text:style-name="List_20_Bullet">Aplicar filtros (exceto operador <text:span text:style-name="Source_20_Text">each</text:span>) sobre o DataFrame completo.</text:p>
                </text:list-item>
                <text:list-item>
                  <text:p text:style-name="List_20_Bullet">Expandir partições <text:span text:style-name="Source_20_Text">each</text:span> (opcional) — uma entidade lógica pode gerar várias tabelas/coleções com sufixo.</text:p>
                </text:list-item>
                <text:list-item>
                  <text:p text:style-name="List_20_Bullet"><text:span text:style-name="Strong_20_Emphasis">Materializar</text:span> registros conforme o paradigma do <text:span text:style-name="Emphasis">backend</text:span>:</text:p>
                  <text:list text:style-name="List_20_1">
                    <text:list-item>
                      <text:p text:style-name="List_20_Bullet">PostgreSQL / Cassandra: <text:span text:style-name="Source_20_Text">flatten_entity_dataframe</text:span> — seleção, renomeação, deduplicação por <text:span text:style-name="Source_20_Text">is_key</text:span>.</text:p>
                    </text:list-item>
                    <text:list-item>
                      <text:p text:style-name="List_20_Bullet">MongoDB: <text:span text:style-name="Source_20_Text">mongo_document_from_row</text:span> — documento recursivo a partir de <text:span text:style-name="Source_20_Text">columns</text:span> aninhados.</text:p>
                    </text:list-item>
                    <text:list-item>
                      <text:p text:style-name="List_20_Bullet">Redis: <text:span text:style-name="Source_20_Text">redis_payload_from_row</text:span> — par (chave, valor JSON).</text:p>
                    </text:list-item>
                    <text:list-item>
                      <text:p text:style-name="List_20_Bullet">Neo4j: propriedades de nós; depois <text:span text:style-name="Source_20_Text">MERGE</text:span> de arestas a partir de <text:span text:style-name="Source_20_Text">relationships</text:span>.</text:p>
                    </text:list-item>
                  </text:list>
                </text:list-item>
                <text:list-item>
                  <text:p text:style-name="List_20_Bullet">Conectar ao SGBD (omitido em <text:span text:style-name="Source_20_Text">--dry-run</text:span>).</text:p>
                </text:list-item>
                <text:list-item>
                  <text:p text:style-name="List_20_Bullet">Criar schema se <text:span text:style-name="Source_20_Text">--create-schema</text:span> (DDL PostgreSQL/Cassandra).</text:p>
                </text:list-item>
                <text:list-item>
                  <text:p text:style-name="List_20_Bullet">Persistir (<text:span text:style-name="Source_20_Text">INSERT</text:span>, <text:span text:style-name="Source_20_Text">insert_many</text:span>, <text:span text:style-name="Source_20_Text">SET</text:span>, <text:span text:style-name="Source_20_Text">MERGE</text:span> Cypher, etc.).</text:p>
                </text:list-item>
              </text:list>
            </text:list-item>
          </text:list>
        </text:list-item>
        <text:list-item>
          <text:p text:style-name="List_20_Number"><text:span text:style-name="Strong_20_Emphasis">Saída</text:span> — linhas de <text:span text:style-name="Emphasis">log</text:span> com contagens por entidade/<text:span text:style-name="Emphasis">backend</text:span>.</text:p>
        </text:list-item>
      </text:list>
      <text:h text:style-name="Heading_20_3" text:outline-level="3"><text:bookmark-start text:name="pseudocódigo"/>Pseudocódigo<text:bookmark-end text:name="pseudocódigo"/></text:h>
      <text:p text:style-name="Preformatted_20_Text">funcao run_import(csv_path, config_path, sgbd_config_path, dry_run, create_schema, only):</text:p>
      <text:p text:style-name="Preformatted_20_Text"><text:s text:c="4"/>config &lt;- load_config(config_path, sgbd_config_path)</text:p>
      <text:p text:style-name="Preformatted_20_Text"><text:s text:c="4"/>df, kinds &lt;- load_csv_with_inference(csv_path)</text:p>
      <text:p text:style-name="Preformatted_20_Text"><text:s text:c="4"/>validate_import_config(config, df, kinds)</text:p>
      <text:p text:style-name="Preformatted_20_Text"/>
      <text:p text:style-name="Preformatted_20_Text"><text:s text:c="4"/>para cada backend em (postgres, mongodb, cassandra, redis, neo4j):</text:p>
      <text:p text:style-name="Preformatted_20_Text"><text:s text:c="8"/>se backend nao esta em config ou nao esta em only: continuar</text:p>
      <text:p text:style-name="Preformatted_20_Text"><text:s text:c="8"/>linhas &lt;- run_{backend}_import(config[backend], df, kinds,</text:p>
      <text:p text:style-name="Preformatted_20_Text"><text:s text:c="39"/>dry_run, create_schema)</text:p>
      <text:p text:style-name="Preformatted_20_Text"><text:s text:c="8"/>registrar linhas no log</text:p>
      <text:p text:style-name="First_20_paragraph">Dentro de cada <text:span text:style-name="Source_20_Text">run_*_import</text:span>, para cada entidade:</text:p>
      <text:p text:style-name="Preformatted_20_Text">df_filtrado &lt;- apply_filters(df, filtros_sem_each)</text:p>
      <text:p text:style-name="Preformatted_20_Text"><text:s text:c="4"/>para cada (nome_particao, df_parte) em expand_each(...):</text:p>
      <text:p text:style-name="Preformatted_20_Text"><text:s text:c="8"/>registros &lt;- materializar(df_parte, entidade, backend)</text:p>
      <text:p text:style-name="Preformatted_20_Text"><text:s text:c="8"/>se nao dry_run: conectar, DDL se necessario, gravar registros</text:p>
      <text:h text:style-name="Heading_20_3" text:outline-level="3"><text:bookmark-start text:name="diagrama-do-fluxo"/>Diagrama do Fluxo<text:bookmark-end text:name="diagrama-do-fluxo"/></text:h>
      <text:p text:style-name="First_20_paragraph">A Figura <text:a xlink:type="simple" xlink:href="#fig:import-algorithm" office:name=""><text:span text:style-name="Definition">4.3</text:span></text:a> resume o <text:span text:style-name="Emphasis">pipeline</text:span> de execução descrito acima. O diagrama-fonte Mermaid encontra-se em <text:span text:style-name="Source_20_Text">docs-tcc/images/figure9-import-algorithm.mmd</text:span> para futuras revisões.</text:p>
      <text:p text:style-name="FigureWithCaption"><draw:frame draw:name="img9" svg:width="4.72441in" svg:height="6.8537844252447835in"><draw:image xlink:href="Pictures/18.png" xlink:type="simple" xlink:show="embed" xlink:actuate="onLoad"/></draw:frame></text:p>
      <text:p text:style-name="FigureWithCaption">Fonte: Elaborado pelo autor (2026).</text:p>
      <text:p text:style-name="FigureCaption">Algoritmo de execução da importação Polyglot Import CSV.</text:p>
      <text:h text:style-name="Heading_20_3" text:outline-level="3"><text:bookmark-start text:name="exemplo-uma-linha-actionstock-no-e-commerce"/>Exemplo: Uma Linha <text:span text:style-name="Source_20_Text">action=stock</text:span> no E-commerce<text:bookmark-end text:name="exemplo-uma-linha-actionstock-no-e-commerce"/></text:h>
      <text:p text:style-name="First_20_paragraph">Considere uma linha do <text:span text:style-name="Source_20_Text">ecommerce_join.csv</text:span> com <text:span text:style-name="Source_20_Text">action = stock</text:span>, contendo <text:span text:style-name="Source_20_Text">product_id</text:span>, <text:span text:style-name="Source_20_Text">category_id</text:span>, <text:span text:style-name="Source_20_Text">quantity_available</text:span>, <text:span text:style-name="Source_20_Text">timestamp</text:span>, etc.</text:p>
      <text:p text:style-name="TableCaption">Materialização de uma linha <text:span text:style-name="Source_20_Text">action=stock</text:span> nos diferentes backends.</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text:span text:style-name="Strong_20_Emphasis">Backend</text:span></text:p>
            </table:table-cell>
            <table:table-cell table:style-name="TableHeaderRowCell" office:value-type="string">
              <text:p text:style-name="Table_20_Heading"><text:span text:style-name="Strong_20_Emphasis">Entidade</text:span></text:p>
            </table:table-cell>
            <table:table-cell table:style-name="TableHeaderRowCell" office:value-type="string">
              <text:p text:style-name="Table_20_Heading"><text:span text:style-name="Strong_20_Emphasis">Filtro</text:span></text:p>
            </table:table-cell>
            <table:table-cell table:style-name="TableHeaderRowCell" office:value-type="string">
              <text:p text:style-name="Table_20_Heading"><text:span text:style-name="Strong_20_Emphasis">Saída materializada</text:span></text:p>
            </table:table-cell>
          </table:table-row>
        </table:table-header-rows>
        <table:table-row>
          <table:table-cell table:style-name="TableRowCell" office:value-type="string">
            <text:p text:style-name="Table_20_Contents">PostgreSQL</text:p>
          </table:table-cell>
          <table:table-cell table:style-name="TableRowCell" office:value-type="string">
            <text:p text:style-name="Table_20_Contents">inventory</text:p>
          </table:table-cell>
          <table:table-cell table:style-name="TableRowCell" office:value-type="string">
            <text:p text:style-name="Table_20_Contents">action == stock</text:p>
          </table:table-cell>
          <table:table-cell table:style-name="TableRowCell" office:value-type="string">
            <text:p text:style-name="Table_20_Contents">Linha plana: product_id, quantity_available, last_restock_date, price.</text:p>
          </table:table-cell>
        </table:table-row>
        <table:table-row>
          <table:table-cell table:style-name="TableRowCell" office:value-type="string">
            <text:p text:style-name="Table_20_Contents">MongoDB</text:p>
          </table:table-cell>
          <table:table-cell table:style-name="TableRowCell" office:value-type="string">
            <text:p text:style-name="Table_20_Contents">product_catalog</text:p>
          </table:table-cell>
          <table:table-cell table:style-name="TableRowCell" office:value-type="string">
            <text:p text:style-name="Table_20_Contents">action == stock</text:p>
          </table:table-cell>
          <table:table-cell table:style-name="TableRowCell" office:value-type="string">
            <text:p text:style-name="Table_20_Contents">Documento com campos de produto e subobjetos category e stock aninhados.</text:p>
          </table:table-cell>
        </table:table-row>
        <table:table-row>
          <table:table-cell table:style-name="TableRowCell" office:value-type="string">
            <text:p text:style-name="Table_20_Contents">Cassandra</text:p>
          </table:table-cell>
          <table:table-cell table:style-name="TableRowCell" office:value-type="string">
            <text:p text:style-name="Table_20_Contents">user_activity_log</text:p>
          </table:table-cell>
          <table:table-cell table:style-name="TableRowCell" office:value-type="string">
            <text:p text:style-name="Table_20_Contents">nenhum (todas as linhas)</text:p>
          </table:table-cell>
          <table:table-cell table:style-name="TableRowCell" office:value-type="string">
            <text:p text:style-name="Table_20_Contents">Registro com timestamp renomeado para event_time; PK composta (user_id, timestamp).</text:p>
          </table:table-cell>
        </table:table-row>
        <table:table-row>
          <table:table-cell table:style-name="TableRowCell" office:value-type="string">
            <text:p text:style-name="Table_20_Contents">Redi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Entidades Redis usam outros filtros; esta linha não alimenta Redis.</text:p>
          </table:table-cell>
        </table:table-row>
        <table:table-row>
          <table:table-cell table:style-name="TableRowCell" office:value-type="string">
            <text:p text:style-name="Table_20_Contents">Neo4j</text:p>
          </table:table-cell>
          <table:table-cell table:style-name="TableRowCell" office:value-type="string">
            <text:p text:style-name="Table_20_Contents">nó Product</text:p>
          </table:table-cell>
          <table:table-cell table:style-name="TableRowCell" office:value-type="string">
            <text:p text:style-name="Table_20_Contents">action == stock</text:p>
          </table:table-cell>
          <table:table-cell table:style-name="TableRowCell" office:value-type="string">
            <text:p text:style-name="Table_20_Contents">Nó :Product com product_id como chave de MERGE.</text:p>
          </table:table-cell>
        </table:table-row>
      </table:table>
      <text:p text:style-name="First_20_paragraph"><text:line-break/>Fonte: Elaborado pelo autor (2026).</text:p>
      <text:p text:style-name="Text_20_body">Assim, um <text:span text:style-name="Strong_20_Emphasis">único CSV largo</text:span> alimenta destinos heterogêneos: tabelas relacionais filtradas por tipo de evento, documentos aninhados, <text:span text:style-name="Emphasis">log</text:span> colunar com renomeação de colunas e nós de grafo — materializando a persistência poliglota descrita no capítulo 2.</text:p>
      <text:h text:style-name="Heading_20_2" text:outline-level="2"><text:bookmark-start text:name="validação-e-execução"/>Validação e Execução<text:bookmark-end text:name="validação-e-execução"/></text:h>
      <text:p text:style-name="First_20_paragraph">Erros de configuração levantam <text:span text:style-name="Source_20_Text">BusinessException</text:span> antes de qualquer conexão. O modo <text:span text:style-name="Source_20_Text">--dry-run</text:span> lista contagens por entidade sem contatar os SGBDs. O <text:span text:style-name="Emphasis">driver</text:span> Apache Cassandra é importado de forma tardia para permitir <text:span text:style-name="Source_20_Text">--dry-run</text:span> em ambientes onde a extensão C do <text:span text:style-name="Emphasis">driver</text:span> não está disponível (por exemplo, versões recentes do Python).</text:p>
      <text:p text:style-name="Text_20_body">Testes automatizados (<text:span text:style-name="Source_20_Text">pytest</text:span>) cobrem validação de schema, separação e mesclagem dos dois arquivos de configuração, mapeamento de colunas (<text:span text:style-name="Source_20_Text">csv_column</text:span>, <text:span text:style-name="Source_20_Text">schema_column</text:span>, aninhamento), filtros e <text:span text:style-name="Emphasis">smoke tests</text:span> de validação + <text:span text:style-name="Emphasis">dry-run</text:span>. O arquivo <text:span text:style-name="Source_20_Text">docker-compose.yml</text:span> na raiz define os contêineres de PostgreSQL, Redis, MongoDB, Cassandra e Neo4j para testes de integração manuais; o script <text:span text:style-name="Source_20_Text">run_example.sh</text:span> lê o <text:span text:style-name="Source_20_Text">sgbd_config.json</text:span> e <text:span text:style-name="Strong_20_Emphasis">sobe apenas os SGBDs ali declarados</text:span>, em seguida orquestra um <text:span text:style-name="Emphasis">dry-run</text:span> e a importação real com <text:span text:style-name="Source_20_Text">--create-schema</text:span>.</text:p>
      <text:h text:style-name="Heading_20_3" text:outline-level="3"><text:bookmark-start text:name="evidência-de-execução-cenário-e-commerce"/>Evidência de Execução (Cenário E-commerce)<text:bookmark-end text:name="evidência-de-execução-cenário-e-commerce"/></text:h>
      <text:p text:style-name="First_20_paragraph">O arquivo <text:span text:style-name="Source_20_Text">data/ecommerce/ecommerce_join.csv</text:span> contém 32 linhas de eventos (<text:span text:style-name="Source_20_Text">stock</text:span>, <text:span text:style-name="Source_20_Text">purchase</text:span>, <text:span text:style-name="Source_20_Text">add_to_cart</text:span>, <text:span text:style-name="Source_20_Text">select_product</text:span>). Usando <text:span text:style-name="Source_20_Text">import_config.json</text:span> e <text:span text:style-name="Source_20_Text">sgbd_config.json</text:span> com a <text:span text:style-name="Emphasis">flag</text:span> <text:span text:style-name="Source_20_Text">--dry-run</text:span>, a ferramenta reporta as contagens da Tabela <text:a xlink:type="simple" xlink:href="#tab:dryrun" office:name=""><text:span text:style-name="Definition">4.4</text:span></text:a> sem abrir conexões com os SGBDs — útil para revisar o mapeamento antes da carga.</text:p>
      <text:p text:style-name="TableCaption">Contagens reportadas pelo modo <text:span text:style-name="Source_20_Text">--dry-run</text:span> no cenário e-commerce.</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ext:span text:style-name="Strong_20_Emphasis">Backend</text:span></text:p>
            </table:table-cell>
            <table:table-cell table:style-name="TableHeaderRowCell" office:value-type="string">
              <text:p text:style-name="Table_20_Heading"><text:span text:style-name="Strong_20_Emphasis">Destino</text:span></text:p>
            </table:table-cell>
            <table:table-cell table:style-name="TableHeaderRowCell" office:value-type="string">
              <text:p text:style-name="P1"><text:span text:style-name="Strong_20_Emphasis">Registros (após filtros/deduplicação)</text:span></text:p>
            </table:table-cell>
          </table:table-row>
        </table:table-header-rows>
        <table:table-row>
          <table:table-cell table:style-name="TableRowCell" office:value-type="string">
            <text:p text:style-name="Table_20_Contents">PostgreSQL</text:p>
          </table:table-cell>
          <table:table-cell table:style-name="TableRowCell" office:value-type="string">
            <text:p text:style-name="Table_20_Contents"><text:span text:style-name="Source_20_Text">categories</text:span></text:p>
          </table:table-cell>
          <table:table-cell table:style-name="TableRowCell" office:value-type="string">
            <text:p text:style-name="P2">8</text:p>
          </table:table-cell>
        </table:table-row>
        <table:table-row>
          <table:table-cell table:style-name="TableRowCell" office:value-type="string">
            <text:p text:style-name="Table_20_Contents">PostgreSQL</text:p>
          </table:table-cell>
          <table:table-cell table:style-name="TableRowCell" office:value-type="string">
            <text:p text:style-name="Table_20_Contents"><text:span text:style-name="Source_20_Text">products</text:span></text:p>
          </table:table-cell>
          <table:table-cell table:style-name="TableRowCell" office:value-type="string">
            <text:p text:style-name="P2">8</text:p>
          </table:table-cell>
        </table:table-row>
        <table:table-row>
          <table:table-cell table:style-name="TableRowCell" office:value-type="string">
            <text:p text:style-name="Table_20_Contents">PostgreSQL</text:p>
          </table:table-cell>
          <table:table-cell table:style-name="TableRowCell" office:value-type="string">
            <text:p text:style-name="Table_20_Contents"><text:span text:style-name="Source_20_Text">inventory</text:span></text:p>
          </table:table-cell>
          <table:table-cell table:style-name="TableRowCell" office:value-type="string">
            <text:p text:style-name="P2">8</text:p>
          </table:table-cell>
        </table:table-row>
        <table:table-row>
          <table:table-cell table:style-name="TableRowCell" office:value-type="string">
            <text:p text:style-name="Table_20_Contents">PostgreSQL</text:p>
          </table:table-cell>
          <table:table-cell table:style-name="TableRowCell" office:value-type="string">
            <text:p text:style-name="Table_20_Contents"><text:span text:style-name="Source_20_Text">orders</text:span></text:p>
          </table:table-cell>
          <table:table-cell table:style-name="TableRowCell" office:value-type="string">
            <text:p text:style-name="P2">8</text:p>
          </table:table-cell>
        </table:table-row>
        <table:table-row>
          <table:table-cell table:style-name="TableRowCell" office:value-type="string">
            <text:p text:style-name="Table_20_Contents">MongoDB</text:p>
          </table:table-cell>
          <table:table-cell table:style-name="TableRowCell" office:value-type="string">
            <text:p text:style-name="Table_20_Contents"><text:span text:style-name="Source_20_Text">product_catalog</text:span></text:p>
          </table:table-cell>
          <table:table-cell table:style-name="TableRowCell" office:value-type="string">
            <text:p text:style-name="P2">8 documentos</text:p>
          </table:table-cell>
        </table:table-row>
        <table:table-row>
          <table:table-cell table:style-name="TableRowCell" office:value-type="string">
            <text:p text:style-name="Table_20_Contents">Cassandra</text:p>
          </table:table-cell>
          <table:table-cell table:style-name="TableRowCell" office:value-type="string">
            <text:p text:style-name="Table_20_Contents"><text:span text:style-name="Source_20_Text">user_activity_log</text:span></text:p>
          </table:table-cell>
          <table:table-cell table:style-name="TableRowCell" office:value-type="string">
            <text:p text:style-name="P2">32 linhas (todas as ações)</text:p>
          </table:table-cell>
        </table:table-row>
        <table:table-row>
          <table:table-cell table:style-name="TableRowCell" office:value-type="string">
            <text:p text:style-name="Table_20_Contents">Redis</text:p>
          </table:table-cell>
          <table:table-cell table:style-name="TableRowCell" office:value-type="string">
            <text:p text:style-name="Table_20_Contents"><text:span text:style-name="Source_20_Text">shopping_cart</text:span></text:p>
          </table:table-cell>
          <table:table-cell table:style-name="TableRowCell" office:value-type="string">
            <text:p text:style-name="P2">8</text:p>
          </table:table-cell>
        </table:table-row>
        <table:table-row>
          <table:table-cell table:style-name="TableRowCell" office:value-type="string">
            <text:p text:style-name="Table_20_Contents">Redis</text:p>
          </table:table-cell>
          <table:table-cell table:style-name="TableRowCell" office:value-type="string">
            <text:p text:style-name="Table_20_Contents"><text:span text:style-name="Source_20_Text">user_session</text:span></text:p>
          </table:table-cell>
          <table:table-cell table:style-name="TableRowCell" office:value-type="string">
            <text:p text:style-name="P2">8</text:p>
          </table:table-cell>
        </table:table-row>
        <table:table-row>
          <table:table-cell table:style-name="TableRowCell" office:value-type="string">
            <text:p text:style-name="Table_20_Contents">Neo4j</text:p>
          </table:table-cell>
          <table:table-cell table:style-name="TableRowCell" office:value-type="string">
            <text:p text:style-name="Table_20_Contents">nó <text:span text:style-name="Source_20_Text">User</text:span></text:p>
          </table:table-cell>
          <table:table-cell table:style-name="TableRowCell" office:value-type="string">
            <text:p text:style-name="P2">8</text:p>
          </table:table-cell>
        </table:table-row>
        <table:table-row>
          <table:table-cell table:style-name="TableRowCell" office:value-type="string">
            <text:p text:style-name="Table_20_Contents">Neo4j</text:p>
          </table:table-cell>
          <table:table-cell table:style-name="TableRowCell" office:value-type="string">
            <text:p text:style-name="Table_20_Contents">nó <text:span text:style-name="Source_20_Text">Product</text:span></text:p>
          </table:table-cell>
          <table:table-cell table:style-name="TableRowCell" office:value-type="string">
            <text:p text:style-name="P2">8</text:p>
          </table:table-cell>
        </table:table-row>
        <table:table-row>
          <table:table-cell table:style-name="TableRowCell" office:value-type="string">
            <text:p text:style-name="Table_20_Contents">Neo4j</text:p>
          </table:table-cell>
          <table:table-cell table:style-name="TableRowCell" office:value-type="string">
            <text:p text:style-name="Table_20_Contents">aresta <text:span text:style-name="Source_20_Text">PURCHASED</text:span></text:p>
          </table:table-cell>
          <table:table-cell table:style-name="TableRowCell" office:value-type="string">
            <text:p text:style-name="P2">conforme linhas <text:span text:style-name="Source_20_Text">purchase</text:span></text:p>
          </table:table-cell>
        </table:table-row>
      </table:table>
      <text:p text:style-name="First_20_paragraph"><text:line-break/>Fonte: Elaborado pelo autor (2026).</text:p>
      <text:p text:style-name="Text_20_body">Com <text:span text:style-name="Source_20_Text">docker compose up -d</text:span> e <text:span text:style-name="Source_20_Text">run_example.sh</text:span> (ou importação sem <text:span text:style-name="Source_20_Text">--dry-run</text:span>), os mesmos volumes são persistidos nos cinco <text:span text:style-name="Emphasis">backends</text:span> configurados, materializando o cenário poliglota da seção 2.1.</text:p>
      <text:h text:style-name="Heading_20_1" text:outline-level="1"><text:bookmark-start text:name="atividades-futuras"/>Atividades Futuras<text:bookmark-end text:name="atividades-futuras"/></text:h>
      <text:list text:style-name="List_20_1">
        <text:list-item>
          <text:p text:style-name="List_20_Bullet"><text:span text:style-name="Strong_20_Emphasis">Avaliação de desempenho</text:span> das importações com diferentes volumes de dados CSV e configurações, comparando importações simples e complexas para os diferentes modelos de dados destino.</text:p>
        </text:list-item>
        <text:list-item>
          <text:p text:style-name="List_20_Bullet"><text:span text:style-name="Strong_20_Emphasis">Interface gráfica </text:span><text:span text:style-name="T1">desktop</text:span> (semestre seguinte) que monte o comando CLI e visualize os arquivos JSON de configuração.</text:p>
        </text:list-item>
        <text:list-item>
          <text:p text:style-name="List_20_Bullet"><text:span text:style-name="Strong_20_Emphasis">Suporte a TSV/Excel</text:span> e a processamento <text:span text:style-name="Emphasis">chunked</text:span> para CSV maiores que a RAM.</text:p>
        </text:list-item>
        <text:list-item>
          <text:p text:style-name="List_20_Bullet"><text:span text:style-name="Strong_20_Emphasis">Operadores de filtro adicionais</text:span> e políticas de coerção de tipos configuráveis.</text:p>
        </text:list-item>
        <text:list-item>
          <text:p text:style-name="List_20_Bullet"><text:span text:style-name="Strong_20_Emphasis">Testes de integração</text:span> contra <text:span text:style-name="Source_20_Text">docker compose</text:span> em CI.</text:p>
        </text:list-item>
        <text:list-item>
          <text:p text:style-name="List_20_Bullet"><text:span text:style-name="Strong_20_Emphasis">Generalização</text:span> do núcleo de importação para novos conectores (mensageria, <text:span text:style-name="Emphasis">data lakes</text:span>, outros SGBDs).</text:p>
        </text:list-item>
      </text:list>
      <text:h text:style-name="Heading_20_1" text:outline-level="1"><text:bookmark-start text:name="considerações-finais"/>Considerações Finais<text:bookmark-end text:name="considerações-finais"/></text:h>
      <text:p text:style-name="First_20_paragraph">Este TCC I apresentou a fundamentação teórica da persistência poliglota, o estado da arte em importação e modelagem de dados heterogêneos, e a proposta da ferramenta <text:span text:style-name="Emphasis">Polyglot Import CSV</text:span> como utilitário de <text:span text:style-name="Emphasis">bootstrap</text:span> declarativo a partir de CSV.</text:p>
      <text:p text:style-name="Text_20_body">As principais contribuições desta etapa são: (i) um formato de configuração JSON validado estaticamente por JSON Schema, separado em mapeamento e conexão, com mapeamento recursivo de colunas e filtros por valor; (ii) um protótipo em Python que materializa o mesmo CSV operacional em PostgreSQL, MongoDB, Cassandra, Redis e Neo4j; (iii) o modo <text:span text:style-name="Source_20_Text">--dry-run</text:span> para revisão prévia de contagens; e (iv) o cenário e-commerce reprodutível com <text:span text:style-name="Source_20_Text">ecommerce_join.csv</text:span>, <text:span text:style-name="Source_20_Text">import_config.json</text:span>, <text:span text:style-name="Source_20_Text">sgbd_config.json</text:span> e <text:span text:style-name="Source_20_Text">docker-compose.yml</text:span>.</text:p>
      <text:p text:style-name="Text_20_body">As limitações reconhecidas incluem: testes automatizados predominantemente unitários (sem suíte de integração contínua contra Docker); processamento em memória do CSV inteiro; e dependência do <text:span text:style-name="Emphasis">driver</text:span> Cassandra em ambientes Python recentes. Itens como interface gráfica, suporte a TSV/Excel, <text:span text:style-name="Emphasis">chunked processing</text:span> e novos conectores permanecem no escopo do TCC II (Capítulo 5).</text:p>
      <text:p text:style-name="Text_20_body">O trabalho de conclusão de curso em dezembro de 2026 poderá aprofundar a avaliação experimental (desempenho, consistência entre <text:span text:style-name="Emphasis">stores</text:span>) e a interface de uso, consolidando a ferramenta como artefato de pesquisa e de código aberto alinhado à literatura sobre SGPD e modelagem poliglota de dados.</text:p>
      <text:h text:style-name="Heading_20_1" text:outline-level="1"><text:bookmark-start text:name="ap:schemas"/>JSON Schemas de Configuração na Forma Serializada<text:bookmark-end text:name="ap:schemas"/></text:h>
      <text:p text:style-name="First_20_paragraph">Este apêndice reproduz os dois documentos <text:span text:style-name="Emphasis">JSON Schema</text:span> (rascunho 2020-12) tal como embutidos em <text:span text:style-name="Source_20_Text">src/polyglotimportcsv/schemas/</text:span>. A estrutura de alto nível de ambos é descrita na seção <text:a xlink:type="simple" xlink:href="#sec:config-format" office:name=""><text:span text:style-name="Definition">4.2</text:span></text:a>; os fragmentos por SGBD são apresentados nas respectivas subseções do capítulo 4.</text:p>
      <text:h text:style-name="Heading_20_2" text:outline-level="2"><text:bookmark-start text:name="schema-de-importação-import_config.schema.json"/>Schema de Importação (<text:span text:style-name="Source_20_Text">import_config.schema.json</text:span>)<text:bookmark-end text:name="schema-de-importação-import_config.schema.json"/></text:h>
      <text:p text:style-name="Preformatted_20_Text">{</text:p>
      <text:p text:style-name="Preformatted_20_Text"><text:s text:c="2"/>"$schema": "https://json-schema.org/draft/2020-12/schema",</text:p>
      <text:p text:style-name="Preformatted_20_Text"><text:s text:c="2"/>"$id": "https://polyglot-import-csv.local/schemas/import_config.schema.json",</text:p>
      <text:p text:style-name="Preformatted_20_Text"><text:s text:c="2"/>"title": "PolyglotImportCSV import configuration",</text:p>
      <text:p text:style-name="Preformatted_20_Text"><text:s text:c="2"/>"description": "Declarative mapping from a wide CSV file to entities and relationships of one or more database backends. Connection settings live in the separate SGBD configuration.",</text:p>
      <text:p text:style-name="Preformatted_20_Text"><text:s text:c="2"/>"type": "object",</text:p>
      <text:p text:style-name="Preformatted_20_Text"><text:s text:c="2"/>"required": ["version"],</text:p>
      <text:p text:style-name="Preformatted_20_Text"><text:s text:c="2"/>"properties": {</text:p>
      <text:p text:style-name="Preformatted_20_Text"><text:s text:c="4"/>"version": {</text:p>
      <text:p text:style-name="Preformatted_20_Text"><text:s text:c="6"/>"type": "integer",</text:p>
      <text:p text:style-name="Preformatted_20_Text"><text:s text:c="6"/>"minimum": 1,</text:p>
      <text:p text:style-name="Preformatted_20_Text"><text:s text:c="6"/>"description": "Configuration format version."</text:p>
      <text:p text:style-name="Preformatted_20_Text"><text:s text:c="4"/>},</text:p>
      <text:p text:style-name="Preformatted_20_Text"><text:s text:c="4"/>"postgres": <text:s text:c="1"/>{ "$ref": "#/$defs/postgresMapping" },</text:p>
      <text:p text:style-name="Preformatted_20_Text"><text:s text:c="4"/>"mongodb": <text:s text:c="2"/>{ "$ref": "#/$defs/mongoMapping" },</text:p>
      <text:p text:style-name="Preformatted_20_Text"><text:s text:c="4"/>"cassandra": { "$ref": "#/$defs/cassandraMapping" },</text:p>
      <text:p text:style-name="Preformatted_20_Text"><text:s text:c="4"/>"redis": <text:s text:c="4"/>{ "$ref": "#/$defs/redisMapping" },</text:p>
      <text:p text:style-name="Preformatted_20_Text"><text:s text:c="4"/>"neo4j": <text:s text:c="4"/>{ "$ref": "#/$defs/neo4jMapping" }</text:p>
      <text:p text:style-name="Preformatted_20_Text"><text:s text:c="2"/>},</text:p>
      <text:p text:style-name="Preformatted_20_Text"><text:s text:c="2"/>"additionalProperties": false,</text:p>
      <text:p text:style-name="Preformatted_20_Text"><text:s text:c="2"/>"$defs": {</text:p>
      <text:p text:style-name="Preformatted_20_Text"><text:s text:c="4"/>"columnSpec": {</text:p>
      <text:p text:style-name="Preformatted_20_Text"><text:s text:c="6"/>"type": "object",</text:p>
      <text:p text:style-name="Preformatted_20_Text"><text:s text:c="6"/>"description": "Leaf mapping from a CSV column to a destination field.",</text:p>
      <text:p text:style-name="Preformatted_20_Text"><text:s text:c="6"/>"properties": {</text:p>
      <text:p text:style-name="Preformatted_20_Text"><text:s text:c="8"/>"is_key": {</text:p>
      <text:p text:style-name="Preformatted_20_Text"><text:s text:c="10"/>"type": "boolean",</text:p>
      <text:p text:style-name="Preformatted_20_Text"><text:s text:c="10"/>"description": "Primary or merge key for the entity."</text:p>
      <text:p text:style-name="Preformatted_20_Text"><text:s text:c="8"/>},</text:p>
      <text:p text:style-name="Preformatted_20_Text"><text:s text:c="8"/>"csv_column": {</text:p>
      <text:p text:style-name="Preformatted_20_Text"><text:s text:c="10"/>"description": "CSV header name or 0-based column index.",</text:p>
      <text:p text:style-name="Preformatted_20_Text"><text:s text:c="10"/>"oneOf": [</text:p>
      <text:p text:style-name="Preformatted_20_Text"><text:s text:c="12"/>{ "type": "string", <text:s text:c="1"/>"minLength": 1 },</text:p>
      <text:p text:style-name="Preformatted_20_Text"><text:s text:c="12"/>{ "type": "integer", "minimum": 0 }</text:p>
      <text:p text:style-name="Preformatted_20_Text"><text:s text:c="10"/>]</text:p>
      <text:p text:style-name="Preformatted_20_Text"><text:s text:c="8"/>},</text:p>
      <text:p text:style-name="Preformatted_20_Text"><text:s text:c="8"/>"schema_column": {</text:p>
      <text:p text:style-name="Preformatted_20_Text"><text:s text:c="10"/>"type": "string",</text:p>
      <text:p text:style-name="Preformatted_20_Text"><text:s text:c="10"/>"minLength": 1,</text:p>
      <text:p text:style-name="Preformatted_20_Text"><text:s text:c="10"/>"description": "Destination field name when it differs from the JSON key."</text:p>
      <text:p text:style-name="Preformatted_20_Text"><text:s text:c="8"/>},</text:p>
      <text:p text:style-name="Preformatted_20_Text"><text:s text:c="8"/>"db_type": {</text:p>
      <text:p text:style-name="Preformatted_20_Text"><text:s text:c="10"/>"type": "string",</text:p>
      <text:p text:style-name="Preformatted_20_Text"><text:s text:c="10"/>"description": "SQL/CQL type for DDL generation (PostgreSQL, Cassandra)."</text:p>
      <text:p text:style-name="Preformatted_20_Text"><text:s text:c="8"/>}</text:p>
      <text:p text:style-name="Preformatted_20_Text"><text:s text:c="6"/>},</text:p>
      <text:p text:style-name="Preformatted_20_Text"><text:s text:c="6"/>"additionalProperties": false</text:p>
      <text:p text:style-name="Preformatted_20_Text"><text:s text:c="4"/>},</text:p>
      <text:p text:style-name="Preformatted_20_Text"><text:s text:c="4"/>"columnEntry": {</text:p>
      <text:p text:style-name="Preformatted_20_Text"><text:s text:c="6"/>"description": "Either a leaf columnSpec or a nested object (MongoDB subdocuments).",</text:p>
      <text:p text:style-name="Preformatted_20_Text"><text:s text:c="6"/>"oneOf": [</text:p>
      <text:p text:style-name="Preformatted_20_Text"><text:s text:c="8"/>{ "$ref": "#/$defs/columnSpec" },</text:p>
      <text:p text:style-name="Preformatted_20_Text"><text:s text:c="8"/>{</text:p>
      <text:p text:style-name="Preformatted_20_Text"><text:s text:c="10"/>"type": "object",</text:p>
      <text:p text:style-name="Preformatted_20_Text"><text:s text:c="10"/>"minProperties": 1,</text:p>
      <text:p text:style-name="Preformatted_20_Text"><text:s text:c="10"/>"additionalProperties": { "$ref": "#/$defs/columnEntry" }</text:p>
      <text:p text:style-name="Preformatted_20_Text"><text:s text:c="8"/>}</text:p>
      <text:p text:style-name="Preformatted_20_Text"><text:s text:c="6"/>]</text:p>
      <text:p text:style-name="Preformatted_20_Text"><text:s text:c="4"/>},</text:p>
      <text:p text:style-name="Preformatted_20_Text"><text:s text:c="4"/>"filter": {</text:p>
      <text:p text:style-name="Preformatted_20_Text"><text:s text:c="6"/>"type": "object",</text:p>
      <text:p text:style-name="Preformatted_20_Text"><text:s text:c="6"/>"required": ["column", "operator"],</text:p>
      <text:p text:style-name="Preformatted_20_Text"><text:s text:c="6"/>"properties": {</text:p>
      <text:p text:style-name="Preformatted_20_Text"><text:s text:c="8"/>"column": <text:s text:c="7"/>{ "type": "string", "minLength": 1 },</text:p>
      <text:p text:style-name="Preformatted_20_Text"><text:s text:c="8"/>"operator": {</text:p>
      <text:p text:style-name="Preformatted_20_Text"><text:s text:c="10"/>"type": "string",</text:p>
      <text:p text:style-name="Preformatted_20_Text"><text:s text:c="10"/>"enum": ["==","!=","&gt;","&lt;","&gt;=","&lt;=","in","not_in","each"]</text:p>
      <text:p text:style-name="Preformatted_20_Text"><text:s text:c="8"/>},</text:p>
      <text:p text:style-name="Preformatted_20_Text"><text:s text:c="8"/>"value": {},</text:p>
      <text:p text:style-name="Preformatted_20_Text"><text:s text:c="8"/>"target_suffix": { "type": "string" }</text:p>
      <text:p text:style-name="Preformatted_20_Text"><text:s text:c="6"/>},</text:p>
      <text:p text:style-name="Preformatted_20_Text"><text:s text:c="6"/>"additionalProperties": false</text:p>
      <text:p text:style-name="Preformatted_20_Text"><text:s text:c="4"/>},</text:p>
      <text:p text:style-name="Preformatted_20_Text"><text:s text:c="4"/>"entity": {</text:p>
      <text:p text:style-name="Preformatted_20_Text"><text:s text:c="6"/>"type": "object",</text:p>
      <text:p text:style-name="Preformatted_20_Text"><text:s text:c="6"/>"required": ["columns"],</text:p>
      <text:p text:style-name="Preformatted_20_Text"><text:s text:c="6"/>"properties": {</text:p>
      <text:p text:style-name="Preformatted_20_Text"><text:s text:c="8"/>"columns": {</text:p>
      <text:p text:style-name="Preformatted_20_Text"><text:s text:c="10"/>"type": "object",</text:p>
      <text:p text:style-name="Preformatted_20_Text"><text:s text:c="10"/>"minProperties": 1,</text:p>
      <text:p text:style-name="Preformatted_20_Text"><text:s text:c="10"/>"additionalProperties": { "$ref": "#/$defs/columnEntry" }</text:p>
      <text:p text:style-name="Preformatted_20_Text"><text:s text:c="8"/>},</text:p>
      <text:p text:style-name="Preformatted_20_Text"><text:s text:c="8"/>"filters": {</text:p>
      <text:p text:style-name="Preformatted_20_Text"><text:s text:c="10"/>"type": "array",</text:p>
      <text:p text:style-name="Preformatted_20_Text"><text:s text:c="10"/>"items": { "$ref": "#/$defs/filter" }</text:p>
      <text:p text:style-name="Preformatted_20_Text"><text:s text:c="8"/>},</text:p>
      <text:p text:style-name="Preformatted_20_Text"><text:s text:c="8"/>"cassandra_partition": {</text:p>
      <text:p text:style-name="Preformatted_20_Text"><text:s text:c="10"/>"type": "array",</text:p>
      <text:p text:style-name="Preformatted_20_Text"><text:s text:c="10"/>"items": { "type": "string" }</text:p>
      <text:p text:style-name="Preformatted_20_Text"><text:s text:c="8"/>},</text:p>
      <text:p text:style-name="Preformatted_20_Text"><text:s text:c="8"/>"cassandra_cluster": {</text:p>
      <text:p text:style-name="Preformatted_20_Text"><text:s text:c="10"/>"type": "array",</text:p>
      <text:p text:style-name="Preformatted_20_Text"><text:s text:c="10"/>"items": { "type": "string" }</text:p>
      <text:p text:style-name="Preformatted_20_Text"><text:s text:c="8"/>}</text:p>
      <text:p text:style-name="Preformatted_20_Text"><text:s text:c="6"/>},</text:p>
      <text:p text:style-name="Preformatted_20_Text"><text:s text:c="6"/>"additionalProperties": false</text:p>
      <text:p text:style-name="Preformatted_20_Text"><text:s text:c="4"/>},</text:p>
      <text:p text:style-name="Preformatted_20_Text"><text:s text:c="4"/>"postgresMapping": {</text:p>
      <text:p text:style-name="Preformatted_20_Text"><text:s text:c="6"/>"type": "object",</text:p>
      <text:p text:style-name="Preformatted_20_Text"><text:s text:c="6"/>"required": ["entities"],</text:p>
      <text:p text:style-name="Preformatted_20_Text"><text:s text:c="6"/>"properties": {</text:p>
      <text:p text:style-name="Preformatted_20_Text"><text:s text:c="8"/>"entities": {</text:p>
      <text:p text:style-name="Preformatted_20_Text"><text:s text:c="10"/>"type": "object",</text:p>
      <text:p text:style-name="Preformatted_20_Text"><text:s text:c="10"/>"additionalProperties": { "$ref": "#/$defs/entity" }</text:p>
      <text:p text:style-name="Preformatted_20_Text"><text:s text:c="8"/>},</text:p>
      <text:p text:style-name="Preformatted_20_Text"><text:s text:c="8"/>"relationships": {</text:p>
      <text:p text:style-name="Preformatted_20_Text"><text:s text:c="10"/>"type": "object",</text:p>
      <text:p text:style-name="Preformatted_20_Text"><text:s text:c="10"/>"additionalProperties": {</text:p>
      <text:p text:style-name="Preformatted_20_Text"><text:s text:c="12"/>"type": "object",</text:p>
      <text:p text:style-name="Preformatted_20_Text"><text:s text:c="12"/>"required": ["from","to","foreign_key"],</text:p>
      <text:p text:style-name="Preformatted_20_Text"><text:s text:c="12"/>"properties": {</text:p>
      <text:p text:style-name="Preformatted_20_Text"><text:s text:c="14"/>"from": <text:s text:c="10"/>{ "type": "string" },</text:p>
      <text:p text:style-name="Preformatted_20_Text"><text:s text:c="14"/>"to": <text:s text:c="12"/>{ "type": "string" },</text:p>
      <text:p text:style-name="Preformatted_20_Text"><text:s text:c="14"/>"foreign_key": <text:s text:c="3"/>{ "type": "string" },</text:p>
      <text:p text:style-name="Preformatted_20_Text"><text:s text:c="14"/>"references_key": { "type": "string" }</text:p>
      <text:p text:style-name="Preformatted_20_Text"><text:s text:c="12"/>},</text:p>
      <text:p text:style-name="Preformatted_20_Text"><text:s text:c="12"/>"additionalProperties": false</text:p>
      <text:p text:style-name="Preformatted_20_Text"><text:s text:c="10"/>}</text:p>
      <text:p text:style-name="Preformatted_20_Text"><text:s text:c="8"/>}</text:p>
      <text:p text:style-name="Preformatted_20_Text"><text:s text:c="6"/>},</text:p>
      <text:p text:style-name="Preformatted_20_Text"><text:s text:c="6"/>"additionalProperties": false</text:p>
      <text:p text:style-name="Preformatted_20_Text"><text:s text:c="4"/>},</text:p>
      <text:p text:style-name="Preformatted_20_Text"><text:s text:c="4"/>"mongoMapping": {</text:p>
      <text:p text:style-name="Preformatted_20_Text"><text:s text:c="6"/>"type": "object",</text:p>
      <text:p text:style-name="Preformatted_20_Text"><text:s text:c="6"/>"required": ["entities"],</text:p>
      <text:p text:style-name="Preformatted_20_Text"><text:s text:c="6"/>"properties": {</text:p>
      <text:p text:style-name="Preformatted_20_Text"><text:s text:c="8"/>"entities": {</text:p>
      <text:p text:style-name="Preformatted_20_Text"><text:s text:c="10"/>"type": "object",</text:p>
      <text:p text:style-name="Preformatted_20_Text"><text:s text:c="10"/>"additionalProperties": { "$ref": "#/$defs/entity" }</text:p>
      <text:p text:style-name="Preformatted_20_Text"><text:s text:c="8"/>}</text:p>
      <text:p text:style-name="Preformatted_20_Text"><text:s text:c="6"/>},</text:p>
      <text:p text:style-name="Preformatted_20_Text"><text:s text:c="6"/>"additionalProperties": false</text:p>
      <text:p text:style-name="Preformatted_20_Text"><text:s text:c="4"/>},</text:p>
      <text:p text:style-name="Preformatted_20_Text"><text:s text:c="4"/>"cassandraMapping": {</text:p>
      <text:p text:style-name="Preformatted_20_Text"><text:s text:c="6"/>"type": "object",</text:p>
      <text:p text:style-name="Preformatted_20_Text"><text:s text:c="6"/>"required": ["entities"],</text:p>
      <text:p text:style-name="Preformatted_20_Text"><text:s text:c="6"/>"properties": {</text:p>
      <text:p text:style-name="Preformatted_20_Text"><text:s text:c="8"/>"entities": {</text:p>
      <text:p text:style-name="Preformatted_20_Text"><text:s text:c="10"/>"type": "object",</text:p>
      <text:p text:style-name="Preformatted_20_Text"><text:s text:c="10"/>"additionalProperties": { "$ref": "#/$defs/entity" }</text:p>
      <text:p text:style-name="Preformatted_20_Text"><text:s text:c="8"/>}</text:p>
      <text:p text:style-name="Preformatted_20_Text"><text:s text:c="6"/>},</text:p>
      <text:p text:style-name="Preformatted_20_Text"><text:s text:c="6"/>"additionalProperties": false</text:p>
      <text:p text:style-name="Preformatted_20_Text"><text:s text:c="4"/>},</text:p>
      <text:p text:style-name="Preformatted_20_Text"><text:s text:c="4"/>"redisMapping": {</text:p>
      <text:p text:style-name="Preformatted_20_Text"><text:s text:c="6"/>"type": "object",</text:p>
      <text:p text:style-name="Preformatted_20_Text"><text:s text:c="6"/>"required": ["entities"],</text:p>
      <text:p text:style-name="Preformatted_20_Text"><text:s text:c="6"/>"properties": {</text:p>
      <text:p text:style-name="Preformatted_20_Text"><text:s text:c="8"/>"entities": {</text:p>
      <text:p text:style-name="Preformatted_20_Text"><text:s text:c="10"/>"type": "object",</text:p>
      <text:p text:style-name="Preformatted_20_Text"><text:s text:c="10"/>"additionalProperties": { "$ref": "#/$defs/entity" }</text:p>
      <text:p text:style-name="Preformatted_20_Text"><text:s text:c="8"/>}</text:p>
      <text:p text:style-name="Preformatted_20_Text"><text:s text:c="6"/>},</text:p>
      <text:p text:style-name="Preformatted_20_Text"><text:s text:c="6"/>"additionalProperties": false</text:p>
      <text:p text:style-name="Preformatted_20_Text"><text:s text:c="4"/>},</text:p>
      <text:p text:style-name="Preformatted_20_Text"><text:s text:c="4"/>"neo4jMapping": {</text:p>
      <text:p text:style-name="Preformatted_20_Text"><text:s text:c="6"/>"type": "object",</text:p>
      <text:p text:style-name="Preformatted_20_Text"><text:s text:c="6"/>"required": ["entities"],</text:p>
      <text:p text:style-name="Preformatted_20_Text"><text:s text:c="6"/>"properties": {</text:p>
      <text:p text:style-name="Preformatted_20_Text"><text:s text:c="8"/>"entities": {</text:p>
      <text:p text:style-name="Preformatted_20_Text"><text:s text:c="10"/>"type": "object",</text:p>
      <text:p text:style-name="Preformatted_20_Text"><text:s text:c="10"/>"additionalProperties": { "$ref": "#/$defs/entity" }</text:p>
      <text:p text:style-name="Preformatted_20_Text"><text:s text:c="8"/>},</text:p>
      <text:p text:style-name="Preformatted_20_Text"><text:s text:c="8"/>"relationships": {</text:p>
      <text:p text:style-name="Preformatted_20_Text"><text:s text:c="10"/>"type": "object",</text:p>
      <text:p text:style-name="Preformatted_20_Text"><text:s text:c="10"/>"additionalProperties": {</text:p>
      <text:p text:style-name="Preformatted_20_Text"><text:s text:c="12"/>"type": "object",</text:p>
      <text:p text:style-name="Preformatted_20_Text"><text:s text:c="12"/>"required": ["from","to","type"],</text:p>
      <text:p text:style-name="Preformatted_20_Text"><text:s text:c="12"/>"properties": {</text:p>
      <text:p text:style-name="Preformatted_20_Text"><text:s text:c="14"/>"from": { "type": "string" },</text:p>
      <text:p text:style-name="Preformatted_20_Text"><text:s text:c="14"/>"to": <text:s text:c="2"/>{ "type": "string" },</text:p>
      <text:p text:style-name="Preformatted_20_Text"><text:s text:c="14"/>"type": { "type": "string" },</text:p>
      <text:p text:style-name="Preformatted_20_Text"><text:s text:c="14"/>"columns": {</text:p>
      <text:p text:style-name="Preformatted_20_Text"><text:s text:c="16"/>"type": "object",</text:p>
      <text:p text:style-name="Preformatted_20_Text"><text:s text:c="16"/>"additionalProperties": { "$ref": "#/$defs/columnSpec" }</text:p>
      <text:p text:style-name="Preformatted_20_Text"><text:s text:c="14"/>}</text:p>
      <text:p text:style-name="Preformatted_20_Text"><text:s text:c="12"/>},</text:p>
      <text:p text:style-name="Preformatted_20_Text"><text:s text:c="12"/>"additionalProperties": false</text:p>
      <text:p text:style-name="Preformatted_20_Text"><text:s text:c="10"/>}</text:p>
      <text:p text:style-name="Preformatted_20_Text"><text:s text:c="8"/>}</text:p>
      <text:p text:style-name="Preformatted_20_Text"><text:s text:c="6"/>},</text:p>
      <text:p text:style-name="Preformatted_20_Text"><text:s text:c="6"/>"additionalProperties": false</text:p>
      <text:p text:style-name="Preformatted_20_Text"><text:s text:c="4"/>}</text:p>
      <text:p text:style-name="Preformatted_20_Text"><text:s text:c="2"/>}</text:p>
      <text:p text:style-name="Preformatted_20_Text">}</text:p>
      <text:h text:style-name="Heading_20_2" text:outline-level="2"><text:bookmark-start text:name="schema-de-conexão-sgbd_config.schema.json"/>Schema de Conexão (<text:span text:style-name="Source_20_Text">sgbd_config.schema.json</text:span>)<text:bookmark-end text:name="schema-de-conexão-sgbd_config.schema.json"/></text:h>
      <text:p text:style-name="Preformatted_20_Text">{</text:p>
      <text:p text:style-name="Preformatted_20_Text"><text:s text:c="2"/>"$schema": "https://json-schema.org/draft/2020-12/schema",</text:p>
      <text:p text:style-name="Preformatted_20_Text"><text:s text:c="2"/>"$id": "https://polyglot-import-csv.local/schemas/sgbd_config.schema.json",</text:p>
      <text:p text:style-name="Preformatted_20_Text"><text:s text:c="2"/>"title": "PolyglotImportCSV SGBD connection configuration",</text:p>
      <text:p text:style-name="Preformatted_20_Text"><text:s text:c="2"/>"description": "Connection settings for each database backend.",</text:p>
      <text:p text:style-name="Preformatted_20_Text"><text:s text:c="2"/>"type": "object",</text:p>
      <text:p text:style-name="Preformatted_20_Text"><text:s text:c="2"/>"required": ["version"],</text:p>
      <text:p text:style-name="Preformatted_20_Text"><text:s text:c="2"/>"properties": {</text:p>
      <text:p text:style-name="Preformatted_20_Text"><text:s text:c="4"/>"version": { "type": "integer", "minimum": 1 },</text:p>
      <text:p text:style-name="Preformatted_20_Text"><text:s text:c="4"/>"postgres": <text:s text:c="1"/>{ "$ref": "#/$defs/postgresConnection" },</text:p>
      <text:p text:style-name="Preformatted_20_Text"><text:s text:c="4"/>"mongodb": <text:s text:c="2"/>{ "$ref": "#/$defs/mongoConnection" },</text:p>
      <text:p text:style-name="Preformatted_20_Text"><text:s text:c="4"/>"cassandra": { "$ref": "#/$defs/cassandraConnection" },</text:p>
      <text:p text:style-name="Preformatted_20_Text"><text:s text:c="4"/>"redis": <text:s text:c="4"/>{ "$ref": "#/$defs/redisConnection" },</text:p>
      <text:p text:style-name="Preformatted_20_Text"><text:s text:c="4"/>"neo4j": <text:s text:c="4"/>{ "$ref": "#/$defs/neo4jConnection" }</text:p>
      <text:p text:style-name="Preformatted_20_Text"><text:s text:c="2"/>},</text:p>
      <text:p text:style-name="Preformatted_20_Text"><text:s text:c="2"/>"additionalProperties": false,</text:p>
      <text:p text:style-name="Preformatted_20_Text"><text:s text:c="2"/>"$defs": {</text:p>
      <text:p text:style-name="Preformatted_20_Text"><text:s text:c="4"/>"postgresConnection": {</text:p>
      <text:p text:style-name="Preformatted_20_Text"><text:s text:c="6"/>"type": "object",</text:p>
      <text:p text:style-name="Preformatted_20_Text"><text:s text:c="6"/>"properties": {</text:p>
      <text:p text:style-name="Preformatted_20_Text"><text:s text:c="8"/>"connection": {</text:p>
      <text:p text:style-name="Preformatted_20_Text"><text:s text:c="10"/>"type": "object",</text:p>
      <text:p text:style-name="Preformatted_20_Text"><text:s text:c="10"/>"properties": {</text:p>
      <text:p text:style-name="Preformatted_20_Text"><text:s text:c="12"/>"host": <text:s text:c="4"/>{ "type": "string" },</text:p>
      <text:p text:style-name="Preformatted_20_Text"><text:s text:c="12"/>"port": <text:s text:c="4"/>{ "type": "integer" },</text:p>
      <text:p text:style-name="Preformatted_20_Text"><text:s text:c="12"/>"database": { "type": "string" },</text:p>
      <text:p text:style-name="Preformatted_20_Text"><text:s text:c="12"/>"user": <text:s text:c="4"/>{ "type": "string" },</text:p>
      <text:p text:style-name="Preformatted_20_Text"><text:s text:c="12"/>"password": { "type": "string" }</text:p>
      <text:p text:style-name="Preformatted_20_Text"><text:s text:c="10"/>},</text:p>
      <text:p text:style-name="Preformatted_20_Text"><text:s text:c="10"/>"additionalProperties": false</text:p>
      <text:p text:style-name="Preformatted_20_Text"><text:s text:c="8"/>},</text:p>
      <text:p text:style-name="Preformatted_20_Text"><text:s text:c="8"/>"schema": {</text:p>
      <text:p text:style-name="Preformatted_20_Text"><text:s text:c="10"/>"type": "string",</text:p>
      <text:p text:style-name="Preformatted_20_Text"><text:s text:c="10"/>"default": "public"</text:p>
      <text:p text:style-name="Preformatted_20_Text"><text:s text:c="8"/>}</text:p>
      <text:p text:style-name="Preformatted_20_Text"><text:s text:c="6"/>},</text:p>
      <text:p text:style-name="Preformatted_20_Text"><text:s text:c="6"/>"additionalProperties": false</text:p>
      <text:p text:style-name="Preformatted_20_Text"><text:s text:c="4"/>},</text:p>
      <text:p text:style-name="Preformatted_20_Text"><text:s text:c="4"/>"mongoConnection": {</text:p>
      <text:p text:style-name="Preformatted_20_Text"><text:s text:c="6"/>"type": "object",</text:p>
      <text:p text:style-name="Preformatted_20_Text"><text:s text:c="6"/>"properties": {</text:p>
      <text:p text:style-name="Preformatted_20_Text"><text:s text:c="8"/>"connection": {</text:p>
      <text:p text:style-name="Preformatted_20_Text"><text:s text:c="10"/>"type": "object",</text:p>
      <text:p text:style-name="Preformatted_20_Text"><text:s text:c="10"/>"properties": {</text:p>
      <text:p text:style-name="Preformatted_20_Text"><text:s text:c="12"/>"uri": <text:s text:c="5"/>{ "type": "string" },</text:p>
      <text:p text:style-name="Preformatted_20_Text"><text:s text:c="12"/>"database": { "type": "string" }</text:p>
      <text:p text:style-name="Preformatted_20_Text"><text:s text:c="10"/>},</text:p>
      <text:p text:style-name="Preformatted_20_Text"><text:s text:c="10"/>"required": ["uri","database"],</text:p>
      <text:p text:style-name="Preformatted_20_Text"><text:s text:c="10"/>"additionalProperties": false</text:p>
      <text:p text:style-name="Preformatted_20_Text"><text:s text:c="8"/>}</text:p>
      <text:p text:style-name="Preformatted_20_Text"><text:s text:c="6"/>},</text:p>
      <text:p text:style-name="Preformatted_20_Text"><text:s text:c="6"/>"additionalProperties": false</text:p>
      <text:p text:style-name="Preformatted_20_Text"><text:s text:c="4"/>},</text:p>
      <text:p text:style-name="Preformatted_20_Text"><text:s text:c="4"/>"cassandraConnection": {</text:p>
      <text:p text:style-name="Preformatted_20_Text"><text:s text:c="6"/>"type": "object",</text:p>
      <text:p text:style-name="Preformatted_20_Text"><text:s text:c="6"/>"properties": {</text:p>
      <text:p text:style-name="Preformatted_20_Text"><text:s text:c="8"/>"connection": {</text:p>
      <text:p text:style-name="Preformatted_20_Text"><text:s text:c="10"/>"type": "object",</text:p>
      <text:p text:style-name="Preformatted_20_Text"><text:s text:c="10"/>"properties": {</text:p>
      <text:p text:style-name="Preformatted_20_Text"><text:s text:c="12"/>"hosts": <text:s text:c="11"/>{ "type": "array", "items": { "type": "string" } },</text:p>
      <text:p text:style-name="Preformatted_20_Text"><text:s text:c="12"/>"port": <text:s text:c="12"/>{ "type": "integer" },</text:p>
      <text:p text:style-name="Preformatted_20_Text"><text:s text:c="12"/>"keyspace": <text:s text:c="8"/>{ "type": "string" },</text:p>
      <text:p text:style-name="Preformatted_20_Text"><text:s text:c="12"/>"protocol_version": { "type": "integer" }</text:p>
      <text:p text:style-name="Preformatted_20_Text"><text:s text:c="10"/>},</text:p>
      <text:p text:style-name="Preformatted_20_Text"><text:s text:c="10"/>"required": ["hosts","keyspace"],</text:p>
      <text:p text:style-name="Preformatted_20_Text"><text:s text:c="10"/>"additionalProperties": false</text:p>
      <text:p text:style-name="Preformatted_20_Text"><text:s text:c="8"/>}</text:p>
      <text:p text:style-name="Preformatted_20_Text"><text:s text:c="6"/>},</text:p>
      <text:p text:style-name="Preformatted_20_Text"><text:s text:c="6"/>"additionalProperties": false</text:p>
      <text:p text:style-name="Preformatted_20_Text"><text:s text:c="4"/>},</text:p>
      <text:p text:style-name="Preformatted_20_Text"><text:s text:c="4"/>"redisConnection": {</text:p>
      <text:p text:style-name="Preformatted_20_Text"><text:s text:c="6"/>"type": "object",</text:p>
      <text:p text:style-name="Preformatted_20_Text"><text:s text:c="6"/>"properties": {</text:p>
      <text:p text:style-name="Preformatted_20_Text"><text:s text:c="8"/>"connection": {</text:p>
      <text:p text:style-name="Preformatted_20_Text"><text:s text:c="10"/>"type": "object",</text:p>
      <text:p text:style-name="Preformatted_20_Text"><text:s text:c="10"/>"properties": {</text:p>
      <text:p text:style-name="Preformatted_20_Text"><text:s text:c="12"/>"host": <text:s text:c="4"/>{ "type": "string" },</text:p>
      <text:p text:style-name="Preformatted_20_Text"><text:s text:c="12"/>"port": <text:s text:c="4"/>{ "type": "integer" },</text:p>
      <text:p text:style-name="Preformatted_20_Text"><text:s text:c="12"/>"db": <text:s text:c="6"/>{ "type": "integer" },</text:p>
      <text:p text:style-name="Preformatted_20_Text"><text:s text:c="12"/>"password": { "type": "string" }</text:p>
      <text:p text:style-name="Preformatted_20_Text"><text:s text:c="10"/>},</text:p>
      <text:p text:style-name="Preformatted_20_Text"><text:s text:c="10"/>"additionalProperties": false</text:p>
      <text:p text:style-name="Preformatted_20_Text"><text:s text:c="8"/>}</text:p>
      <text:p text:style-name="Preformatted_20_Text"><text:s text:c="6"/>},</text:p>
      <text:p text:style-name="Preformatted_20_Text"><text:s text:c="6"/>"additionalProperties": false</text:p>
      <text:p text:style-name="Preformatted_20_Text"><text:s text:c="4"/>},</text:p>
      <text:p text:style-name="Preformatted_20_Text"><text:s text:c="4"/>"neo4jConnection": {</text:p>
      <text:p text:style-name="Preformatted_20_Text"><text:s text:c="6"/>"type": "object",</text:p>
      <text:p text:style-name="Preformatted_20_Text"><text:s text:c="6"/>"properties": {</text:p>
      <text:p text:style-name="Preformatted_20_Text"><text:s text:c="8"/>"connection": {</text:p>
      <text:p text:style-name="Preformatted_20_Text"><text:s text:c="10"/>"type": "object",</text:p>
      <text:p text:style-name="Preformatted_20_Text"><text:s text:c="10"/>"properties": {</text:p>
      <text:p text:style-name="Preformatted_20_Text"><text:s text:c="12"/>"uri": <text:s text:c="5"/>{ "type": "string" },</text:p>
      <text:p text:style-name="Preformatted_20_Text"><text:s text:c="12"/>"user": <text:s text:c="4"/>{ "type": "string" },</text:p>
      <text:p text:style-name="Preformatted_20_Text"><text:s text:c="12"/>"password": { "type": "string" },</text:p>
      <text:p text:style-name="Preformatted_20_Text"><text:s text:c="12"/>"database": { "type": "string" }</text:p>
      <text:p text:style-name="Preformatted_20_Text"><text:s text:c="10"/>},</text:p>
      <text:p text:style-name="Preformatted_20_Text"><text:s text:c="10"/>"required": ["uri","user","password"],</text:p>
      <text:p text:style-name="Preformatted_20_Text"><text:s text:c="10"/>"additionalProperties": false</text:p>
      <text:p text:style-name="Preformatted_20_Text"><text:s text:c="8"/>}</text:p>
      <text:p text:style-name="Preformatted_20_Text"><text:s text:c="6"/>},</text:p>
      <text:p text:style-name="Preformatted_20_Text"><text:s text:c="6"/>"additionalProperties": false</text:p>
      <text:p text:style-name="Preformatted_20_Text"><text:s text:c="4"/>}</text:p>
      <text:p text:style-name="Preformatted_20_Text"><text:s text:c="2"/>}</text:p>
      <text:p text:style-name="Preformatted_20_Text">}</text:p>
      <text:h text:style-name="Heading_20_1" text:outline-level="1"><text:bookmark-start text:name="bibliography"/>Referências<text:bookmark-end text:name="bibliography"/></text:h>
      <text:section text:name="refs">
        <text:section text:name="ref-berlanga2021unified">
          <text:p text:style-name="First_20_paragraph">Berlanga, Adrián, Oscar Romero, Stefano Pedotti, et al. 2021. “A Unified Metamodel for NoSQL and Relational Databases.” <text:span text:style-name="Emphasis">arXiv Preprint arXiv:2105.06494</text:span>.</text:p>
        </text:section>
        <text:section text:name="ref-chillon2023propagating">
          <text:p text:style-name="Text_20_body">Chillón, Alberto Hernández et al. 2023. “Propagating Schema Changes to Code: An Approach Based on a Unified Data Model.”</text:p>
        </text:section>
        <text:section text:name="ref-chillon2024schema">
          <text:p text:style-name="Text_20_body">Chillón, Alberto Hernández, Meike Klettke, Diego Sevilla Ruiz, and Jesús García Molina. 2024. “A Generic Schema Evolution Approach for NoSQL and Relational Databases.” <text:span text:style-name="Emphasis">IEEE Transactions on Knowledge and Data Engineering</text:span> 36 (7): 2774–89. <text:a xlink:type="simple" xlink:href="https://doi.org/10.1109/TKDE.2024.3362273" office:name=""><text:span text:style-name="Definition">https://doi.org/10.1109/TKDE.2024.3362273</text:span></text:a>.</text:p>
        </text:section>
        <text:section text:name="ref-dbcrossbar2024">
          <text:p text:style-name="Text_20_body"><text:span text:style-name="Emphasis">Dbcrossbar: Copy Tabular Data Between Databases, CSV Files, and Cloud Storage</text:span>. 2024. <text:a xlink:type="simple" xlink:href="https://www.dbcrossbar.org" office:name=""><text:span text:style-name="Definition">Https://www.dbcrossbar.org</text:span></text:a>.</text:p>
        </text:section>
        <text:section text:name="ref-duggan2017bigdawg">
          <text:p text:style-name="Text_20_body">Duggan, Jennie et al. 2017. “BigDAWG: A Polystore System for Big Data Analytics.” <text:span text:style-name="Emphasis">IEEE International Conference on Data Engineering Workshops</text:span>.</text:p>
        </text:section>
        <text:section text:name="ref-ford2008productive">
          <text:p text:style-name="Text_20_body">Ford, Neal. 2008. <text:span text:style-name="Emphasis">The Productive Programmer</text:span>. O’Reilly Media.</text:p>
        </text:section>
        <text:section text:name="ref-fowler2011polyglot">
          <text:p text:style-name="Text_20_body">Fowler, Martin. 2011. <text:span text:style-name="Emphasis">PolyglotPersistence</text:span>. Disponível em: <text:a xlink:type="simple" xlink:href="https://martinfowler.com/bliki/PolyglotPersistence.html" office:name=""><text:span text:style-name="Definition">https://martinfowler.com/bliki/PolyglotPersistence.html</text:span></text:a>.</text:p>
        </text:section>
        <text:section text:name="ref-glake2022towards">
          <text:p text:style-name="Text_20_body">Glake, Daniel, Felix Kiehn, Mareike Schmidt, Fabian Panse, and Norbert Ritter. 2022. <text:span text:style-name="Emphasis">Towards Polyglot Data Stores: Overview and Open Research Questions</text:span>. <text:a xlink:type="simple" xlink:href="https://arxiv.org/abs/2204.05779" office:name=""><text:span text:style-name="Definition">https://arxiv.org/abs/2204.05779</text:span></text:a>.</text:p>
        </text:section>
        <text:section text:name="ref-hackolade2024polyglot">
          <text:p text:style-name="Text_20_body">Hackolade. 2024. <text:span text:style-name="Emphasis">Polyglot Data Modeling</text:span>. <text:a xlink:type="simple" xlink:href="https://hackolade.com/polyglot-data-modeling.html" office:name=""><text:span text:style-name="Definition">Https://hackolade.com/polyglot-data-modeling.html</text:span></text:a>.</text:p>
        </text:section>
        <text:section text:name="ref-hecht2011nosql">
          <text:p text:style-name="Text_20_body">Hecht, R., and S. Jablonski. 2011. “NoSQL Evaluation: A Use Case Oriented Survey.” <text:span text:style-name="Emphasis">Proceedings of the 2011 International Conference on Cloud and Service Computing</text:span>, 336–41.</text:p>
        </text:section>
        <text:section text:name="ref-khine2019review">
          <text:p text:style-name="Text_20_body">Khine, Pwint Phyu, and Zhaoshun Wang. 2019. “A Review of Polyglot Persistence in the Big Data World.” <text:span text:style-name="Emphasis">Information</text:span> 10 (4): 141.</text:p>
        </text:section>
        <text:section text:name="ref-kiehn2022polyglot">
          <text:p text:style-name="Text_20_body">Kiehn, Felix, Mareike Schmidt, Daniel Glake, et al. 2022. “Polyglot Data Management: State of the Art &amp; Open Challenges.” <text:span text:style-name="Emphasis">Proceedings of the VLDB Endowment</text:span> 15 (12): 3750–53.</text:p>
        </text:section>
        <text:section text:name="ref-mongodb_mongoimport">
          <text:p text:style-name="Text_20_body">MongoDB, Inc. 2026. <text:span text:style-name="Emphasis">Mongoimport — Database Tools</text:span>. <text:a xlink:type="simple" xlink:href="https://www.mongodb.com/docs/database-tools/mongoimport/" office:name=""><text:span text:style-name="Definition">Https://www.mongodb.com/docs/database-tools/mongoimport/</text:span></text:a>.</text:p>
        </text:section>
        <text:section text:name="ref-neo4j_import">
          <text:p text:style-name="Text_20_body">Neo4j, Inc. 2026. <text:span text:style-name="Emphasis">Import — Operations Manual</text:span>. <text:a xlink:type="simple" xlink:href="https://neo4j.com/docs/operations-manual/current/tools/neo4j-admin/neo4j-admin-import/" office:name=""><text:span text:style-name="Definition">Https://neo4j.com/docs/operations-manual/current/tools/neo4j-admin/neo4j-admin-import/</text:span></text:a>.</text:p>
        </text:section>
        <text:section text:name="ref-pereira2025transparent">
          <text:p text:style-name="Text_20_body">Pereira, Fernando de Oliveira, Eduardo Guerra, and Reinaldo Roberto Rosa. 2025. “A Framework Model for Supporting Transparent Polyglot Persistence with a Unified API and Extensible for Different Database Types.” <text:span text:style-name="Emphasis">Proceedings of the 27th International Conference on Enterprise Information Systems (ICEIS)</text:span>, 109–20. <text:a xlink:type="simple" xlink:href="https://doi.org/10.5220/0013369300003929" office:name=""><text:span text:style-name="Definition">https://doi.org/10.5220/0013369300003929</text:span></text:a>.</text:p>
        </text:section>
        <text:section text:name="ref-redis_bulkloading">
          <text:p text:style-name="Text_20_body">Redis Ltd. 2026. <text:span text:style-name="Emphasis">Bulk Loading</text:span>. <text:a xlink:type="simple" xlink:href="https://redis.io/docs/latest/develop/clients/patterns/bulk-loading/" office:name=""><text:span text:style-name="Definition">Https://redis.io/docs/latest/develop/clients/patterns/bulk-loading/</text:span></text:a>.</text:p>
        </text:section>
        <text:section text:name="ref-royhubara2022selecting">
          <text:p text:style-name="Text_20_body">Roy-Hubara, Naama, Peretz Shoval, and Arnon Sturm. 2022. “Selecting Databases for Polyglot Persistence Applications.” <text:span text:style-name="Emphasis">Data &amp; Knowledge Engineering</text:span> 137: 101950.</text:p>
        </text:section>
        <text:section text:name="ref-sachdeva2024plugging">
          <text:p text:style-name="Text_20_body">Sachdeva, Shelly, and Jignisa Vasava. 2024. “Plugging and Playing with Variety of Data Using Multi-Model Database and Polyglot Persistence.” <text:span text:style-name="Emphasis">2024 Third International Conference on Electrical, Electronics, Information and Communication Technologies (ICEEICT)</text:span>, 1–8. <text:a xlink:type="simple" xlink:href="https://doi.org/10.1109/ICEEICT61591.2024.10718481" office:name=""><text:span text:style-name="Definition">https://doi.org/10.1109/ICEEICT61591.2024.10718481</text:span></text:a>.</text:p>
        </text:section>
        <text:section text:name="ref-sadalage2013nosql">
          <text:p text:style-name="Text_20_body">Sadalage, Pramod J., and Martin Fowler. 2013. <text:span text:style-name="Emphasis">NoSQL Distilled: A Brief Guide to the Emerging World of Polyglot Persistence</text:span>. Pearson Education.</text:p>
        </text:section>
        <text:section text:name="ref-silva2024modelagem">
          <text:p text:style-name="Text_20_body">Silva, Hudson Afonso Batista da, Luís Gustavo Bornia, and Ronaldo dos Santos Mello. 2024. “Um Estudo Sobre Modelagem Poliglota de Dados.” <text:span text:style-name="Emphasis">Anais Da Escola Regional de Banco de Dados (ERBD)</text:span>, 11–20.</text:p>
        </text:section>
        <text:section text:name="ref-tan2017query">
          <text:p text:style-name="Text_20_body">Tan, Rui, Rada Chirkova, Vijay Gadepally, and Timothy Mattson. 2017. “Enabling Query Processing Across Heterogeneous Data Models: A Survey.” <text:span text:style-name="Emphasis">2017 </text:span><text:span text:style-name="Emphasis">IEEE</text:span><text:span text:style-name="Emphasis"> International Conference on Big Data (BigData)</text:span>, 3211–20.</text:p>
        </text:section>
        <text:section text:name="ref-cassandra_sstableloader">
          <text:p text:style-name="Text_20_body">The Apache Software Foundation. 2026. <text:span text:style-name="Emphasis">Sstableloader</text:span>. <text:a xlink:type="simple" xlink:href="https://cassandra.apache.org/doc/latest/cassandra/managing/tools/sstable/sstableloader.html" office:name=""><text:span text:style-name="Definition">Https://cassandra.apache.org/doc/latest/cassandra/managing/tools/sstable/sstableloader.html</text:span></text:a>.</text:p>
        </text:section>
        <text:section text:name="ref-postgresql_copy">
          <text:p text:style-name="Text_20_body">The PostgreSQL Global Development Group. 2026. <text:span text:style-name="Emphasis">PostgreSQL Documentation: </text:span><text:span text:style-name="Emphasis">COPY</text:span>. <text:a xlink:type="simple" xlink:href="https://www.postgresql.org/docs/current/sql-copy.html" office:name=""><text:span text:style-name="Definition">Https://www.postgresql.org/docs/current/sql-copy.html</text:span></text:a>.</text:p>
        </text:section>
        <text:section text:name="ref-wang2020cmc">
          <text:p text:style-name="Text_20_body">Wang, L. et al. 2020. “A Middleware for Polyglot Persistence and Data Portability of Big Data PaaS Cloud Applications.” <text:span text:style-name="Emphasis">Computers, Materials &amp; Continua</text:span> 65 (2): 1399–416.</text:p>
        </text:section>
        <text:section text:name="ref-ye2023benchmark">
          <text:p text:style-name="Text_20_body">Ye, Feng et al. 2023. “A Benchmark for Performance Evaluation of a Multi-Model Database Vs. Polyglot Persistence.” <text:span text:style-name="Emphasis">Journal of Database Management</text:span> 34 (3): 1–20.</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
    <dc:description/>
    <dc:subject/>
    <meta:keyword/>
    <meta:initial-creator/>
    <dc:creator/>
    <meta:creation-date>2026-06-30T09:10:12Z</meta:creation-date>
    <dc:date>2026-06-30T09:10:12Z</dc:date>
    <meta:user-defined meta:name="bibliography" meta:value-type="string">references.bib</meta:user-defined>
    <meta:user-defined meta:name="reference-section-title" meta:value-type="string">Referências</meta:user-defined>
  </office:meta>
</office:document-meta>
</file>

<file path=Formula-11/content.xml><?xml version="1.0" encoding="utf-8"?>
<math xmlns="http://www.w3.org/1998/Math/MathML" display="inline">
  <mrow>
    <mo>≥</mo>
    <mn>1</mn>
  </mrow>
</math>
</file>

<file path=Formula-13/content.xml><?xml version="1.0" encoding="utf-8"?>
<math xmlns="http://www.w3.org/1998/Math/MathML" display="inline">
  <mrow>
    <mo>≥</mo>
    <mn>0</mn>
  </mrow>
</math>
</file>

<file path=Formula-16/content.xml><?xml version="1.0" encoding="utf-8"?>
<math xmlns="http://www.w3.org/1998/Math/MathML" display="inline">
  <mi>×</mi>
</math>
</file>

<file path=Formula-5/content.xml><?xml version="1.0" encoding="utf-8"?>
<math xmlns="http://www.w3.org/1998/Math/MathML" display="inline">
  <mo>→</mo>
</math>
</file>

<file path=Formula-8/content.xml><?xml version="1.0" encoding="utf-8"?>
<math xmlns="http://www.w3.org/1998/Math/MathML" display="inline">
  <mo>→</mo>
</math>
</file>